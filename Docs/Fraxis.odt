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D200000161E26D5225.png" manifest:media-type="image/png"/>
  <manifest:file-entry manifest:full-path="Pictures/10000001000003BC0000012983F0B177.png" manifest:media-type="image/png"/>
  <manifest:file-entry manifest:full-path="Pictures/100000010000031A0000035723DB11BF.png" manifest:media-type="image/png"/>
  <manifest:file-entry manifest:full-path="Pictures/100000010000058D0000023AB016C227.png" manifest:media-type="image/png"/>
  <manifest:file-entry manifest:full-path="Pictures/10000001000004A1000002BF1356BC96.png" manifest:media-type="image/png"/>
  <manifest:file-entry manifest:full-path="Pictures/10000001000001C700000354E8D65000.png" manifest:media-type="image/png"/>
  <manifest:file-entry manifest:full-path="Pictures/1000000100000166000002B26EAAA2CE.png" manifest:media-type="image/png"/>
  <manifest:file-entry manifest:full-path="Pictures/10000001000001ED000002C90314E69F.png" manifest:media-type="image/png"/>
  <manifest:file-entry manifest:full-path="Pictures/10000001000003AE00000101FE08D281.png" manifest:media-type="image/png"/>
  <manifest:file-entry manifest:full-path="Pictures/10000001000003BB00000126B1B342C7.png" manifest:media-type="image/png"/>
  <manifest:file-entry manifest:full-path="Pictures/10000001000002EB000003629D50D39E.png" manifest:media-type="image/png"/>
  <manifest:file-entry manifest:full-path="Pictures/10000001000002AD000003DFE5EA9A87.png" manifest:media-type="image/png"/>
  <manifest:file-entry manifest:full-path="Pictures/1000000100000622000001A5E9EC71F6.png" manifest:media-type="image/png"/>
  <manifest:file-entry manifest:full-path="Pictures/100000010000018B000001881E7C0331.png" manifest:media-type="image/png"/>
  <manifest:file-entry manifest:full-path="Pictures/100000010000020F000002B91C4C51E6.png" manifest:media-type="image/png"/>
  <manifest:file-entry manifest:full-path="Pictures/10000001000004C400000306C0DBED44.png" manifest:media-type="image/png"/>
  <manifest:file-entry manifest:full-path="Pictures/100000010000061500000107F3A2B20F.png" manifest:media-type="image/png"/>
  <manifest:file-entry manifest:full-path="Pictures/10000001000005CA0000028B9A901D31.png" manifest:media-type="image/png"/>
  <manifest:file-entry manifest:full-path="Pictures/1000000100000562000001F8DCF5277A.png" manifest:media-type="image/png"/>
  <manifest:file-entry manifest:full-path="Pictures/100000010000057900000334F20F2F96.png" manifest:media-type="image/png"/>
  <manifest:file-entry manifest:full-path="Pictures/10000001000005A7000003117CA2ACFE.png" manifest:media-type="image/png"/>
  <manifest:file-entry manifest:full-path="Pictures/10000001000007740000037E7C7F80F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ascadia Code Light" svg:font-family="'Cascadia Code Light'" style:font-family-generic="modern" style:font-pitch="fixed"/>
    <style:font-face style:name="DS-Digital" svg:font-family="DS-Digit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6" style:family="table">
      <style:table-properties style:width="17.59cm" table:align="margins" style:writing-mode="lr-tb"/>
    </style:style>
    <style:style style:name="Tabel6.A" style:family="table-column">
      <style:table-column-properties style:column-width="5.863cm" style:rel-column-width="21845*"/>
    </style:style>
    <style:style style:name="Tabel6.A1" style:family="table-cell">
      <style:table-cell-properties fo:padding="0cm" fo:border="none" style:writing-mode="page"/>
    </style:style>
    <style:style style:name="Tabel7" style:family="table">
      <style:table-properties style:width="17.59cm" table:align="margins" style:writing-mode="lr-tb"/>
    </style:style>
    <style:style style:name="Tabel7.A" style:family="table-column">
      <style:table-column-properties style:column-width="5.863cm" style:rel-column-width="21845*"/>
    </style:style>
    <style:style style:name="Tabel7.A1" style:family="table-cell">
      <style:table-cell-properties fo:padding="0cm" fo:border="none" style:writing-mode="page"/>
    </style:style>
    <style:style style:name="Tabel9" style:family="table">
      <style:table-properties style:width="17.59cm" table:align="left"/>
    </style:style>
    <style:style style:name="Tabel9.A" style:family="table-column">
      <style:table-column-properties style:column-width="5.029cm"/>
    </style:style>
    <style:style style:name="Tabel9.B" style:family="table-column">
      <style:table-column-properties style:column-width="8.929cm"/>
    </style:style>
    <style:style style:name="Tabel9.C" style:family="table-column">
      <style:table-column-properties style:column-width="3.632cm"/>
    </style:style>
    <style:style style:name="Tabel9.A1" style:family="table-cell">
      <style:table-cell-properties style:vertical-align="middle" fo:padding="0.049cm" fo:border="none"/>
    </style:style>
    <style:style style:name="Tabel8" style:family="table">
      <style:table-properties style:width="17.59cm" table:align="margins" style:writing-mode="lr-tb"/>
    </style:style>
    <style:style style:name="Tabel8.A" style:family="table-column">
      <style:table-column-properties style:column-width="8.202cm" style:rel-column-width="30559*"/>
    </style:style>
    <style:style style:name="Tabel8.B" style:family="table-column">
      <style:table-column-properties style:column-width="3.524cm" style:rel-column-width="13130*"/>
    </style:style>
    <style:style style:name="Tabel8.C" style:family="table-column">
      <style:table-column-properties style:column-width="5.863cm" style:rel-column-width="21846*"/>
    </style:style>
    <style:style style:name="Tabel8.A1" style:family="table-cell">
      <style:table-cell-properties fo:padding="0cm" fo:border="none" style:writing-mode="page"/>
    </style:style>
    <style:style style:name="Tabel10" style:family="table">
      <style:table-properties style:width="17.59cm" table:align="margins" style:writing-mode="lr-tb"/>
    </style:style>
    <style:style style:name="Tabel10.A" style:family="table-column">
      <style:table-column-properties style:column-width="8.795cm" style:rel-column-width="32767*"/>
    </style:style>
    <style:style style:name="Tabel10.B" style:family="table-column">
      <style:table-column-properties style:column-width="8.795cm" style:rel-column-width="32768*"/>
    </style:style>
    <style:style style:name="Tabel10.A1" style:family="table-cell">
      <style:table-cell-properties style:writing-mode="page"/>
    </style:style>
    <style:style style:name="Tabel11" style:family="table">
      <style:table-properties style:width="17.59cm" table:align="margins" style:writing-mode="lr-tb"/>
    </style:style>
    <style:style style:name="Tabel11.A" style:family="table-column">
      <style:table-column-properties style:column-width="1.406cm" style:rel-column-width="5237*"/>
    </style:style>
    <style:style style:name="Tabel11.B" style:family="table-column">
      <style:table-column-properties style:column-width="2.695cm" style:rel-column-width="10041*"/>
    </style:style>
    <style:style style:name="Tabel11.C" style:family="table-column">
      <style:table-column-properties style:column-width="4.3cm" style:rel-column-width="16022*"/>
    </style:style>
    <style:style style:name="Tabel11.D" style:family="table-column">
      <style:table-column-properties style:column-width="9.188cm" style:rel-column-width="34235*"/>
    </style:style>
    <style:style style:name="Tabel11.A1" style:family="table-cell">
      <style:table-cell-properties fo:padding="0cm" fo:border="none" style:writing-mode="page"/>
    </style:style>
    <style:style style:name="Tabel12" style:family="table">
      <style:table-properties style:width="17.59cm" table:align="margins" style:writing-mode="lr-tb"/>
    </style:style>
    <style:style style:name="Tabel12.A" style:family="table-column">
      <style:table-column-properties style:column-width="1.406cm" style:rel-column-width="5237*"/>
    </style:style>
    <style:style style:name="Tabel12.B" style:family="table-column">
      <style:table-column-properties style:column-width="2.695cm" style:rel-column-width="10041*"/>
    </style:style>
    <style:style style:name="Tabel12.C" style:family="table-column">
      <style:table-column-properties style:column-width="4.3cm" style:rel-column-width="16022*"/>
    </style:style>
    <style:style style:name="Tabel12.D" style:family="table-column">
      <style:table-column-properties style:column-width="9.188cm" style:rel-column-width="34235*"/>
    </style:style>
    <style:style style:name="Tabel12.A1" style:family="table-cell">
      <style:table-cell-properties fo:padding="0cm" fo:border="none" style:writing-mode="page"/>
    </style:style>
    <style:style style:name="Tabel13" style:family="table">
      <style:table-properties style:width="17.59cm" table:align="margins" style:writing-mode="lr-tb"/>
    </style:style>
    <style:style style:name="Tabel13.A" style:family="table-column">
      <style:table-column-properties style:column-width="1.406cm" style:rel-column-width="5237*"/>
    </style:style>
    <style:style style:name="Tabel13.B" style:family="table-column">
      <style:table-column-properties style:column-width="2.695cm" style:rel-column-width="10041*"/>
    </style:style>
    <style:style style:name="Tabel13.C" style:family="table-column">
      <style:table-column-properties style:column-width="4.3cm" style:rel-column-width="16022*"/>
    </style:style>
    <style:style style:name="Tabel13.D" style:family="table-column">
      <style:table-column-properties style:column-width="9.188cm" style:rel-column-width="34235*"/>
    </style:style>
    <style:style style:name="Tabel13.A1" style:family="table-cell">
      <style:table-cell-properties fo:padding="0cm" fo:border="none" style:writing-mode="page"/>
    </style:style>
    <style:style style:name="Tabel5" style:family="table">
      <style:table-properties style:width="14.914cm" table:align="left"/>
    </style:style>
    <style:style style:name="Tabel5.A" style:family="table-column">
      <style:table-column-properties style:column-width="3.644cm"/>
    </style:style>
    <style:style style:name="Tabel5.B" style:family="table-column">
      <style:table-column-properties style:column-width="2.798cm"/>
    </style:style>
    <style:style style:name="Tabel5.E" style:family="table-column">
      <style:table-column-properties style:column-width="2.877cm"/>
    </style:style>
    <style:style style:name="Tabel5.A1" style:family="table-cell">
      <style:table-cell-properties style:vertical-align="middle" fo:background-color="#ffff00" fo:padding="0.071cm" fo:border="0.75pt solid #cccccc">
        <style:background-image/>
      </style:table-cell-properties>
    </style:style>
    <style:style style:name="Tabel5.A3" style:family="table-cell">
      <style:table-cell-properties style:vertical-align="middle" fo:padding="0.071cm" fo:border="0.75pt solid #cccccc"/>
    </style:style>
    <style:style style:name="Tabel5.B3" style:family="table-cell">
      <style:table-cell-properties style:vertical-align="middle" fo:padding="0.071cm" fo:border="0.75pt solid #cccccc"/>
    </style:style>
    <style:style style:name="Tabel5.C3" style:family="table-cell">
      <style:table-cell-properties style:vertical-align="middle" fo:padding="0.071cm" fo:border="0.75pt solid #cccccc"/>
    </style:style>
    <style:style style:name="Tabel5.D3" style:family="table-cell">
      <style:table-cell-properties style:vertical-align="middle" fo:padding="0.071cm" fo:border="0.75pt solid #cccccc"/>
    </style:style>
    <style:style style:name="Tabel5.E3" style:family="table-cell">
      <style:table-cell-properties style:vertical-align="middle" fo:padding="0.071cm" fo:border="0.75pt solid #cccccc"/>
    </style:style>
    <style:style style:name="Tabel5.A4" style:family="table-cell">
      <style:table-cell-properties style:vertical-align="middle" fo:padding="0.071cm" fo:border="0.75pt solid #cccccc"/>
    </style:style>
    <style:style style:name="Tabel5.B4" style:family="table-cell">
      <style:table-cell-properties style:vertical-align="middle" fo:padding="0.071cm" fo:border="0.75pt solid #cccccc"/>
    </style:style>
    <style:style style:name="Tabel5.C4" style:family="table-cell">
      <style:table-cell-properties style:vertical-align="middle" fo:padding="0.071cm" fo:border="0.75pt solid #cccccc"/>
    </style:style>
    <style:style style:name="Tabel5.D4" style:family="table-cell">
      <style:table-cell-properties style:vertical-align="middle" fo:padding="0.071cm" fo:border="0.75pt solid #cccccc"/>
    </style:style>
    <style:style style:name="Tabel5.E4" style:family="table-cell">
      <style:table-cell-properties style:vertical-align="middle" fo:padding="0.071cm" fo:border="0.75pt solid #cccccc"/>
    </style:style>
    <style:style style:name="Tabel5.A5" style:family="table-cell">
      <style:table-cell-properties style:vertical-align="middle" fo:padding="0.071cm" fo:border="0.75pt solid #cccccc"/>
    </style:style>
    <style:style style:name="Tabel5.B5" style:family="table-cell">
      <style:table-cell-properties style:vertical-align="middle" fo:padding="0.071cm" fo:border="0.75pt solid #cccccc"/>
    </style:style>
    <style:style style:name="Tabel5.C5" style:family="table-cell">
      <style:table-cell-properties style:vertical-align="middle" fo:padding="0.071cm" fo:border="0.75pt solid #cccccc"/>
    </style:style>
    <style:style style:name="Tabel5.D5" style:family="table-cell">
      <style:table-cell-properties style:vertical-align="middle" fo:padding="0.071cm" fo:border="0.75pt solid #cccccc"/>
    </style:style>
    <style:style style:name="Tabel5.E5" style:family="table-cell">
      <style:table-cell-properties style:vertical-align="middle" fo:padding="0.071cm" fo:border="0.75pt solid #cccccc"/>
    </style:style>
    <style:style style:name="Tabel5.A6" style:family="table-cell">
      <style:table-cell-properties style:vertical-align="middle" fo:padding="0.071cm" fo:border="0.75pt solid #cccccc"/>
    </style:style>
    <style:style style:name="Tabel5.B6" style:family="table-cell">
      <style:table-cell-properties style:vertical-align="middle" fo:padding="0.071cm" fo:border="0.75pt solid #cccccc"/>
    </style:style>
    <style:style style:name="Tabel5.C6" style:family="table-cell">
      <style:table-cell-properties style:vertical-align="middle" fo:padding="0.071cm" fo:border="0.75pt solid #cccccc"/>
    </style:style>
    <style:style style:name="Tabel5.D6" style:family="table-cell">
      <style:table-cell-properties style:vertical-align="middle" fo:padding="0.071cm" fo:border="0.75pt solid #cccccc"/>
    </style:style>
    <style:style style:name="Tabel5.E6" style:family="table-cell">
      <style:table-cell-properties style:vertical-align="middle" fo:padding="0.071cm" fo:border="0.75pt solid #cccccc"/>
    </style:style>
    <style:style style:name="Tabel5.A7" style:family="table-cell">
      <style:table-cell-properties style:vertical-align="middle" fo:padding="0.071cm" fo:border="0.75pt solid #cccccc"/>
    </style:style>
    <style:style style:name="Tabel5.B7" style:family="table-cell">
      <style:table-cell-properties style:vertical-align="middle" fo:padding="0.071cm" fo:border="0.75pt solid #cccccc"/>
    </style:style>
    <style:style style:name="Tabel5.C7" style:family="table-cell">
      <style:table-cell-properties style:vertical-align="middle" fo:padding="0.071cm" fo:border="0.75pt solid #cccccc"/>
    </style:style>
    <style:style style:name="Tabel5.D7" style:family="table-cell">
      <style:table-cell-properties style:vertical-align="middle" fo:padding="0.071cm" fo:border="0.75pt solid #cccccc"/>
    </style:style>
    <style:style style:name="Tabel5.E7" style:family="table-cell">
      <style:table-cell-properties style:vertical-align="middle" fo:padding="0.071cm" fo:border="0.75pt solid #cccccc"/>
    </style:style>
    <style:style style:name="Tabel5.A8" style:family="table-cell">
      <style:table-cell-properties style:vertical-align="middle" fo:padding="0.071cm" fo:border="0.75pt solid #cccccc"/>
    </style:style>
    <style:style style:name="Tabel5.B8" style:family="table-cell">
      <style:table-cell-properties style:vertical-align="middle" fo:padding="0.071cm" fo:border="0.75pt solid #cccccc"/>
    </style:style>
    <style:style style:name="Tabel5.C8" style:family="table-cell">
      <style:table-cell-properties style:vertical-align="middle" fo:padding="0.071cm" fo:border="0.75pt solid #cccccc"/>
    </style:style>
    <style:style style:name="Tabel5.D8" style:family="table-cell">
      <style:table-cell-properties style:vertical-align="middle" fo:padding="0.071cm" fo:border="0.75pt solid #cccccc"/>
    </style:style>
    <style:style style:name="Tabel5.E8" style:family="table-cell">
      <style:table-cell-properties style:vertical-align="middle" fo:padding="0.071cm" fo:border="0.75pt solid #cccccc"/>
    </style:style>
    <style:style style:name="Tabel5.A9" style:family="table-cell">
      <style:table-cell-properties style:vertical-align="middle" fo:padding="0.071cm" fo:border="0.75pt solid #cccccc"/>
    </style:style>
    <style:style style:name="Tabel5.B9" style:family="table-cell">
      <style:table-cell-properties style:vertical-align="middle" fo:padding="0.071cm" fo:border="0.75pt solid #cccccc"/>
    </style:style>
    <style:style style:name="Tabel5.C9" style:family="table-cell">
      <style:table-cell-properties style:vertical-align="middle" fo:padding="0.071cm" fo:border="0.75pt solid #cccccc"/>
    </style:style>
    <style:style style:name="Tabel5.D9" style:family="table-cell">
      <style:table-cell-properties style:vertical-align="middle" fo:padding="0.071cm" fo:border="0.75pt solid #cccccc"/>
    </style:style>
    <style:style style:name="Tabel5.E9" style:family="table-cell">
      <style:table-cell-properties style:vertical-align="middle" fo:padding="0.071cm" fo:border="0.75pt solid #cccccc"/>
    </style:style>
    <style:style style:name="Tabel5.A10" style:family="table-cell">
      <style:table-cell-properties style:vertical-align="middle" fo:padding="0.071cm" fo:border="0.75pt solid #cccccc"/>
    </style:style>
    <style:style style:name="Tabel5.B10" style:family="table-cell">
      <style:table-cell-properties style:vertical-align="middle" fo:padding="0.071cm" fo:border="0.75pt solid #cccccc"/>
    </style:style>
    <style:style style:name="Tabel5.C10" style:family="table-cell">
      <style:table-cell-properties style:vertical-align="middle" fo:padding="0.071cm" fo:border="0.75pt solid #cccccc"/>
    </style:style>
    <style:style style:name="Tabel5.D10" style:family="table-cell">
      <style:table-cell-properties style:vertical-align="middle" fo:padding="0.071cm" fo:border="0.75pt solid #cccccc"/>
    </style:style>
    <style:style style:name="Tabel5.E10" style:family="table-cell">
      <style:table-cell-properties style:vertical-align="middle" fo:padding="0.071cm" fo:border="0.75pt solid #cccccc"/>
    </style:style>
    <style:style style:name="Tabel5.A11" style:family="table-cell">
      <style:table-cell-properties style:vertical-align="middle" fo:padding="0.071cm" fo:border="0.75pt solid #cccccc"/>
    </style:style>
    <style:style style:name="Tabel5.B11" style:family="table-cell">
      <style:table-cell-properties style:vertical-align="middle" fo:padding="0.071cm" fo:border="0.75pt solid #cccccc"/>
    </style:style>
    <style:style style:name="Tabel5.C11" style:family="table-cell">
      <style:table-cell-properties style:vertical-align="middle" fo:padding="0.071cm" fo:border="0.75pt solid #cccccc"/>
    </style:style>
    <style:style style:name="Tabel5.D11" style:family="table-cell">
      <style:table-cell-properties style:vertical-align="middle" fo:padding="0.071cm" fo:border="0.75pt solid #cccccc"/>
    </style:style>
    <style:style style:name="Tabel5.E11" style:family="table-cell">
      <style:table-cell-properties style:vertical-align="middle" fo:padding="0.071cm" fo:border="0.75pt solid #cccccc"/>
    </style:style>
    <style:style style:name="Tabel14" style:family="table">
      <style:table-properties style:width="17.59cm" table:align="margins" style:writing-mode="lr-tb"/>
    </style:style>
    <style:style style:name="Tabel14.A" style:family="table-column">
      <style:table-column-properties style:column-width="2.993cm" style:rel-column-width="11152*"/>
    </style:style>
    <style:style style:name="Tabel14.B" style:family="table-column">
      <style:table-column-properties style:column-width="14.596cm" style:rel-column-width="54383*"/>
    </style:style>
    <style:style style:name="Tabel14.A1" style:family="table-cell">
      <style:table-cell-properties style:writing-mode="page"/>
    </style:style>
    <style:style style:name="Tabel15" style:family="table">
      <style:table-properties style:width="17.59cm" table:align="margins" style:writing-mode="lr-tb"/>
    </style:style>
    <style:style style:name="Tabel15.A" style:family="table-column">
      <style:table-column-properties style:column-width="4.397cm" style:rel-column-width="16383*"/>
    </style:style>
    <style:style style:name="Tabel15.D" style:family="table-column">
      <style:table-column-properties style:column-width="4.397cm" style:rel-column-width="16386*"/>
    </style:style>
    <style:style style:name="Tabel15.A1" style:family="table-cell">
      <style:table-cell-properties style:writing-mode="page"/>
    </style:style>
    <style:style style:name="Tabel2" style:family="table">
      <style:table-properties style:width="5.701cm" table:align="left"/>
    </style:style>
    <style:style style:name="Tabel2.A" style:family="table-column">
      <style:table-column-properties style:column-width="3.406cm"/>
    </style:style>
    <style:style style:name="Tabel2.B" style:family="table-column">
      <style:table-column-properties style:column-width="2.295cm"/>
    </style:style>
    <style:style style:name="Tabel2.A1" style:family="table-cell">
      <style:table-cell-properties style:vertical-align="middle" fo:padding="0.071cm" fo:border="0.75pt solid #cccccc"/>
    </style:style>
    <style:style style:name="Tabel3" style:family="table">
      <style:table-properties style:width="11.296cm" table:align="left"/>
    </style:style>
    <style:style style:name="Tabel3.A" style:family="table-column">
      <style:table-column-properties style:column-width="2.824cm"/>
    </style:style>
    <style:style style:name="Tabel3.B" style:family="table-column">
      <style:table-column-properties style:column-width="2.798cm"/>
    </style:style>
    <style:style style:name="Tabel3.D" style:family="table-column">
      <style:table-column-properties style:column-width="2.877cm"/>
    </style:style>
    <style:style style:name="Tabel3.A1" style:family="table-cell">
      <style:table-cell-properties style:vertical-align="middle" fo:padding="0.071cm" fo:border="0.75pt solid #cccccc"/>
    </style:style>
    <style:style style:name="Tabel4" style:family="table">
      <style:table-properties style:width="15.159cm" table:align="left"/>
    </style:style>
    <style:style style:name="Tabel4.A" style:family="table-column">
      <style:table-column-properties style:column-width="6.687cm"/>
    </style:style>
    <style:style style:name="Tabel4.B" style:family="table-column">
      <style:table-column-properties style:column-width="2.798cm"/>
    </style:style>
    <style:style style:name="Tabel4.D" style:family="table-column">
      <style:table-column-properties style:column-width="2.877cm"/>
    </style:style>
    <style:style style:name="Tabel4.A1" style:family="table-cell">
      <style:table-cell-properties style:vertical-align="middle" fo:padding="0.071cm" fo:border="0.75pt solid #cccccc"/>
    </style:style>
    <style:style style:name="Tabel1" style:family="table">
      <style:table-properties style:width="13.697cm" table:align="left"/>
    </style:style>
    <style:style style:name="Tabel1.A" style:family="table-column">
      <style:table-column-properties style:column-width="4.703cm"/>
    </style:style>
    <style:style style:name="Tabel1.B" style:family="table-column">
      <style:table-column-properties style:column-width="1.633cm"/>
    </style:style>
    <style:style style:name="Tabel1.C" style:family="table-column">
      <style:table-column-properties style:column-width="3.538cm"/>
    </style:style>
    <style:style style:name="Tabel1.D" style:family="table-column">
      <style:table-column-properties style:column-width="1.104cm"/>
    </style:style>
    <style:style style:name="Tabel1.E" style:family="table-column">
      <style:table-column-properties style:column-width="2.718cm"/>
    </style:style>
    <style:style style:name="Tabel1.A1" style:family="table-cell">
      <style:table-cell-properties style:vertical-align="middle" fo:padding="0.071cm" fo:border="0.75pt solid #cccccc"/>
    </style:style>
    <style:style style:name="P1" style:family="paragraph" style:parent-style-name="Standard">
      <style:text-properties fo:font-weight="normal" officeooo:rsid="0011e368" officeooo:paragraph-rsid="00179b5c"/>
    </style:style>
    <style:style style:name="P2" style:family="paragraph" style:parent-style-name="Standard">
      <style:text-properties fo:font-weight="normal" officeooo:rsid="0011e368" officeooo:paragraph-rsid="0011e368"/>
    </style:style>
    <style:style style:name="P3" style:family="paragraph" style:parent-style-name="Text_20_body">
      <style:paragraph-properties fo:margin-left="0cm" fo:margin-right="0cm" fo:margin-top="0cm" fo:margin-bottom="0.106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26pt" fo:font-style="normal" style:text-underline-style="none" fo:font-weight="normal" officeooo:rsid="001a817f" officeooo:paragraph-rsid="001a817f" style:text-blinking="false" fo:background-color="transparent"/>
    </style:style>
    <style:style style:name="P4" style:family="paragraph" style:parent-style-name="Subtitle">
      <style:paragraph-properties fo:text-align="center" style:justify-single-word="false"/>
      <style:text-properties officeooo:rsid="00179b5c" officeooo:paragraph-rsid="00179b5c"/>
    </style:style>
    <style:style style:name="P5" style:family="paragraph" style:parent-style-name="Text_20_body">
      <style:paragraph-properties fo:text-align="center" style:justify-single-word="false"/>
      <style:text-properties fo:font-variant="normal" fo:text-transform="none" fo:color="#666666" loext:opacity="100%" style:text-line-through-style="none" style:text-line-through-type="none" style:font-name="Arial3" fo:font-size="15pt" fo:font-style="normal" style:text-underline-style="none" fo:font-weight="normal" officeooo:rsid="0011e368" officeooo:paragraph-rsid="00179b5c" style:text-blinking="false" fo:background-color="transparent"/>
    </style:style>
    <style:style style:name="P6" style:family="paragraph" style:parent-style-name="Text_20_body">
      <style:paragraph-properties fo:margin-left="0cm" fo:margin-right="0cm" fo:margin-top="0cm" fo:margin-bottom="0.564cm" style:contextual-spacing="false" fo:line-height="138%" fo:text-align="center" style:justify-single-word="false" fo:text-indent="0cm" style:auto-text-indent="false" style:writing-mode="lr-tb"/>
      <style:text-properties fo:font-variant="normal" fo:text-transform="none" fo:color="#666666" loext:opacity="100%" style:text-line-through-style="none" style:text-line-through-type="none" style:font-name="Arial3" fo:font-size="15pt" fo:font-style="normal" style:text-underline-style="none" fo:font-weight="normal" officeooo:rsid="0011e368" officeooo:paragraph-rsid="00179b5c" style:text-blinking="false" fo:background-color="transparent"/>
    </style:style>
    <style:style style:name="P7" style:family="paragraph" style:parent-style-name="Text_20_body">
      <style:paragraph-properties fo:margin-left="0cm" fo:margin-right="0cm" fo:margin-top="0cm" fo:margin-bottom="0.564cm" style:contextual-spacing="false" fo:line-height="138%" fo:text-align="center" style:justify-single-word="false" fo:text-indent="1.27cm" style:auto-text-indent="false" style:writing-mode="lr-tb"/>
      <style:text-properties fo:font-variant="normal" fo:text-transform="none" fo:color="#666666" loext:opacity="100%" style:text-line-through-style="none" style:text-line-through-type="none" style:font-name="Arial3" fo:font-size="15pt" fo:font-style="normal" style:text-underline-style="none" fo:font-weight="normal" officeooo:rsid="0011e368" style:text-blinking="false" fo:background-color="transparent"/>
    </style:style>
    <style:style style:name="P8" style:family="paragraph" style:parent-style-name="Text_20_body">
      <style:paragraph-properties fo:margin-left="0cm" fo:margin-right="0cm" fo:margin-top="0cm" fo:margin-bottom="0.564cm" style:contextual-spacing="false" fo:line-height="138%" fo:text-align="center" style:justify-single-word="false" fo:text-indent="1.27cm" style:auto-text-indent="false" fo:break-before="page" style:writing-mode="lr-tb"/>
      <style:text-properties fo:font-variant="normal" fo:text-transform="none" fo:color="#666666" loext:opacity="100%" style:text-line-through-style="none" style:text-line-through-type="none" style:font-name="Arial3" fo:font-size="15pt" fo:font-style="normal" style:text-underline-style="none" fo:font-weight="normal" officeooo:rsid="0011e368" style:text-blinking="false" fo:background-color="transparent"/>
    </style:style>
    <style:style style:name="P9" style:family="paragraph" style:parent-style-name="Text_20_body">
      <style:paragraph-properties fo:margin-left="0cm" fo:margin-right="0cm" fo:margin-top="0cm" fo:margin-bottom="0.564cm" style:contextual-spacing="false" fo:line-height="138%" fo:text-indent="0cm" style:auto-text-indent="false" style:writing-mode="lr-tb"/>
      <style:text-properties fo:font-variant="normal" fo:text-transform="none" fo:color="#666666" loext:opacity="100%" style:text-line-through-style="none" style:text-line-through-type="none" style:font-name="Arial3" fo:font-size="22pt" fo:font-style="normal" style:text-underline-style="none" fo:font-weight="normal" officeooo:rsid="00179b5c" officeooo:paragraph-rsid="00179b5c" style:text-blinking="false" fo:background-color="transparent" style:font-size-asian="22pt" style:font-size-complex="22pt"/>
    </style:style>
    <style:style style:name="P10" style:family="paragraph" style:parent-style-name="Text_20_body">
      <style:paragraph-properties fo:margin-left="0cm" fo:margin-right="0cm" fo:margin-top="0.106cm" fo:margin-bottom="0cm" style:contextual-spacing="false" fo:line-height="120%" fo:text-indent="0cm" style:auto-text-indent="false" style:writing-mode="lr-tb"/>
      <style:text-properties officeooo:rsid="0011e368"/>
    </style:style>
    <style:style style:name="P11" style:family="paragraph" style:parent-style-name="Text_20_body">
      <style:paragraph-properties fo:margin-left="0.635cm" fo:margin-right="0cm" fo:margin-top="0.106cm" fo:margin-bottom="0cm" style:contextual-spacing="false" fo:line-height="120%" fo:text-indent="0cm" style:auto-text-indent="false" style:writing-mode="lr-tb"/>
      <style:text-properties officeooo:rsid="0011e368"/>
    </style:style>
    <style:style style:name="P12" style:family="paragraph" style:parent-style-name="Text_20_body">
      <style:paragraph-properties fo:margin-left="1.27cm" fo:margin-right="0cm" fo:margin-top="0.106cm" fo:margin-bottom="0cm" style:contextual-spacing="false" fo:line-height="120%" fo:text-indent="0cm" style:auto-text-indent="false" style:writing-mode="lr-tb"/>
      <style:text-properties officeooo:rsid="0011e368"/>
    </style:style>
    <style:style style:name="P13" style:family="paragraph" style:parent-style-name="Text_20_body">
      <style:paragraph-properties fo:margin-left="0.635cm" fo:margin-right="0cm" fo:margin-top="0.106cm" fo:margin-bottom="0cm" style:contextual-spacing="false" fo:line-height="120%" fo:text-indent="0cm" style:auto-text-indent="false" style:writing-mode="lr-tb"/>
      <style:text-properties officeooo:rsid="0011e368" officeooo:paragraph-rsid="00179b5c"/>
    </style:style>
    <style:style style:name="P14" style:family="paragraph" style:parent-style-name="Text_20_body">
      <style:paragraph-properties fo:margin-left="0.635cm" fo:margin-right="0cm" fo:margin-top="0.106cm" fo:margin-bottom="0cm" style:contextual-spacing="false" fo:line-height="120%" fo:text-indent="0cm" style:auto-text-indent="false" style:writing-mode="lr-tb"/>
      <style:text-properties fo:font-variant="normal" fo:text-transform="none" fo:color="#1155cc" loext:opacity="100%" style:text-line-through-style="none" style:text-line-through-type="none" style:font-name="Arial3" fo:font-size="11pt" fo:font-style="normal" style:text-underline-style="solid" style:text-underline-width="auto" style:text-underline-color="font-color" fo:font-weight="normal" officeooo:rsid="0011e368" officeooo:paragraph-rsid="00179b5c" style:text-blinking="false" fo:background-color="transparent"/>
    </style:style>
    <style:style style:name="P15" style:family="paragraph" style:parent-style-name="Heading_20_1">
      <style:paragraph-properties fo:break-before="page"/>
    </style:style>
    <style:style style:name="P1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17"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18"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b13f1" style:text-blinking="false" fo:background-color="transparent"/>
    </style:style>
    <style:style style:name="P19"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b13f1" officeooo:paragraph-rsid="001b13f1" style:text-blinking="false" fo:background-color="transparent"/>
    </style:style>
    <style:style style:name="P20" style:family="paragraph" style:parent-style-name="Text_20_body">
      <style:text-properties officeooo:rsid="0011e368"/>
    </style:style>
    <style:style style:name="P21" style:family="paragraph" style:parent-style-name="Text_20_body">
      <style:text-properties officeooo:rsid="001b13f1" officeooo:paragraph-rsid="001b13f1"/>
    </style:style>
    <style:style style:name="P22" style:family="paragraph" style:parent-style-name="Text_20_body">
      <style:text-properties officeooo:rsid="0011e368" officeooo:paragraph-rsid="00179b5c"/>
    </style:style>
    <style:style style:name="P23" style:family="paragraph" style:parent-style-name="Heading_20_1">
      <style:paragraph-properties fo:break-before="page"/>
      <style:text-properties officeooo:paragraph-rsid="00179b5c"/>
    </style:style>
    <style:style style:name="P24" style:family="paragraph" style:parent-style-name="Heading_20_2">
      <style:text-properties officeooo:rsid="001b13f1" officeooo:paragraph-rsid="001b13f1"/>
    </style:style>
    <style:style style:name="P25" style:family="paragraph" style:parent-style-name="Heading_20_2">
      <style:text-properties officeooo:paragraph-rsid="00179b5c"/>
    </style:style>
    <style:style style:name="P26" style:family="paragraph" style:parent-style-name="Heading_20_3" style:master-page-name="">
      <loext:graphic-properties draw:fill="none"/>
      <style:paragraph-properties fo:margin-left="2.499cm" fo:margin-right="0cm" fo:margin-top="0.247cm" fo:margin-bottom="0.212cm" style:contextual-spacing="false" fo:text-indent="-2.499cm" style:auto-text-indent="false" style:page-number="auto" fo:background-color="transparent" fo:keep-with-next="always">
        <style:tab-stops>
          <style:tab-stop style:position="-0.603cm"/>
        </style:tab-stops>
      </style:paragraph-properties>
    </style:style>
    <style:style style:name="P2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officeooo:rsid="0011e368" style:text-blinking="false" fo:background-color="transparent"/>
    </style:style>
    <style:style style:name="P28" style:family="paragraph" style:parent-style-name="Text_20_body" style:list-style-name="L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29" style:family="paragraph" style:parent-style-name="Text_20_body">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bac66" officeooo:paragraph-rsid="001bac66" style:text-blinking="false" fo:background-color="transparent"/>
    </style:style>
    <style:style style:name="P30" style:family="paragraph" style:parent-style-name="Heading_20_3" style:master-page-name="">
      <loext:graphic-properties draw:fill="none"/>
      <style:paragraph-properties fo:margin-left="2.499cm" fo:margin-right="0cm" fo:margin-top="0.247cm" fo:margin-bottom="0.212cm" style:contextual-spacing="false" fo:text-indent="-2.499cm" style:auto-text-indent="false" style:page-number="auto" fo:background-color="transparent" fo:keep-with-next="always"/>
    </style:style>
    <style:style style:name="P3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officeooo:rsid="0011e368" officeooo:paragraph-rsid="00179b5c" style:text-blinking="false" fo:background-color="transparent"/>
    </style:style>
    <style:style style:name="P32" style:family="paragraph" style:parent-style-name="Text_20_body">
      <style:text-properties officeooo:rsid="001bac66" officeooo:paragraph-rsid="001bac66"/>
    </style:style>
    <style:style style:name="P33" style:family="paragraph" style:parent-style-name="Text_20_body">
      <style:text-properties officeooo:rsid="001bac66" officeooo:paragraph-rsid="001c0564"/>
    </style:style>
    <style:style style:name="P34" style:family="paragraph" style:parent-style-name="Text_20_body">
      <style:text-properties officeooo:rsid="001c0564" officeooo:paragraph-rsid="001c0564"/>
    </style:style>
    <style:style style:name="P35" style:family="paragraph" style:parent-style-name="Table_20_Contents">
      <style:text-properties style:font-name="Arial3" fo:font-size="11pt" fo:font-weight="bold" officeooo:rsid="001e7b80" officeooo:paragraph-rsid="001e7b80" style:font-weight-asian="bold" style:font-weight-complex="bold"/>
    </style:style>
    <style:style style:name="P36" style:family="paragraph" style:parent-style-name="Table_20_Contents">
      <style:text-properties style:font-name="Arial3" fo:font-size="11pt" fo:font-weight="bold" officeooo:rsid="001c0564" officeooo:paragraph-rsid="001c0564" style:font-weight-asian="bold" style:font-weight-complex="bold"/>
    </style:style>
    <style:style style:name="P37" style:family="paragraph" style:parent-style-name="Table_20_Contents">
      <style:text-properties style:font-name="Arial3" fo:font-size="11pt" officeooo:rsid="001c0564" officeooo:paragraph-rsid="001c0564"/>
    </style:style>
    <style:style style:name="P38" style:family="paragraph" style:parent-style-name="Table_20_Contents">
      <style:text-properties style:font-name="Arial3" fo:font-size="11pt"/>
    </style:style>
    <style:style style:name="P39" style:family="paragraph" style:parent-style-name="Table_20_Contents">
      <style:text-properties style:font-name="Arial3" fo:font-size="11pt" fo:font-weight="normal" officeooo:rsid="001c0564" officeooo:paragraph-rsid="001c0564" style:font-weight-asian="normal" style:font-weight-complex="normal"/>
    </style:style>
    <style:style style:name="P40" style:family="paragraph" style:parent-style-name="Table_20_Contents">
      <style:text-properties style:font-name="Arial3" fo:font-size="11pt" officeooo:rsid="001cda75" officeooo:paragraph-rsid="001cda75"/>
    </style:style>
    <style:style style:name="P41" style:family="paragraph" style:parent-style-name="Table_20_Contents">
      <style:text-properties style:font-name="Arial3" fo:font-size="11pt" fo:font-weight="bold" officeooo:rsid="001cda75" officeooo:paragraph-rsid="001cda75" style:font-weight-asian="bold" style:font-weight-complex="bold"/>
    </style:style>
    <style:style style:name="P42" style:family="paragraph" style:parent-style-name="Text_20_body">
      <style:text-properties style:font-name="Arial3" fo:font-size="11pt" fo:font-style="normal" fo:font-weight="normal" officeooo:rsid="001e7b80" officeooo:paragraph-rsid="001e7b80" style:font-weight-asian="normal" style:font-weight-complex="normal"/>
    </style:style>
    <style:style style:name="P43" style:family="paragraph" style:parent-style-name="Table_20_Contents">
      <style:text-properties style:font-name="Arial3" fo:font-size="11pt" fo:font-weight="bold" officeooo:rsid="001c0564" officeooo:paragraph-rsid="001e7b80" style:font-weight-asian="bold" style:font-weight-complex="bold"/>
    </style:style>
    <style:style style:name="P44" style:family="paragraph" style:parent-style-name="Table_20_Contents">
      <style:text-properties style:font-name="Arial3" fo:font-size="11pt" officeooo:rsid="001e7b80" officeooo:paragraph-rsid="001e7b80"/>
    </style:style>
    <style:style style:name="P45" style:family="paragraph" style:parent-style-name="Table_20_Contents">
      <style:text-properties style:font-name="Arial3" fo:font-size="11pt" officeooo:rsid="001c0564" officeooo:paragraph-rsid="001e7b80"/>
    </style:style>
    <style:style style:name="P46" style:family="paragraph" style:parent-style-name="Standard">
      <style:text-properties style:font-name="Arial3" fo:font-size="11pt" fo:font-style="normal" fo:font-weight="normal" officeooo:rsid="001e7b80" officeooo:paragraph-rsid="001e7b80" style:font-weight-asian="normal" style:font-weight-complex="normal"/>
    </style:style>
    <style:style style:name="P47" style:family="paragraph" style:parent-style-name="Heading_20_3">
      <style:paragraph-properties fo:break-before="page"/>
    </style:style>
    <style:style style:name="P48" style:family="paragraph" style:parent-style-name="Text_20_body">
      <style:text-properties officeooo:rsid="001e7b80" officeooo:paragraph-rsid="001e7b80"/>
    </style:style>
    <style:style style:name="P49" style:family="paragraph" style:parent-style-name="Text_20_body">
      <style:text-properties officeooo:rsid="002bfa7c" officeooo:paragraph-rsid="002bfa7c"/>
    </style:style>
    <style:style style:name="P50" style:family="paragraph" style:parent-style-name="Text_20_body">
      <style:text-properties officeooo:rsid="001ebe81" officeooo:paragraph-rsid="001ebe81"/>
    </style:style>
    <style:style style:name="P51" style:family="paragraph" style:parent-style-name="Text_20_body">
      <style:text-properties style:font-name="Cascadia Code Light" officeooo:rsid="001ebe81" officeooo:paragraph-rsid="001ebe81"/>
    </style:style>
    <style:style style:name="P52" style:family="paragraph" style:parent-style-name="Heading_20_3">
      <style:paragraph-properties fo:break-before="page"/>
      <style:text-properties officeooo:rsid="00209890" officeooo:paragraph-rsid="00209890"/>
    </style:style>
    <style:style style:name="P53" style:family="paragraph" style:parent-style-name="Text_20_body">
      <style:text-properties officeooo:rsid="00209890" officeooo:paragraph-rsid="00209890"/>
    </style:style>
    <style:style style:name="P54" style:family="paragraph" style:parent-style-name="Text_20_body">
      <style:text-properties officeooo:rsid="00209890" officeooo:paragraph-rsid="00236da7"/>
    </style:style>
    <style:style style:name="P55" style:family="paragraph" style:parent-style-name="Text_20_body">
      <style:text-properties officeooo:rsid="002be2d0" officeooo:paragraph-rsid="002be2d0"/>
    </style:style>
    <style:style style:name="P56" style:family="paragraph" style:parent-style-name="Text_20_body">
      <style:text-properties officeooo:rsid="0021797f" officeooo:paragraph-rsid="0021797f"/>
    </style:style>
    <style:style style:name="P57" style:family="paragraph" style:parent-style-name="Table_20_Heading">
      <style:text-properties style:font-name="Arial1" fo:font-size="11pt" style:font-size-asian="11pt" style:font-size-complex="11pt"/>
    </style:style>
    <style:style style:name="P58" style:family="paragraph" style:parent-style-name="Text_20_body">
      <style:text-properties officeooo:rsid="0021afbb" officeooo:paragraph-rsid="0021afbb"/>
    </style:style>
    <style:style style:name="P59" style:family="paragraph" style:parent-style-name="Text_20_body">
      <style:text-properties officeooo:rsid="00264ffe" officeooo:paragraph-rsid="00264ffe"/>
    </style:style>
    <style:style style:name="P60" style:family="paragraph" style:parent-style-name="Heading_20_3">
      <style:paragraph-properties fo:break-before="page"/>
      <style:text-properties officeooo:rsid="0024703e" officeooo:paragraph-rsid="0024703e"/>
    </style:style>
    <style:style style:name="P61" style:family="paragraph" style:parent-style-name="Text_20_body">
      <style:text-properties officeooo:paragraph-rsid="0024703e"/>
    </style:style>
    <style:style style:name="P62" style:family="paragraph" style:parent-style-name="Text_20_body">
      <style:paragraph-properties style:writing-mode="lr-tb" style:writing-mode-automatic="false"/>
      <style:text-properties officeooo:paragraph-rsid="0024703e"/>
    </style:style>
    <style:style style:name="P63" style:family="paragraph" style:parent-style-name="Text_20_body">
      <style:paragraph-properties style:writing-mode="lr-tb" style:writing-mode-automatic="false"/>
      <style:text-properties officeooo:rsid="0024703e" officeooo:paragraph-rsid="0024703e"/>
    </style:style>
    <style:style style:name="P64" style:family="paragraph" style:parent-style-name="Text_20_body">
      <style:text-properties officeooo:rsid="0024703e" officeooo:paragraph-rsid="0024703e"/>
    </style:style>
    <style:style style:name="P65" style:family="paragraph" style:parent-style-name="Table_20_Contents">
      <style:text-properties style:font-name="Arial3" fo:font-size="11pt" fo:font-weight="bold" officeooo:rsid="0024703e" officeooo:paragraph-rsid="0024703e" style:font-weight-asian="bold" style:font-weight-complex="bold"/>
    </style:style>
    <style:style style:name="P66" style:family="paragraph" style:parent-style-name="Table_20_Contents">
      <style:text-properties style:font-name="Arial3" fo:font-size="11pt" officeooo:rsid="0024703e" officeooo:paragraph-rsid="0024703e"/>
    </style:style>
    <style:style style:name="P67" style:family="paragraph" style:parent-style-name="Text_20_body">
      <style:text-properties officeooo:rsid="0049f27d" officeooo:paragraph-rsid="0049f27d"/>
    </style:style>
    <style:style style:name="P68" style:family="paragraph" style:parent-style-name="Heading_20_3">
      <style:paragraph-properties fo:break-before="page"/>
      <style:text-properties officeooo:rsid="0026a663" officeooo:paragraph-rsid="0026a663"/>
    </style:style>
    <style:style style:name="P69" style:family="paragraph" style:parent-style-name="Text_20_body">
      <style:text-properties officeooo:paragraph-rsid="0026a663"/>
    </style:style>
    <style:style style:name="P70" style:family="paragraph" style:parent-style-name="Text_20_body">
      <style:paragraph-properties fo:break-before="page"/>
      <style:text-properties officeooo:rsid="002bfefd" officeooo:paragraph-rsid="002bfefd"/>
    </style:style>
    <style:style style:name="P71" style:family="paragraph" style:parent-style-name="Text_20_body">
      <style:text-properties officeooo:rsid="002bfefd" officeooo:paragraph-rsid="002bfefd"/>
    </style:style>
    <style:style style:name="P72" style:family="paragraph" style:parent-style-name="Text_20_body">
      <style:text-properties officeooo:rsid="0026a663" officeooo:paragraph-rsid="0026a663"/>
    </style:style>
    <style:style style:name="P73" style:family="paragraph" style:parent-style-name="Table_20_Contents">
      <style:text-properties style:font-name="Arial3" fo:font-size="11pt" fo:font-weight="bold" officeooo:rsid="0026a663" officeooo:paragraph-rsid="0026a663" style:font-weight-asian="bold" style:font-weight-complex="bold"/>
    </style:style>
    <style:style style:name="P74" style:family="paragraph" style:parent-style-name="Table_20_Contents">
      <style:text-properties style:font-name="Arial3" fo:font-size="11pt" officeooo:rsid="0026a663" officeooo:paragraph-rsid="0026a663"/>
    </style:style>
    <style:style style:name="P75" style:family="paragraph" style:parent-style-name="Table_20_Contents">
      <style:text-properties style:font-name="Arial3" fo:font-size="11pt" fo:font-weight="bold" officeooo:rsid="002812f5" officeooo:paragraph-rsid="002812f5" style:font-weight-asian="bold" style:font-weight-complex="bold"/>
    </style:style>
    <style:style style:name="P76" style:family="paragraph" style:parent-style-name="Table_20_Contents">
      <style:text-properties style:font-name="Arial3" fo:font-size="11pt" officeooo:rsid="002812f5" officeooo:paragraph-rsid="002812f5"/>
    </style:style>
    <style:style style:name="P77" style:family="paragraph" style:parent-style-name="Table_20_Contents">
      <style:text-properties style:font-name="Arial3" fo:font-size="11pt" officeooo:rsid="0026a663"/>
    </style:style>
    <style:style style:name="P78" style:family="paragraph" style:parent-style-name="Table_20_Contents">
      <style:text-properties style:font-name="Arial3" fo:font-size="11pt" officeooo:paragraph-rsid="0026a663"/>
    </style:style>
    <style:style style:name="P79" style:family="paragraph" style:parent-style-name="Table_20_Contents">
      <style:text-properties style:font-name="Arial3" fo:font-size="11pt" officeooo:rsid="002934e3" officeooo:paragraph-rsid="002934e3"/>
    </style:style>
    <style:style style:name="P80" style:family="paragraph" style:parent-style-name="Standard">
      <style:text-properties officeooo:rsid="0026a663" officeooo:paragraph-rsid="0026a663"/>
    </style:style>
    <style:style style:name="P81" style:family="paragraph" style:parent-style-name="Text_20_body">
      <style:text-properties officeooo:rsid="002934e3" officeooo:paragraph-rsid="002934e3"/>
    </style:style>
    <style:style style:name="P82" style:family="paragraph" style:parent-style-name="Heading_20_3">
      <style:paragraph-properties fo:break-before="page"/>
      <style:text-properties officeooo:rsid="002a4dc3" officeooo:paragraph-rsid="002a4dc3"/>
    </style:style>
    <style:style style:name="P83" style:family="paragraph" style:parent-style-name="Text_20_body">
      <style:text-properties officeooo:paragraph-rsid="002a4dc3"/>
    </style:style>
    <style:style style:name="P84" style:family="paragraph" style:parent-style-name="Text_20_body">
      <style:paragraph-properties fo:break-before="page"/>
      <style:text-properties officeooo:rsid="002a4dc3" officeooo:paragraph-rsid="002a4dc3"/>
    </style:style>
    <style:style style:name="P85" style:family="paragraph" style:parent-style-name="Text_20_body">
      <style:text-properties officeooo:rsid="002a4dc3" officeooo:paragraph-rsid="002a4dc3"/>
    </style:style>
    <style:style style:name="P86" style:family="paragraph" style:parent-style-name="Heading_20_3">
      <style:paragraph-properties fo:break-before="page"/>
      <style:text-properties officeooo:rsid="002bfa7c" officeooo:paragraph-rsid="002bfa7c"/>
    </style:style>
    <style:style style:name="P87" style:family="paragraph" style:parent-style-name="Text_20_body">
      <style:text-properties officeooo:paragraph-rsid="002bfa7c"/>
    </style:style>
    <style:style style:name="P88" style:family="paragraph" style:parent-style-name="Text_20_body" style:list-style-name="L3">
      <style:text-properties officeooo:rsid="002bfefd" officeooo:paragraph-rsid="002bfefd"/>
    </style:style>
    <style:style style:name="P89" style:family="paragraph" style:parent-style-name="Text_20_body" style:list-style-name="L3">
      <style:text-properties officeooo:rsid="00391d8e" officeooo:paragraph-rsid="00391d8e"/>
    </style:style>
    <style:style style:name="P90" style:family="paragraph" style:parent-style-name="Heading_20_2">
      <style:paragraph-properties fo:break-before="page"/>
      <style:text-properties officeooo:paragraph-rsid="00179b5c"/>
    </style:style>
    <style:style style:name="P91" style:family="paragraph" style:parent-style-name="Text_20_body">
      <style:text-properties officeooo:rsid="002e9b73" officeooo:paragraph-rsid="002e9b73"/>
    </style:style>
    <style:style style:name="P92" style:family="paragraph" style:parent-style-name="Text_20_body" style:list-style-name="L4">
      <style:text-properties officeooo:rsid="002e9b73" officeooo:paragraph-rsid="002e9b73"/>
    </style:style>
    <style:style style:name="P93" style:family="paragraph" style:parent-style-name="Heading_20_3">
      <style:text-properties officeooo:rsid="002e9b73" officeooo:paragraph-rsid="002e9b73"/>
    </style:style>
    <style:style style:name="P94" style:family="paragraph" style:parent-style-name="Text_20_body">
      <style:text-properties officeooo:paragraph-rsid="002e9b73"/>
    </style:style>
    <style:style style:name="P95" style:family="paragraph" style:parent-style-name="Heading_20_2">
      <style:paragraph-properties fo:break-before="page"/>
      <style:text-properties officeooo:rsid="002e9b73" officeooo:paragraph-rsid="002e9b73"/>
    </style:style>
    <style:style style:name="P96" style:family="paragraph" style:parent-style-name="Text_20_body">
      <style:text-properties officeooo:rsid="002ed049" officeooo:paragraph-rsid="002ed049"/>
    </style:style>
    <style:style style:name="P97" style:family="paragraph" style:parent-style-name="Text_20_body" style:list-style-name="L5">
      <style:text-properties officeooo:rsid="002ed049" officeooo:paragraph-rsid="002ed049"/>
    </style:style>
    <style:style style:name="P98"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99"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2ed049" officeooo:paragraph-rsid="002ed049" style:text-blinking="false" fo:background-color="transparent"/>
    </style:style>
    <style:style style:name="P100"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2ed049" style:text-blinking="false" fo:background-color="transparent"/>
    </style:style>
    <style:style style:name="P101" style:family="paragraph" style:parent-style-name="Heading_20_2" style:list-style-name="L7">
      <loext:graphic-properties draw:fill="none" draw:fill-color="#ffffff"/>
      <style:paragraph-properties fo:margin-left="1.679cm" fo:margin-right="0cm" fo:margin-top="0.353cm" fo:margin-bottom="0cm" style:contextual-spacing="false" fo:line-height="138%" fo:text-indent="-1.101cm" style:auto-text-indent="false" fo:background-color="transparent" fo:padding="0cm" fo:border="none" style:writing-mode="lr-tb"/>
      <style:text-properties officeooo:rsid="0011e368"/>
    </style:style>
    <style:style style:name="P102" style:family="paragraph" style:parent-style-name="Heading_20_1">
      <style:paragraph-properties fo:break-before="page"/>
      <style:text-properties officeooo:paragraph-rsid="002edd4c"/>
    </style:style>
    <style:style style:name="P103" style:family="paragraph" style:parent-style-name="Heading_20_2">
      <style:text-properties officeooo:rsid="002edd4c" officeooo:paragraph-rsid="002edd4c"/>
    </style:style>
    <style:style style:name="P104" style:family="paragraph" style:parent-style-name="Text_20_body">
      <style:text-properties officeooo:rsid="002edd4c" officeooo:paragraph-rsid="002edd4c"/>
    </style:style>
    <style:style style:name="P105" style:family="paragraph" style:parent-style-name="Text_20_body">
      <style:text-properties officeooo:rsid="0030b5d9" officeooo:paragraph-rsid="0030b5d9"/>
    </style:style>
    <style:style style:name="P106" style:family="paragraph" style:parent-style-name="Text_20_body">
      <style:text-properties officeooo:rsid="002edd4c" officeooo:paragraph-rsid="0030b5d9"/>
    </style:style>
    <style:style style:name="P107" style:family="paragraph" style:parent-style-name="Text_20_body">
      <style:text-properties officeooo:rsid="0030b5d9" officeooo:paragraph-rsid="00319213"/>
    </style:style>
    <style:style style:name="P108" style:family="paragraph" style:parent-style-name="Text_20_body" style:list-style-name="L8">
      <style:text-properties officeooo:rsid="002edd4c" officeooo:paragraph-rsid="002edd4c"/>
    </style:style>
    <style:style style:name="P109" style:family="paragraph" style:parent-style-name="Heading_20_2">
      <style:text-properties officeooo:rsid="0030b5d9" officeooo:paragraph-rsid="0030b5d9"/>
    </style:style>
    <style:style style:name="P110" style:family="paragraph" style:parent-style-name="Heading_20_2">
      <style:text-properties officeooo:rsid="0018f274" officeooo:paragraph-rsid="002edd4c"/>
    </style:style>
    <style:style style:name="P111" style:family="paragraph" style:parent-style-name="Text_20_body" style:list-style-name="L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officeooo:paragraph-rsid="002edd4c"/>
    </style:style>
    <style:style style:name="P112" style:family="paragraph" style:parent-style-name="Text_20_body" style:list-style-name="L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2edd4c" style:text-blinking="false" fo:background-color="transparent"/>
    </style:style>
    <style:style style:name="P113" style:family="paragraph" style:parent-style-name="Heading_20_2">
      <style:text-properties officeooo:paragraph-rsid="002edd4c"/>
    </style:style>
    <style:style style:name="P114" style:family="paragraph" style:parent-style-name="Text_20_body">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319213" officeooo:paragraph-rsid="00319213" style:text-blinking="false" fo:background-color="transparent"/>
    </style:style>
    <style:style style:name="P115"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officeooo:paragraph-rsid="00319213"/>
    </style:style>
    <style:style style:name="P116"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officeooo:rsid="0031ddb5" officeooo:paragraph-rsid="0031ddb5"/>
    </style:style>
    <style:style style:name="P117"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officeooo:rsid="0031ddb5" officeooo:paragraph-rsid="0031ddb5"/>
    </style:style>
    <style:style style:name="P118" style:family="paragraph" style:parent-style-name="Text_20_body">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officeooo:rsid="0011e368" officeooo:paragraph-rsid="00319213"/>
    </style:style>
    <style:style style:name="P119"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officeooo:paragraph-rsid="002edd4c" style:text-blinking="false" fo:background-color="transparent"/>
    </style:style>
    <style:style style:name="P120" style:family="paragraph" style:parent-style-name="Table_20_Contents">
      <style:paragraph-properties fo:margin-left="0cm" fo:margin-right="0cm" fo:text-indent="0cm" style:auto-text-indent="false"/>
      <style:text-properties officeooo:paragraph-rsid="002edd4c"/>
    </style:style>
    <style:style style:name="P121"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officeooo:paragraph-rsid="002edd4c" style:text-blinking="false" fo:background-color="transparent"/>
    </style:style>
    <style:style style:name="P122" style:family="paragraph" style:parent-style-name="Table_20_Contents">
      <style:paragraph-properties fo:margin-left="0cm" fo:margin-right="0cm" fo:margin-top="0cm" fo:margin-bottom="0cm" style:contextual-spacing="false" fo:line-height="138%" fo:text-align="right"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officeooo:paragraph-rsid="002edd4c" style:text-blinking="false" fo:background-color="transparent"/>
    </style:style>
    <style:style style:name="P123" style:family="paragraph" style:parent-style-name="Table_20_Contents">
      <style:paragraph-properties fo:margin-left="0cm" fo:margin-right="0cm" fo:margin-top="0cm" fo:margin-bottom="0cm" style:contextual-spacing="false" fo:line-height="138%" fo:text-align="right"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officeooo:paragraph-rsid="002edd4c" style:text-blinking="false" fo:background-color="transparent"/>
    </style:style>
    <style:style style:name="P124" style:family="paragraph" style:parent-style-name="Text_20_body">
      <style:text-properties fo:font-weight="normal" officeooo:rsid="0011e368" officeooo:paragraph-rsid="002edd4c"/>
    </style:style>
    <style:style style:name="P125" style:family="paragraph" style:parent-style-name="Heading_20_2">
      <style:text-properties officeooo:rsid="0018f274" officeooo:paragraph-rsid="0018f274"/>
    </style:style>
    <style:style style:name="P12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79b5c" style:text-blinking="false" fo:background-color="transparent"/>
    </style:style>
    <style:style style:name="P127" style:family="paragraph" style:parent-style-name="Text_20_body" style:list-style-name="L1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79b5c" style:text-blinking="false" fo:background-color="transparent"/>
    </style:style>
    <style:style style:name="P128" style:family="paragraph" style:parent-style-name="Text_20_body" style:list-style-name="L1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8f274" style:text-blinking="false" fo:background-color="transparent"/>
    </style:style>
    <style:style style:name="P129" style:family="paragraph" style:parent-style-name="Heading_20_2">
      <style:text-properties officeooo:rsid="0018f274"/>
    </style:style>
    <style:style style:name="P130"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8f274" style:text-blinking="false" fo:background-color="transparent"/>
    </style:style>
    <style:style style:name="P131" style:family="paragraph" style:parent-style-name="Text_20_body" style:list-style-name="L1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8f274" style:text-blinking="false" fo:background-color="transparent"/>
    </style:style>
    <style:style style:name="P132" style:family="paragraph" style:parent-style-name="Heading_20_3">
      <style:text-properties officeooo:rsid="00403d8a" officeooo:paragraph-rsid="00403d8a"/>
    </style:style>
    <style:style style:name="P13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32f1eb" officeooo:paragraph-rsid="0032f1eb" style:text-blinking="false" fo:background-color="transparent"/>
    </style:style>
    <style:style style:name="P134" style:family="paragraph" style:parent-style-name="Text_20_body" style:master-page-name="">
      <style:paragraph-properties fo:margin-left="0cm" fo:margin-right="0cm" fo:margin-top="0cm" fo:margin-bottom="0cm" style:contextual-spacing="false" fo:line-height="138%" fo:keep-together="always" fo:text-indent="0cm" style:auto-text-indent="false" style:page-number="auto"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32f1eb" officeooo:paragraph-rsid="0032f1eb" style:text-blinking="false" fo:background-color="transparent" style:font-weight-asian="bold" style:font-weight-complex="bold"/>
    </style:style>
    <style:style style:name="P135" style:family="paragraph" style:parent-style-name="Text_20_body">
      <style:text-properties officeooo:rsid="00403d8a" officeooo:paragraph-rsid="00403d8a"/>
    </style:style>
    <style:style style:name="P136" style:family="paragraph" style:parent-style-name="Text_20_body" style:list-style-name="L13">
      <style:text-properties officeooo:rsid="00403d8a" officeooo:paragraph-rsid="00403d8a"/>
    </style:style>
    <style:style style:name="P137" style:family="paragraph" style:parent-style-name="Text_20_body">
      <style:text-properties officeooo:rsid="0041baab" officeooo:paragraph-rsid="0041baab"/>
    </style:style>
    <style:style style:name="P138"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32f1eb" officeooo:paragraph-rsid="0041baab" style:text-blinking="false" fo:background-color="transparent" style:font-weight-asian="bold" style:font-weight-complex="bold"/>
    </style:style>
    <style:style style:name="P139" style:family="paragraph" style:parent-style-name="Standard" style:master-page-name="">
      <style:paragraph-properties fo:keep-together="always" style:page-number="auto" fo:keep-with-next="always"/>
      <style:text-properties style:font-name="Liberation Mono" officeooo:rsid="0032f1eb" officeooo:paragraph-rsid="0041baab" style:font-name-asian="Liberation Mono" style:font-name-complex="Liberation Mono"/>
    </style:style>
    <style:style style:name="P140" style:family="paragraph" style:parent-style-name="Standard">
      <style:paragraph-properties fo:keep-together="always" fo:keep-with-next="always"/>
      <style:text-properties style:font-name="Liberation Mono" officeooo:rsid="0032f1eb" officeooo:paragraph-rsid="0041baab"/>
    </style:style>
    <style:style style:name="P141" style:family="paragraph" style:parent-style-name="Text_20_body">
      <style:text-properties officeooo:rsid="00434475" officeooo:paragraph-rsid="0041baab"/>
    </style:style>
    <style:style style:name="P142" style:family="paragraph" style:parent-style-name="Text_20_body">
      <style:paragraph-properties fo:keep-together="always"/>
      <style:text-properties officeooo:rsid="0034e408" officeooo:paragraph-rsid="0041baab"/>
    </style:style>
    <style:style style:name="P143" style:family="paragraph" style:parent-style-name="Text_20_body">
      <style:text-properties fo:font-weight="normal" officeooo:rsid="00434475" officeooo:paragraph-rsid="00434475" style:font-weight-asian="normal" style:font-weight-complex="normal"/>
    </style:style>
    <style:style style:name="P144" style:family="paragraph" style:parent-style-name="Standard">
      <style:paragraph-properties fo:keep-together="always" fo:keep-with-next="always"/>
      <style:text-properties officeooo:rsid="0032f1eb" officeooo:paragraph-rsid="0041baab"/>
    </style:style>
    <style:style style:name="P145" style:family="paragraph" style:parent-style-name="Standard">
      <style:text-properties style:font-name="Liberation Mono" officeooo:rsid="0032f1eb" officeooo:paragraph-rsid="0041baab" style:font-name-asian="Liberation Mono" style:font-name-complex="Liberation Mono"/>
    </style:style>
    <style:style style:name="P146" style:family="paragraph" style:parent-style-name="Standard">
      <style:text-properties style:font-name="Liberation Mono" officeooo:rsid="0032f1eb" officeooo:paragraph-rsid="00434475"/>
    </style:style>
    <style:style style:name="P147" style:family="paragraph" style:parent-style-name="Text_20_body">
      <style:text-properties officeooo:rsid="00364a3c" officeooo:paragraph-rsid="0041baab"/>
    </style:style>
    <style:style style:name="P148" style:family="paragraph" style:parent-style-name="Text_20_body">
      <style:text-properties officeooo:rsid="00352395" officeooo:paragraph-rsid="0041baab"/>
    </style:style>
    <style:style style:name="P149" style:family="paragraph" style:parent-style-name="Text_20_body">
      <style:text-properties fo:font-weight="normal" officeooo:rsid="00364a3c" officeooo:paragraph-rsid="0041baab" style:font-weight-asian="normal" style:font-weight-complex="normal"/>
    </style:style>
    <style:style style:name="P150" style:family="paragraph" style:parent-style-name="Table_20_Contents">
      <style:text-properties style:font-name="Arial3" fo:font-size="11pt" fo:font-weight="bold" officeooo:rsid="00434475" officeooo:paragraph-rsid="00434475" style:font-weight-asian="bold" style:font-weight-complex="bold"/>
    </style:style>
    <style:style style:name="P151" style:family="paragraph" style:parent-style-name="Table_20_Contents">
      <style:text-properties style:font-name="Arial3" fo:font-size="11pt" officeooo:rsid="00434475" officeooo:paragraph-rsid="00434475"/>
    </style:style>
    <style:style style:name="P152" style:family="paragraph" style:parent-style-name="Standard">
      <style:text-properties style:font-name="Liberation Mono" officeooo:rsid="0032f1eb" officeooo:paragraph-rsid="0041baab"/>
    </style:style>
    <style:style style:name="P153" style:family="paragraph" style:parent-style-name="Text_20_body">
      <style:text-properties fo:font-weight="bold" officeooo:rsid="00434475" officeooo:paragraph-rsid="00434475" style:font-weight-asian="bold" style:font-weight-complex="bold"/>
    </style:style>
    <style:style style:name="P154" style:family="paragraph" style:parent-style-name="Standard">
      <style:text-properties style:font-name="Liberation Mono" fo:font-weight="normal" officeooo:rsid="0032f1eb" officeooo:paragraph-rsid="0041baab" style:font-name-asian="Liberation Mono" style:font-weight-asian="normal" style:font-name-complex="Liberation Mono" style:font-weight-complex="normal"/>
    </style:style>
    <style:style style:name="P155" style:family="paragraph" style:parent-style-name="Standard">
      <style:text-properties fo:font-weight="normal" officeooo:rsid="00352395" officeooo:paragraph-rsid="0041baab" style:font-weight-asian="normal" style:font-weight-complex="normal"/>
    </style:style>
    <style:style style:name="P156" style:family="paragraph" style:parent-style-name="Standard">
      <style:text-properties style:font-name="Liberation Mono" fo:font-weight="normal" officeooo:rsid="0032f1eb" officeooo:paragraph-rsid="00434475" style:font-name-asian="Liberation Mono" style:font-weight-asian="normal" style:font-name-complex="Liberation Mono" style:font-weight-complex="normal"/>
    </style:style>
    <style:style style:name="P157" style:family="paragraph" style:parent-style-name="Standard">
      <style:text-properties fo:font-weight="normal" officeooo:rsid="00352395" officeooo:paragraph-rsid="00434475" style:font-weight-asian="normal" style:font-weight-complex="normal"/>
    </style:style>
    <style:style style:name="P158" style:family="paragraph" style:parent-style-name="Text_20_body">
      <style:text-properties fo:font-weight="normal" officeooo:rsid="004475ac" officeooo:paragraph-rsid="004475ac" style:font-weight-asian="normal" style:font-weight-complex="normal"/>
    </style:style>
    <style:style style:name="P159" style:family="paragraph" style:parent-style-name="Text_20_body">
      <style:text-properties fo:font-weight="bold" officeooo:rsid="004475ac" officeooo:paragraph-rsid="004475ac" style:font-weight-asian="bold" style:font-weight-complex="bold"/>
    </style:style>
    <style:style style:name="P160" style:family="paragraph" style:parent-style-name="Standard">
      <style:text-properties officeooo:paragraph-rsid="0041baab"/>
    </style:style>
    <style:style style:name="P161" style:family="paragraph" style:parent-style-name="Standard">
      <style:text-properties style:font-name="Liberation Mono" officeooo:rsid="0032f1eb" officeooo:paragraph-rsid="004475ac" style:font-name-asian="Liberation Mono" style:font-name-complex="Liberation Mono"/>
    </style:style>
    <style:style style:name="P162" style:family="paragraph" style:parent-style-name="Standard">
      <style:text-properties officeooo:paragraph-rsid="004475ac"/>
    </style:style>
    <style:style style:name="P163" style:family="paragraph" style:parent-style-name="Text_20_body">
      <style:text-properties officeooo:rsid="00456496" officeooo:paragraph-rsid="00456496"/>
    </style:style>
    <style:style style:name="P164" style:family="paragraph" style:parent-style-name="Text_20_body">
      <style:text-properties fo:font-weight="bold" officeooo:rsid="00456496" officeooo:paragraph-rsid="00456496" style:font-weight-asian="bold" style:font-weight-complex="bold"/>
    </style:style>
    <style:style style:name="P165" style:family="paragraph" style:parent-style-name="Text_20_body">
      <style:text-properties fo:font-weight="normal" officeooo:rsid="00456496" officeooo:paragraph-rsid="00456496" style:font-weight-asian="normal" style:font-weight-complex="normal"/>
    </style:style>
    <style:style style:name="P166" style:family="paragraph" style:parent-style-name="Standard">
      <style:text-properties style:font-name="Liberation Mono" officeooo:rsid="0032f1eb" officeooo:paragraph-rsid="00456496" style:font-name-asian="Liberation Mono" style:font-name-complex="Liberation Mono"/>
    </style:style>
    <style:style style:name="P167" style:family="paragraph" style:parent-style-name="Standard">
      <style:text-properties officeooo:paragraph-rsid="00456496"/>
    </style:style>
    <style:style style:name="P168" style:family="paragraph" style:parent-style-name="Text_20_body">
      <style:text-properties fo:font-weight="normal" officeooo:rsid="003c4ee5" officeooo:paragraph-rsid="0041baab" style:font-weight-asian="normal" style:font-weight-complex="normal"/>
    </style:style>
    <style:style style:name="P169" style:family="paragraph" style:parent-style-name="Text_20_body" style:list-style-name="L12">
      <style:paragraph-properties fo:margin-top="0cm" fo:margin-bottom="0cm" style:contextual-spacing="false" fo:line-height="138%" fo:padding="0cm" fo:border="none"/>
      <style:text-properties officeooo:rsid="003c2508" officeooo:paragraph-rsid="0041baab" style:font-weight-asian="normal" style:font-weight-complex="normal"/>
    </style:style>
    <style:style style:name="P170" style:family="paragraph" style:parent-style-name="Text_20_body" style:list-style-name="L12">
      <style:paragraph-properties fo:margin-top="0cm" fo:margin-bottom="0cm" style:contextual-spacing="false" fo:line-height="138%" fo:padding="0cm" fo:border="none"/>
      <style:text-properties fo:font-weight="normal" officeooo:rsid="003c4ee5" officeooo:paragraph-rsid="0041baab" style:font-weight-asian="normal" style:font-weight-complex="normal"/>
    </style:style>
    <style:style style:name="P171" style:family="paragraph" style:parent-style-name="Text_20_body" style:list-style-name="L12">
      <style:paragraph-properties fo:margin-top="0cm" fo:margin-bottom="0cm" style:contextual-spacing="false" fo:line-height="138%" fo:padding="0cm" fo:border="none"/>
      <style:text-properties officeooo:paragraph-rsid="0041baab"/>
    </style:style>
    <style:style style:name="P172" style:family="paragraph" style:parent-style-name="Text_20_body">
      <style:text-properties fo:font-weight="normal" officeooo:rsid="003adcfa" officeooo:paragraph-rsid="0041baab" style:font-weight-asian="normal" style:font-weight-complex="normal"/>
    </style:style>
    <style:style style:name="P173" style:family="paragraph" style:parent-style-name="Text_20_body">
      <style:text-properties officeooo:paragraph-rsid="00403d8a"/>
    </style:style>
    <style:style style:name="P174"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rsid="003adcfa" officeooo:paragraph-rsid="0032f1eb"/>
    </style:style>
    <style:style style:name="P175" style:family="paragraph" style:parent-style-name="Text_20_body">
      <style:text-properties officeooo:rsid="003adcfa" officeooo:paragraph-rsid="003adcfa"/>
    </style:style>
    <style:style style:name="P176" style:family="paragraph" style:parent-style-name="Text_20_body" style:list-style-name="L1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8f274" style:text-blinking="false" fo:background-color="transparent"/>
    </style:style>
    <style:style style:name="P177" style:family="paragraph" style:parent-style-name="Heading_20_2">
      <style:text-properties officeooo:rsid="00179b5c" officeooo:paragraph-rsid="00179b5c"/>
    </style:style>
    <style:style style:name="P178"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179" style:family="paragraph" style:parent-style-name="Text_20_body">
      <style:text-properties fo:font-weight="normal" officeooo:rsid="0011e368"/>
    </style:style>
    <style:style style:name="P180" style:family="paragraph" style:parent-style-name="Heading_20_2" style:list-style-name="L15">
      <loext:graphic-properties draw:fill="none" draw:fill-color="#ffffff"/>
      <style:paragraph-properties fo:margin-left="0cm" fo:margin-right="0cm" fo:margin-top="0.35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181" style:family="paragraph" style:parent-style-name="Text_20_body">
      <style:paragraph-properties fo:margin-left="0cm" fo:margin-right="0cm" fo:margin-top="0cm" fo:margin-bottom="0cm" style:contextual-spacing="false" fo:line-height="138%" fo:text-indent="0cm" style:auto-text-indent="false" style:writing-mode="lr-tb"/>
      <style:text-properties fo:font-weight="normal" officeooo:rsid="0011e368"/>
    </style:style>
    <style:style style:name="P182" style:family="paragraph" style:parent-style-name="Text_20_body">
      <style:paragraph-properties fo:margin-left="1.27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183" style:family="paragraph" style:parent-style-name="Heading_20_2" style:list-style-name="L16">
      <style:paragraph-properties fo:margin-left="0cm" fo:text-indent="0cm" style:auto-text-indent="false"/>
    </style:style>
    <style:style style:name="P184" style:family="paragraph" style:parent-style-name="Text_20_body">
      <style:text-properties officeooo:paragraph-rsid="0018f274"/>
    </style:style>
    <style:style style:name="P185" style:family="paragraph" style:parent-style-name="Heading_20_2" style:list-style-name="L17">
      <loext:graphic-properties draw:fill="none" draw:fill-color="#ffffff"/>
      <style:paragraph-properties fo:margin-left="1.199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186" style:family="paragraph" style:parent-style-name="Heading_20_2" style:list-style-name="L18">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187" style:family="paragraph" style:parent-style-name="Heading_20_3" style:list-style-name="L18">
      <loext:graphic-properties draw:fill="none" draw:fill-color="#ffffff"/>
      <style:paragraph-properties fo:margin-left="0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88" style:family="paragraph" style:parent-style-name="Heading_20_3" style:list-style-name="L19">
      <loext:graphic-properties draw:fill="none" draw:fill-color="#ffffff"/>
      <style:paragraph-properties fo:margin-left="0.73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89" style:family="paragraph" style:parent-style-name="Heading_20_3" style:list-style-name="L19">
      <loext:graphic-properties draw:fill="none" draw:fill-color="#ffffff"/>
      <style:paragraph-properties fo:margin-left="0.73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0" style:family="paragraph" style:parent-style-name="Heading_20_3" style:list-style-name="L19">
      <loext:graphic-properties draw:fill="none" draw:fill-color="#ffffff"/>
      <style:paragraph-properties fo:margin-left="0.73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1" style:family="paragraph" style:parent-style-name="Heading_20_1" style:list-style-name="L20">
      <loext:graphic-properties draw:fill="none" draw:fill-color="#ffffff"/>
      <style:paragraph-properties fo:margin-left="0cm" fo:margin-right="0cm" fo:margin-top="0.706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20pt" fo:font-style="normal" style:text-underline-style="none" fo:font-weight="normal" officeooo:rsid="0011e368" style:text-blinking="false" fo:background-color="transparent"/>
    </style:style>
    <style:style style:name="P192" style:family="paragraph" style:parent-style-name="Heading_20_1" style:list-style-name="">
      <loext:graphic-properties draw:fill="none" draw:fill-color="#ffffff"/>
      <style:paragraph-properties fo:margin-left="0cm" fo:margin-right="0cm" fo:margin-top="0.706cm" fo:margin-bottom="0cm" style:contextual-spacing="false" fo:line-height="138%"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3" fo:font-size="20pt" fo:font-style="normal" style:text-underline-style="none" fo:font-weight="normal" officeooo:rsid="0011e368" style:text-blinking="false" fo:background-color="transparent"/>
    </style:style>
    <style:style style:name="P193" style:family="paragraph" style:parent-style-name="Heading_20_2" style:list-style-name="L20">
      <loext:graphic-properties draw:fill="none" draw:fill-color="#ffffff"/>
      <style:paragraph-properties fo:margin-left="1.199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194" style:family="paragraph" style:parent-style-name="Heading_20_3" style:list-style-name="L20">
      <loext:graphic-properties draw:fill="none" draw:fill-color="#ffffff"/>
      <style:paragraph-properties fo:margin-left="0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5" style:family="paragraph" style:parent-style-name="Heading_20_3" style:list-style-name="L21">
      <loext:graphic-properties draw:fill="none" draw:fill-color="#ffffff"/>
      <style:paragraph-properties fo:margin-left="0.73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6" style:family="paragraph" style:parent-style-name="Heading_20_3" style:list-style-name="L21">
      <loext:graphic-properties draw:fill="none" draw:fill-color="#ffffff"/>
      <style:paragraph-properties fo:margin-left="0.73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7" style:family="paragraph" style:parent-style-name="Heading_20_3" style:list-style-name="L21">
      <loext:graphic-properties draw:fill="none" draw:fill-color="#ffffff"/>
      <style:paragraph-properties fo:margin-left="0.73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8" style:family="paragraph" style:parent-style-name="Text_20_body">
      <style:paragraph-properties fo:margin-left="0.73cm" fo:margin-right="0cm" fo:text-indent="0cm" style:auto-text-indent="false"/>
      <style:text-properties officeooo:rsid="0011e368"/>
    </style:style>
    <style:style style:name="P199" style:family="paragraph" style:parent-style-name="Text_20_body">
      <style:paragraph-properties fo:margin-left="2.371cm" fo:margin-right="0cm" fo:text-indent="-1.101cm" style:auto-text-indent="false"/>
      <style:text-properties officeooo:rsid="0011e368"/>
    </style:style>
    <style:style style:name="P200" style:family="paragraph" style:parent-style-name="Heading_20_2" style:list-style-name="L22">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201" style:family="paragraph" style:parent-style-name="Text_20_body">
      <style:paragraph-properties fo:margin-left="0.365cm" fo:margin-right="0cm" fo:text-indent="0cm" style:auto-text-indent="false"/>
      <style:text-properties officeooo:rsid="0011e368"/>
    </style:style>
    <style:style style:name="P202" style:family="paragraph" style:parent-style-name="Heading_20_2" style:list-style-name="L23">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203" style:family="paragraph" style:parent-style-name="Heading_20_2" style:list-style-name="L24">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204" style:family="paragraph" style:parent-style-name="Heading_20_1" style:list-style-name="L25">
      <loext:graphic-properties draw:fill="none" draw:fill-color="#ffffff"/>
      <style:paragraph-properties fo:margin-left="1.101cm" fo:margin-right="0cm" fo:margin-top="0.706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20pt" fo:font-style="normal" style:text-underline-style="none" fo:font-weight="normal" officeooo:rsid="0011e368" style:text-blinking="false" fo:background-color="transparent"/>
    </style:style>
    <style:style style:name="P205" style:family="paragraph" style:parent-style-name="Heading_20_2" style:list-style-name="L25">
      <loext:graphic-properties draw:fill="none" draw:fill-color="#ffffff"/>
      <style:paragraph-properties fo:margin-left="1.199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206" style:family="paragraph" style:parent-style-name="Heading_20_1" style:list-style-name="L26">
      <loext:graphic-properties draw:fill="none" draw:fill-color="#ffffff"/>
      <style:paragraph-properties fo:margin-left="0cm" fo:margin-right="0cm" fo:margin-top="0.706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20pt" fo:font-style="normal" style:text-underline-style="none" fo:font-weight="normal" officeooo:rsid="0011e368" style:text-blinking="false" fo:background-color="transparent"/>
    </style:style>
    <style:style style:name="P207" style:family="paragraph" style:parent-style-name="Text_20_body">
      <style:paragraph-properties fo:margin-top="0cm" fo:margin-bottom="0cm" style:contextual-spacing="false"/>
      <style:text-properties officeooo:rsid="0011e368"/>
    </style:style>
    <style:style style:name="P208"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style:text-blinking="false" fo:background-color="transparent"/>
    </style:style>
    <style:style style:name="P209" style:family="paragraph" style:parent-style-name="Table_20_Contents">
      <style:paragraph-properties fo:margin-left="0cm" fo:margin-right="0cm" fo:margin-top="0cm" fo:margin-bottom="0cm" style:contextual-spacing="false" fo:line-height="138%" fo:text-align="right"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style:text-blinking="false" fo:background-color="transparent"/>
    </style:style>
    <style:style style:name="P210"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style:text-blinking="false" fo:background-color="transparent"/>
    </style:style>
    <style:style style:name="P211" style:family="paragraph" style:parent-style-name="Table_20_Contents">
      <style:paragraph-properties fo:margin-left="0cm" fo:margin-right="0cm" fo:margin-top="0cm" fo:margin-bottom="0cm" style:contextual-spacing="false" fo:line-height="138%" fo:text-align="right"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style:text-blinking="false" fo:background-color="transparent"/>
    </style:style>
    <style:style style:name="P212" style:family="paragraph" style:parent-style-name="Table_20_Contents">
      <style:paragraph-properties fo:margin-left="0cm" fo:margin-right="0cm" fo:text-indent="0cm" style:auto-text-indent="false"/>
    </style:style>
    <style:style style:name="P213" style:family="paragraph" style:parent-style-name="Heading_20_2" style:list-style-name="L27">
      <loext:graphic-properties draw:fill="none" draw:fill-color="#ffffff"/>
      <style:paragraph-properties fo:margin-left="1.679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214" style:family="paragraph" style:parent-style-name="Text_20_body">
      <style:paragraph-properties fo:margin-left="0.48cm" fo:margin-right="0cm" fo:margin-top="0cm" fo:margin-bottom="0cm" style:contextual-spacing="false" fo:text-indent="0cm" style:auto-text-indent="false"/>
      <style:text-properties officeooo:rsid="0011e368"/>
    </style:style>
    <style:style style:name="P215" style:family="paragraph" style:parent-style-name="Heading_20_1" style:list-style-name="L28">
      <loext:graphic-properties draw:fill="none" draw:fill-color="#ffffff"/>
      <style:paragraph-properties fo:margin-left="1.101cm" fo:margin-right="0cm" fo:margin-top="0.706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20pt" fo:font-style="normal" style:text-underline-style="none" fo:font-weight="normal" officeooo:rsid="0011e368" style:text-blinking="false" fo:background-color="transparent"/>
    </style:style>
    <style:style style:name="P216" style:family="paragraph" style:parent-style-name="Heading_20_1">
      <style:paragraph-properties fo:margin-left="0cm" fo:text-indent="0cm" style:auto-text-indent="false" fo:break-before="page"/>
      <style:text-properties officeooo:rsid="00179b5c" officeooo:paragraph-rsid="00179b5c"/>
    </style:style>
    <style:style style:name="P217" style:family="paragraph" style:parent-style-name="Text_20_body">
      <style:paragraph-properties fo:margin-left="0cm" fo:margin-right="0cm" fo:margin-top="0.423cm" fo:margin-bottom="0.423cm" style:contextual-spacing="false" fo:line-height="138%" fo:text-indent="0cm" style:auto-text-indent="false" style:writing-mode="lr-tb"/>
      <style:text-properties officeooo:paragraph-rsid="00179b5c"/>
    </style:style>
    <style:style style:name="P218"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weight="normal" officeooo:rsid="0011e368" officeooo:paragraph-rsid="00179b5c"/>
    </style:style>
    <style:style style:name="P219"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79b5c" style:text-blinking="false" fo:background-color="transparent"/>
    </style:style>
    <style:style style:name="P220"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8f274" style:text-blinking="false" fo:background-color="transparent"/>
    </style:style>
    <style:style style:name="P221" style:family="paragraph" style:parent-style-name="Heading_20_2" style:list-style-name="L29">
      <loext:graphic-properties draw:fill="none" draw:fill-color="#ffffff"/>
      <style:paragraph-properties fo:margin-left="1.93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a817f" style:text-blinking="false" fo:background-color="transparent"/>
    </style:style>
    <style:style style:name="P222" style:family="paragraph" style:parent-style-name="Heading_20_3" style:list-style-name="L30">
      <loext:graphic-properties draw:fill="none" draw:fill-color="#ffffff"/>
      <style:paragraph-properties fo:margin-left="0.981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2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a817f" style:text-blinking="false" fo:background-color="transparent"/>
    </style:style>
    <style:style style:name="P224" style:family="paragraph" style:parent-style-name="Heading_20_3" style:list-style-name="L31">
      <loext:graphic-properties draw:fill="none" draw:fill-color="#ffffff"/>
      <style:paragraph-properties fo:margin-left="1.229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25" style:family="paragraph" style:parent-style-name="Text_20_body">
      <style:text-properties officeooo:rsid="0011e368" officeooo:paragraph-rsid="001a817f"/>
    </style:style>
    <style:style style:name="P226" style:family="paragraph" style:parent-style-name="Heading_20_3" style:list-style-name="L32">
      <loext:graphic-properties draw:fill="none" draw:fill-color="#ffffff"/>
      <style:paragraph-properties fo:margin-left="1.229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27" style:family="paragraph" style:parent-style-name="Text_20_body">
      <style:paragraph-properties fo:margin-left="0cm" fo:margin-right="0cm" fo:margin-top="0cm" fo:margin-bottom="0cm" style:contextual-spacing="false" fo:line-height="138%" fo:text-indent="0cm" style:auto-text-indent="false" style:writing-mode="lr-tb"/>
      <style:text-properties fo:font-weight="normal" officeooo:rsid="0011e368" officeooo:paragraph-rsid="001a817f"/>
    </style:style>
    <style:style style:name="P228"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rsid="0011e368" officeooo:paragraph-rsid="001a817f"/>
    </style:style>
    <style:style style:name="P22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officeooo:rsid="0011e368" officeooo:paragraph-rsid="001a817f" style:text-blinking="false" fo:background-color="transparent"/>
    </style:style>
    <style:style style:name="P230" style:family="paragraph" style:parent-style-name="Heading_20_3" style:list-style-name="L33">
      <loext:graphic-properties draw:fill="none" draw:fill-color="#ffffff"/>
      <style:paragraph-properties fo:margin-left="1.229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31" style:family="paragraph" style:parent-style-name="Heading_20_3" style:list-style-name="L34">
      <loext:graphic-properties draw:fill="none" draw:fill-color="#ffffff"/>
      <style:paragraph-properties fo:margin-left="0.73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32" style:family="paragraph" style:parent-style-name="Heading_20_3" style:list-style-name="L35">
      <loext:graphic-properties draw:fill="none" draw:fill-color="#ffffff"/>
      <style:paragraph-properties fo:margin-left="0.73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33" style:family="paragraph" style:parent-style-name="Text_20_body">
      <style:paragraph-properties fo:margin-left="0.73cm" fo:margin-right="0cm" fo:margin-top="0cm" fo:margin-bottom="0cm" style:contextual-spacing="false" fo:text-indent="0cm" style:auto-text-indent="false"/>
      <style:text-properties officeooo:rsid="0011e368" officeooo:paragraph-rsid="001a817f"/>
    </style:style>
    <style:style style:name="P234" style:family="paragraph" style:parent-style-name="Table_20_Heading">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officeooo:paragraph-rsid="001a817f" style:text-blinking="false" fo:background-color="transparent"/>
    </style:style>
    <style:style style:name="P235" style:family="paragraph" style:parent-style-name="Table_20_Heading">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officeooo:paragraph-rsid="001a817f" style:text-blinking="false" fo:background-color="transparent"/>
    </style:style>
    <style:style style:name="P236" style:family="paragraph" style:parent-style-name="Table_20_Heading">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officeooo:paragraph-rsid="001a817f" style:text-blinking="false" fo:background-color="transparent"/>
    </style:style>
    <style:style style:name="P237" style:family="paragraph" style:parent-style-name="Table_20_Heading">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officeooo:paragraph-rsid="001a817f" style:text-blinking="false" fo:background-color="transparent"/>
    </style:style>
    <style:style style:name="P238" style:family="paragraph" style:parent-style-name="Table_20_Heading">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a817f" style:text-blinking="false" fo:background-color="transparent"/>
    </style:style>
    <style:style style:name="P239" style:family="paragraph" style:parent-style-name="Table_20_Heading">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a817f" style:text-blinking="false" fo:background-color="transparent"/>
    </style:style>
    <style:style style:name="P240"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11e368" officeooo:paragraph-rsid="001a817f" style:text-blinking="false" fo:background-color="transparent"/>
    </style:style>
    <style:style style:name="P241" style:family="paragraph" style:parent-style-name="Table_20_Contents">
      <style:paragraph-properties fo:margin-left="0cm" fo:margin-right="0cm" fo:text-indent="0cm" style:auto-text-indent="false"/>
      <style:text-properties officeooo:paragraph-rsid="001a817f"/>
    </style:style>
    <style:style style:name="P242"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11e368" officeooo:paragraph-rsid="001a817f" style:text-blinking="false" fo:background-color="transparent"/>
    </style:style>
    <style:style style:name="P243" style:family="paragraph" style:parent-style-name="Heading_20_2" style:list-style-name="L36">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officeooo:paragraph-rsid="001a817f" style:text-blinking="false" fo:background-color="transparent"/>
    </style:style>
    <style:style style:name="P244" style:family="paragraph" style:parent-style-name="Heading_20_3" style:list-style-name="L36">
      <loext:graphic-properties draw:fill="none" draw:fill-color="#ffffff"/>
      <style:paragraph-properties fo:margin-left="0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45" style:family="paragraph" style:parent-style-name="Heading_20_2" style:list-style-name="L37">
      <loext:graphic-properties draw:fill="none" draw:fill-color="#ffffff"/>
      <style:paragraph-properties fo:margin-left="1.93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46" style:family="paragraph" style:parent-style-name="Heading_20_2" style:list-style-name="L38">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officeooo:paragraph-rsid="001a817f" style:text-blinking="false" fo:background-color="transparent"/>
    </style:style>
    <style:style style:name="P247" style:family="paragraph" style:parent-style-name="Heading_20_3" style:list-style-name="L38">
      <loext:graphic-properties draw:fill="none" draw:fill-color="#ffffff"/>
      <style:paragraph-properties fo:margin-left="0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48" style:family="paragraph" style:parent-style-name="Heading_20_3" style:list-style-name="L39">
      <loext:graphic-properties draw:fill="none" draw:fill-color="#ffffff"/>
      <style:paragraph-properties fo:margin-left="0.73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49" style:family="paragraph" style:parent-style-name="Heading_20_3" style:list-style-name="L39">
      <loext:graphic-properties draw:fill="none" draw:fill-color="#ffffff"/>
      <style:paragraph-properties fo:margin-left="0.73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50" style:family="paragraph" style:parent-style-name="Heading_20_1">
      <style:paragraph-properties fo:break-before="page"/>
      <style:text-properties officeooo:rsid="001a817f" officeooo:paragraph-rsid="001a817f"/>
    </style:style>
    <style:style style:name="P251" style:family="paragraph" style:parent-style-name="Text_20_body">
      <style:text-properties officeooo:paragraph-rsid="001a817f"/>
    </style:style>
    <style:style style:name="P252" style:family="paragraph" style:parent-style-name="Heading_20_2" style:list-style-name="L29">
      <loext:graphic-properties draw:fill="none" draw:fill-color="#ffffff"/>
      <style:paragraph-properties fo:margin-left="1.93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8f274" style:text-blinking="false" fo:background-color="transparent"/>
    </style:style>
    <style:style style:name="P253" style:family="paragraph" style:parent-style-name="Heading_20_2" style:list-style-name="L40">
      <loext:graphic-properties draw:fill="none" draw:fill-color="#ffffff"/>
      <style:paragraph-properties fo:margin-left="0.464cm" fo:margin-right="0cm" fo:margin-top="0.35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officeooo:paragraph-rsid="0018f274" style:text-blinking="false" fo:background-color="transparent"/>
    </style:style>
    <style:style style:name="P254" style:family="paragraph" style:parent-style-name="Heading_20_3" style:list-style-name="L40">
      <loext:graphic-properties draw:fill="none" draw:fill-color="#ffffff"/>
      <style:paragraph-properties fo:margin-left="0cm" fo:margin-right="0cm" fo:margin-top="0cm" fo:margin-bottom="0.141cm" style:contextual-spacing="false" fo:line-height="138%" fo:text-indent="0cm" style:auto-text-indent="false" fo:background-color="transparent" fo:padding="0cm" fo:border="none" style:writing-mode="lr-tb"/>
      <style:text-properties officeooo:rsid="0011e368" officeooo:paragraph-rsid="0018f274"/>
    </style:style>
    <style:style style:name="P255" style:family="paragraph" style:parent-style-name="Text_20_body">
      <loext:graphic-properties draw:fill="none" draw:fill-color="#ffffff"/>
      <style:paragraph-properties fo:margin-left="0cm" fo:margin-right="0cm" fo:margin-top="0cm" fo:margin-bottom="0.141cm" style:contextual-spacing="false" fo:line-height="138%" fo:text-indent="0cm" style:auto-text-indent="false" fo:break-before="page" fo:background-color="transparent" fo:padding="0cm" fo:border="none" style:writing-mode="lr-tb"/>
      <style:text-properties style:font-name="DS-Digital" officeooo:rsid="0047d737" officeooo:paragraph-rsid="0047d737"/>
    </style:style>
    <style:style style:name="T1" style:family="text">
      <style:text-properties officeooo:rsid="00179b5c"/>
    </style:style>
    <style:style style:name="T2" style:family="text">
      <style:text-properties officeooo:rsid="00494ed0"/>
    </style:style>
    <style:style style:name="T3" style:family="text">
      <style:text-properties fo:font-variant="normal" fo:text-transform="none" fo:color="#1155cc" loext:opacity="100%" style:text-line-through-style="none" style:text-line-through-type="none" style:font-name="Arial3" fo:font-size="11pt" fo:font-style="normal" style:text-underline-style="solid" style:text-underline-width="auto" style:text-underline-color="font-color" fo:font-weight="normal" style:text-blinking="false" fo:background-color="transparent" loext:char-shading-value="0"/>
    </style:style>
    <style:style style:name="T4" style:family="text">
      <style:text-properties officeooo:rsid="001a817f"/>
    </style:style>
    <style:style style:name="T5" style:family="text">
      <style:text-properties officeooo:rsid="001b13f1"/>
    </style:style>
    <style:style style:name="T6" style:family="text">
      <style:text-properties fo:font-weight="normal"/>
    </style:style>
    <style:style style:name="T7" style:family="text">
      <style:text-properties officeooo:rsid="001bac66"/>
    </style:style>
    <style:style style:name="T8" style:family="text">
      <style:text-properties officeooo:rsid="001e7b80"/>
    </style:style>
    <style:style style:name="T9" style:family="text">
      <style:text-properties officeooo:rsid="001c0564"/>
    </style:style>
    <style:style style:name="T10" style:family="text">
      <style:text-properties officeooo:rsid="002bfa7c"/>
    </style:style>
    <style:style style:name="T11" style:family="text">
      <style:text-properties officeooo:rsid="00236da7"/>
    </style:style>
    <style:style style:name="T12" style:family="text">
      <style:text-properties style:font-name="Arial1" fo:font-size="11pt" fo:font-weight="normal" style:font-size-asian="11pt" style:font-weight-asian="normal" style:font-size-complex="11pt" style:font-weight-complex="normal"/>
    </style:style>
    <style:style style:name="T13" style:family="text">
      <style:text-properties officeooo:rsid="002bfefd"/>
    </style:style>
    <style:style style:name="T14" style:family="text">
      <style:text-properties officeooo:rsid="00264ffe"/>
    </style:style>
    <style:style style:name="T15" style:family="text">
      <style:text-properties officeooo:rsid="00391d8e"/>
    </style:style>
    <style:style style:name="T16" style:family="text">
      <style:text-properties officeooo:rsid="002cd205"/>
    </style:style>
    <style:style style:name="T17" style:family="text">
      <style:text-properties officeooo:rsid="002ed049"/>
    </style:style>
    <style:style style:name="T18" style:family="text">
      <style:text-properties officeooo:rsid="0030b5d9"/>
    </style:style>
    <style:style style:name="T19" style:family="text">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3" fo:font-size="11pt" fo:font-style="normal" style:text-underline-style="none" fo:font-weight="normal" officeooo:rsid="0030b5d9"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3" fo:font-size="11pt" fo:font-style="normal" style:text-underline-style="none" fo:font-weight="normal" officeooo:rsid="00319213"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3" fo:font-size="11pt" fo:font-style="normal" style:text-underline-style="none" fo:font-weight="normal" officeooo:rsid="0031ddb5" style:text-blinking="false" fo:background-color="transparent" loext:char-shading-value="0"/>
    </style:style>
    <style:style style:name="T23" style:family="text">
      <style:text-properties officeooo:rsid="0031ddb5"/>
    </style:style>
    <style:style style:name="T24" style:family="text">
      <style:text-properties officeooo:rsid="003adcfa"/>
    </style:style>
    <style:style style:name="T25" style:family="text">
      <style:text-properties officeooo:rsid="0034e408"/>
    </style:style>
    <style:style style:name="T26" style:family="text">
      <style:text-properties officeooo:rsid="003c2508"/>
    </style:style>
    <style:style style:name="T27" style:family="text">
      <style:text-properties fo:font-weight="bold" style:font-weight-asian="bold" style:font-weight-complex="bold"/>
    </style:style>
    <style:style style:name="T28" style:family="text">
      <style:text-properties fo:font-weight="bold" officeooo:rsid="003adcfa" style:font-weight-asian="bold" style:font-weight-complex="bold"/>
    </style:style>
    <style:style style:name="T29" style:family="text">
      <style:text-properties fo:font-weight="bold" officeooo:rsid="00364a3c" style:font-weight-asian="bold" style:font-weight-complex="bold"/>
    </style:style>
    <style:style style:name="T30" style:family="text">
      <style:text-properties fo:font-weight="bold" officeooo:rsid="00434475" style:font-weight-asian="bold" style:font-weight-complex="bold"/>
    </style:style>
    <style:style style:name="T31" style:family="text">
      <style:text-properties style:font-name="Liberation Mono" style:font-name-asian="Liberation Mono" style:font-name-complex="Liberation Mono"/>
    </style:style>
    <style:style style:name="T32" style:family="text">
      <style:text-properties style:font-name-asian="Liberation Mono" style:font-name-complex="Liberation Mono"/>
    </style:style>
    <style:style style:name="T33" style:family="text">
      <style:text-properties officeooo:rsid="00434475" style:font-name-asian="Liberation Mono" style:font-name-complex="Liberation Mono"/>
    </style:style>
    <style:style style:name="T34" style:family="text">
      <style:text-properties officeooo:rsid="0034e408" style:font-name-asian="Liberation Mono" style:font-name-complex="Liberation Mono"/>
    </style:style>
    <style:style style:name="T35" style:family="text">
      <style:text-properties officeooo:rsid="00364a3c" style:font-name-asian="Liberation Mono" style:font-name-complex="Liberation Mono"/>
    </style:style>
    <style:style style:name="T36" style:family="text">
      <style:text-properties officeooo:rsid="00352395" style:font-name-asian="Liberation Mono" style:font-name-complex="Liberation Mono"/>
    </style:style>
    <style:style style:name="T37" style:family="text">
      <style:text-properties officeooo:rsid="00434475"/>
    </style:style>
    <style:style style:name="T38" style:family="text">
      <style:text-properties style:font-name="Liberation Mono" officeooo:rsid="003c2508" style:font-name-asian="Liberation Mono" style:font-name-complex="Liberation Mono"/>
    </style:style>
    <style:style style:name="T39" style:family="text">
      <style:text-properties style:font-name="Liberation Mono" officeooo:rsid="00364a3c" style:font-name-asian="Liberation Mono" style:font-name-complex="Liberation Mono"/>
    </style:style>
    <style:style style:name="T40" style:family="text">
      <style:text-properties style:font-name="Liberation Mono" officeooo:rsid="0034e408" style:font-name-asian="Liberation Mono" style:font-name-complex="Liberation Mono"/>
    </style:style>
    <style:style style:name="T41" style:family="text">
      <style:text-properties style:font-name="Liberation Mono" officeooo:rsid="00434475" style:font-name-asian="Liberation Mono" style:font-name-complex="Liberation Mono"/>
    </style:style>
    <style:style style:name="T42" style:family="text">
      <style:text-properties style:font-name="Liberation Mono" officeooo:rsid="004475ac" style:font-name-asian="Liberation Mono" style:font-name-complex="Liberation Mono"/>
    </style:style>
    <style:style style:name="T43" style:family="text">
      <style:text-properties style:font-name="Liberation Mono" officeooo:rsid="00352395" style:font-name-asian="Liberation Mono" style:font-name-complex="Liberation Mono"/>
    </style:style>
    <style:style style:name="T44" style:family="text">
      <style:text-properties style:font-name="Liberation Mono" officeooo:rsid="00448dab" style:font-name-asian="Liberation Mono" style:font-name-complex="Liberation Mono"/>
    </style:style>
    <style:style style:name="T45" style:family="text">
      <style:text-properties officeooo:rsid="003c8f62"/>
    </style:style>
    <style:style style:name="T46" style:family="text">
      <style:text-properties officeooo:rsid="003c2508" style:font-weight-asian="normal" style:font-weight-complex="normal"/>
    </style:style>
    <style:style style:name="T47" style:family="text">
      <style:text-properties fo:font-weight="normal" officeooo:rsid="003c4ee5" style:font-weight-asian="normal" style:font-weight-complex="normal"/>
    </style:style>
    <style:style style:name="T48" style:family="text">
      <style:text-properties fo:font-weight="normal" officeooo:rsid="003c8f62" style:font-weight-asian="normal" style:font-weight-complex="normal"/>
    </style:style>
    <style:style style:name="T49" style:family="text">
      <style:text-properties style:font-name="Liberation Mono" officeooo:rsid="003c4ee5" style:font-name-asian="Liberation Mono" style:font-name-complex="Liberation Mono"/>
    </style:style>
    <style:style style:name="T50" style:family="text">
      <style:text-properties style:font-name="Liberation Mono" officeooo:rsid="003adcfa" style:font-name-asian="Liberation Mono" style:font-name-complex="Liberation Mono"/>
    </style:style>
    <style:style style:name="T51" style:family="text">
      <style:text-properties style:font-name="Liberation Mono" fo:font-weight="normal" officeooo:rsid="0034e408" style:font-name-asian="Liberation Mono" style:font-weight-asian="normal" style:font-name-complex="Liberation Mono" style:font-weight-complex="normal"/>
    </style:style>
    <style:style style:name="T52" style:family="text">
      <style:text-properties style:font-name="Liberation Mono" fo:font-weight="normal" officeooo:rsid="003c4ee5" style:font-name-asian="Liberation Mono" style:font-weight-asian="normal" style:font-name-complex="Liberation Mono" style:font-weight-complex="normal"/>
    </style:style>
    <style:style style:name="T53" style:family="text">
      <style:text-properties fo:font-variant="normal" fo:text-transform="none" fo:color="#000000" loext:opacity="100%" style:text-line-through-style="none" style:text-line-through-type="none" style:font-name="Arial3" fo:font-size="11pt" fo:font-style="normal" style:text-underline-style="none" fo:font-weight="bold"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3" fo:font-size="11pt" fo:font-style="normal" style:text-underline-style="none" style:text-blinking="false" fo:background-color="transparent" loext:char-shading-value="0"/>
    </style:style>
    <style:style style:name="T56" style:family="text">
      <style:text-properties officeooo:rsid="0018f274"/>
    </style:style>
    <style:style style:name="T57" style:family="text">
      <style:text-properties fo:font-variant="normal" fo:text-transform="none" fo:color="#000000" loext:opacity="100%" style:text-line-through-style="none" style:text-line-through-type="none" style:font-name="Arial3" fo:font-size="11pt" fo:font-style="italic" style:text-underline-style="none" fo:font-weight="normal" officeooo:rsid="0011e368"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Arial3" fo:font-size="11pt" fo:font-style="italic" style:text-underline-style="none"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loext:char-shading-value="0"/>
    </style:style>
    <style:style style:name="T60" style:family="text">
      <style:text-properties style:font-name="Arial3" fo:font-size="11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1.90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2a6c47f-7fff-5177-5158-b3d0c11957f6"/><text:line-break/></text:p>
      <text:p text:style-name="P1"/>
      <text:p text:style-name="P2"/>
      <text:p text:style-name="P2"/>
      <text:p text:style-name="P2"/>
      <text:p text:style-name="P3">FRAXIS</text:p>
      <text:p text:style-name="P4">Five Row Arcade eXperience<text:line-break/>Interactive System</text:p>
      <text:p text:style-name="P5"/>
      <text:p text:style-name="P6"><draw:frame draw:style-name="fr1" draw:name="Afbeelding3 Kopiëren 1" text:anchor-type="char" svg:x="0cm" svg:y="-0.101cm" svg:width="17.59cm" svg:height="5.463cm" draw:z-index="2"><draw:image xlink:href="Pictures/10000001000003BC0000012983F0B177.png" xlink:type="simple" xlink:show="embed" xlink:actuate="onLoad" draw:mime-type="image/png"/></draw:frame><text:span text:style-name="T1">v</text:span>0.<text:span text:style-name="T2">11</text:span></text:p>
      <text:p text:style-name="P7"/>
      <text:p text:style-name="P7">Created by Michel Keijzers</text:p>
      <text:p text:style-name="P7">Date <text:span text:style-name="T2">July 7</text:span>, 2026</text:p>
      <text:p text:style-name="P8"/>
      <text:p text:style-name="P9">Table of Content</text:p>
      <text:p text:style-name="P10"><text:a xlink:type="simple" xlink:href="https://docs.google.com/document/d/1huFCTBTo_V-qLagU39WpXXM1eQROCzyZlzvM63dEwec/edit?tab=t.0#heading=h.nej4k5woo2py" text:style-name="Internet_20_link" text:visited-style-name="Visited_20_Internet_20_Link"><text:span text:style-name="T3">1. Introduction</text:span></text:a></text:p>
      <text:p text:style-name="P10"><text:a xlink:type="simple" xlink:href="https://docs.google.com/document/d/1huFCTBTo_V-qLagU39WpXXM1eQROCzyZlzvM63dEwec/edit?tab=t.0#heading=h.xfrw33nnenie" text:style-name="Internet_20_link" text:visited-style-name="Visited_20_Internet_20_Link"><text:span text:style-name="T3">2. Device</text:span></text:a></text:p>
      <text:p text:style-name="P10"><text:a xlink:type="simple" xlink:href="https://docs.google.com/document/d/1huFCTBTo_V-qLagU39WpXXM1eQROCzyZlzvM63dEwec/edit?tab=t.0#heading=h.dfi2llugides" text:style-name="Internet_20_link" text:visited-style-name="Visited_20_Internet_20_Link"><text:span text:style-name="T3">3. Electrical</text:span></text:a></text:p>
      <text:p text:style-name="P10"><text:a xlink:type="simple" xlink:href="https://docs.google.com/document/d/1huFCTBTo_V-qLagU39WpXXM1eQROCzyZlzvM63dEwec/edit?tab=t.0#heading=h.rg0lg3iy3as1" text:style-name="Internet_20_link" text:visited-style-name="Visited_20_Internet_20_Link"><text:span text:style-name="T3">4. Games</text:span></text:a></text:p>
      <text:p text:style-name="P11"><text:a xlink:type="simple" xlink:href="https://docs.google.com/document/d/1huFCTBTo_V-qLagU39WpXXM1eQROCzyZlzvM63dEwec/edit?tab=t.0#heading=h.a4xtfg3352v9" text:style-name="Internet_20_link" text:visited-style-name="Visited_20_Internet_20_Link"><text:span text:style-name="T3">4.1. Glossary</text:span></text:a></text:p>
      <text:p text:style-name="P11"><text:a xlink:type="simple" xlink:href="https://docs.google.com/document/d/1huFCTBTo_V-qLagU39WpXXM1eQROCzyZlzvM63dEwec/edit?tab=t.0#heading=h.hjda60xgc3ni" text:style-name="Internet_20_link" text:visited-style-name="Visited_20_Internet_20_Link"><text:span text:style-name="T3">4.2. Solo Games</text:span></text:a></text:p>
      <text:p text:style-name="P11"><text:a xlink:type="simple" xlink:href="https://docs.google.com/document/d/1huFCTBTo_V-qLagU39WpXXM1eQROCzyZlzvM63dEwec/edit?tab=t.0#heading=h.58sncj606l4g" text:style-name="Internet_20_link" text:visited-style-name="Visited_20_Internet_20_Link"><text:span text:style-name="T3">4.3. Two Player Games</text:span></text:a></text:p>
      <text:p text:style-name="P11"><text:a xlink:type="simple" xlink:href="https://docs.google.com/document/d/1huFCTBTo_V-qLagU39WpXXM1eQROCzyZlzvM63dEwec/edit?tab=t.0#heading=h.pbxu8n1xxlwf" text:style-name="Internet_20_link" text:visited-style-name="Visited_20_Internet_20_Link"><text:span text:style-name="T3">4.4. Both Solo/Two Player Games</text:span></text:a></text:p>
      <text:p text:style-name="P11"><text:a xlink:type="simple" xlink:href="https://docs.google.com/document/d/1huFCTBTo_V-qLagU39WpXXM1eQROCzyZlzvM63dEwec/edit?tab=t.0#heading=h.ijwod3g8ziap" text:style-name="Internet_20_link" text:visited-style-name="Visited_20_Internet_20_Link"><text:span text:style-name="T3">4.4.1. Pong</text:span></text:a></text:p>
      <text:p text:style-name="P12"><text:a xlink:type="simple" xlink:href="https://docs.google.com/document/d/1huFCTBTo_V-qLagU39WpXXM1eQROCzyZlzvM63dEwec/edit?tab=t.0#heading=h.2yxo4tunwww" text:style-name="Internet_20_link" text:visited-style-name="Visited_20_Internet_20_Link"><text:span text:style-name="T3">4.4.1.1. Description</text:span></text:a></text:p>
      <text:p text:style-name="P12"><text:a xlink:type="simple" xlink:href="https://docs.google.com/document/d/1huFCTBTo_V-qLagU39WpXXM1eQROCzyZlzvM63dEwec/edit?tab=t.0#heading=h.ib2c4sychqbq" text:style-name="Internet_20_link" text:visited-style-name="Visited_20_Internet_20_Link"><text:span text:style-name="T3">4.4.1.2. Game Rules</text:span></text:a></text:p>
      <text:p text:style-name="P12"><text:a xlink:type="simple" xlink:href="https://docs.google.com/document/d/1huFCTBTo_V-qLagU39WpXXM1eQROCzyZlzvM63dEwec/edit?tab=t.0#heading=h.e6enxkca9ubm" text:style-name="Internet_20_link" text:visited-style-name="Visited_20_Internet_20_Link"><text:span text:style-name="T3">4.4.1.3. Scoring</text:span></text:a></text:p>
      <text:p text:style-name="P12"><text:a xlink:type="simple" xlink:href="https://docs.google.com/document/d/1huFCTBTo_V-qLagU39WpXXM1eQROCzyZlzvM63dEwec/edit?tab=t.0#heading=h.vyeg088j5qzw" text:style-name="Internet_20_link" text:visited-style-name="Visited_20_Internet_20_Link"><text:span text:style-name="T3">4.4.1.4. UI</text:span></text:a></text:p>
      <text:p text:style-name="P12"><text:a xlink:type="simple" xlink:href="https://docs.google.com/document/d/1huFCTBTo_V-qLagU39WpXXM1eQROCzyZlzvM63dEwec/edit?tab=t.0#heading=h.wl9tnjbn38on" text:style-name="Internet_20_link" text:visited-style-name="Visited_20_Internet_20_Link"><text:span text:style-name="T3">4.4.2. Controls</text:span></text:a></text:p>
      <text:p text:style-name="P12"><text:a xlink:type="simple" xlink:href="https://docs.google.com/document/d/1huFCTBTo_V-qLagU39WpXXM1eQROCzyZlzvM63dEwec/edit?tab=t.0#heading=h.2ktgyylzzj3a" text:style-name="Internet_20_link" text:visited-style-name="Visited_20_Internet_20_Link"><text:span text:style-name="T3">4.4.3. Settings</text:span></text:a></text:p>
      <text:p text:style-name="P11"><text:a xlink:type="simple" xlink:href="https://docs.google.com/document/d/1huFCTBTo_V-qLagU39WpXXM1eQROCzyZlzvM63dEwec/edit?tab=t.0#heading=h.s1ki9gtouz6y" text:style-name="Internet_20_link" text:visited-style-name="Visited_20_Internet_20_Link"><text:span text:style-name="T3">4.5. SIMON MEMORY</text:span></text:a></text:p>
      <text:p text:style-name="P12"><text:a xlink:type="simple" xlink:href="https://docs.google.com/document/d/1huFCTBTo_V-qLagU39WpXXM1eQROCzyZlzvM63dEwec/edit?tab=t.0#heading=h.ee704zdlqokb" text:style-name="Internet_20_link" text:visited-style-name="Visited_20_Internet_20_Link"><text:span text:style-name="T3">4.5.1. Description</text:span></text:a></text:p>
      <text:p text:style-name="P12"><text:a xlink:type="simple" xlink:href="https://docs.google.com/document/d/1huFCTBTo_V-qLagU39WpXXM1eQROCzyZlzvM63dEwec/edit?tab=t.0#heading=h.22y2e3mu5g3k" text:style-name="Internet_20_link" text:visited-style-name="Visited_20_Internet_20_Link"><text:span text:style-name="T3">4.5.2. UI</text:span></text:a></text:p>
      <text:p text:style-name="P12"><text:a xlink:type="simple" xlink:href="https://docs.google.com/document/d/1huFCTBTo_V-qLagU39WpXXM1eQROCzyZlzvM63dEwec/edit?tab=t.0#heading=h.psca11foweqo" text:style-name="Internet_20_link" text:visited-style-name="Visited_20_Internet_20_Link"><text:span text:style-name="T3">4.5.3. Controls</text:span></text:a></text:p>
      <text:p text:style-name="P12"><text:a xlink:type="simple" xlink:href="https://docs.google.com/document/d/1huFCTBTo_V-qLagU39WpXXM1eQROCzyZlzvM63dEwec/edit?tab=t.0#heading=h.vno83fpz1plq" text:style-name="Internet_20_link" text:visited-style-name="Visited_20_Internet_20_Link"><text:span text:style-name="T3">4.5.4. Scoring</text:span></text:a></text:p>
      <text:p text:style-name="P12"><text:a xlink:type="simple" xlink:href="https://docs.google.com/document/d/1huFCTBTo_V-qLagU39WpXXM1eQROCzyZlzvM63dEwec/edit?tab=t.0#heading=h.jg67hbn0gg8" text:style-name="Internet_20_link" text:visited-style-name="Visited_20_Internet_20_Link"><text:span text:style-name="T3">4.5.5. Settings</text:span></text:a></text:p>
      <text:p text:style-name="P11"><text:a xlink:type="simple" xlink:href="https://docs.google.com/document/d/1huFCTBTo_V-qLagU39WpXXM1eQROCzyZlzvM63dEwec/edit?tab=t.0#heading=h.mj98b6c8c1m8" text:style-name="Internet_20_link" text:visited-style-name="Visited_20_Internet_20_Link"><text:span text:style-name="T3">4.6. REACTION SPEED</text:span></text:a></text:p>
      <text:p text:style-name="P12"><text:a xlink:type="simple" xlink:href="https://docs.google.com/document/d/1huFCTBTo_V-qLagU39WpXXM1eQROCzyZlzvM63dEwec/edit?tab=t.0#heading=h.d0l135w628hv" text:style-name="Internet_20_link" text:visited-style-name="Visited_20_Internet_20_Link"><text:span text:style-name="T3">4.6.1. Description</text:span></text:a></text:p>
      <text:p text:style-name="P12"><text:a xlink:type="simple" xlink:href="https://docs.google.com/document/d/1huFCTBTo_V-qLagU39WpXXM1eQROCzyZlzvM63dEwec/edit?tab=t.0#heading=h.qjzjutbaov2" text:style-name="Internet_20_link" text:visited-style-name="Visited_20_Internet_20_Link"><text:span text:style-name="T3">4.6.2. UI</text:span></text:a></text:p>
      <text:p text:style-name="P12"><text:a xlink:type="simple" xlink:href="https://docs.google.com/document/d/1huFCTBTo_V-qLagU39WpXXM1eQROCzyZlzvM63dEwec/edit?tab=t.0#heading=h.1ecfm321x3m" text:style-name="Internet_20_link" text:visited-style-name="Visited_20_Internet_20_Link"><text:span text:style-name="T3">4.6.3. Controls</text:span></text:a></text:p>
      <text:p text:style-name="P12"><text:a xlink:type="simple" xlink:href="https://docs.google.com/document/d/1huFCTBTo_V-qLagU39WpXXM1eQROCzyZlzvM63dEwec/edit?tab=t.0#heading=h.945i1ouc6s2c" text:style-name="Internet_20_link" text:visited-style-name="Visited_20_Internet_20_Link"><text:span text:style-name="T3">4.6.4. Scoring</text:span></text:a></text:p>
      <text:p text:style-name="P12"><text:a xlink:type="simple" xlink:href="https://docs.google.com/document/d/1huFCTBTo_V-qLagU39WpXXM1eQROCzyZlzvM63dEwec/edit?tab=t.0#heading=h.ad5pfq5myaww" text:style-name="Internet_20_link" text:visited-style-name="Visited_20_Internet_20_Link"><text:span text:style-name="T3">4.6.5. Settings</text:span></text:a></text:p>
      <text:p text:style-name="P11"><text:a xlink:type="simple" xlink:href="https://docs.google.com/document/d/1huFCTBTo_V-qLagU39WpXXM1eQROCzyZlzvM63dEwec/edit?tab=t.0#heading=h.rmt7ty1neky7" text:style-name="Internet_20_link" text:visited-style-name="Visited_20_Internet_20_Link"><text:span text:style-name="T3">4.7. Color Patterns</text:span></text:a></text:p>
      <text:p text:style-name="P12"><text:a xlink:type="simple" xlink:href="https://docs.google.com/document/d/1huFCTBTo_V-qLagU39WpXXM1eQROCzyZlzvM63dEwec/edit?tab=t.0#heading=h.8f5j4fx3f2gr" text:style-name="Internet_20_link" text:visited-style-name="Visited_20_Internet_20_Link"><text:span text:style-name="T3">4.7.1. Description</text:span></text:a></text:p>
      <text:p text:style-name="P12"><text:a xlink:type="simple" xlink:href="https://docs.google.com/document/d/1huFCTBTo_V-qLagU39WpXXM1eQROCzyZlzvM63dEwec/edit?tab=t.0#heading=h.mrf1hd8mjlf6" text:style-name="Internet_20_link" text:visited-style-name="Visited_20_Internet_20_Link"><text:span text:style-name="T3">4.7.2. UI</text:span></text:a></text:p>
      <text:p text:style-name="P12"><text:a xlink:type="simple" xlink:href="https://docs.google.com/document/d/1huFCTBTo_V-qLagU39WpXXM1eQROCzyZlzvM63dEwec/edit?tab=t.0#heading=h.xvqbw91ajktu" text:style-name="Internet_20_link" text:visited-style-name="Visited_20_Internet_20_Link"><text:span text:style-name="T3">4.7.3. Controls</text:span></text:a></text:p>
      <text:p text:style-name="P12"><text:a xlink:type="simple" xlink:href="https://docs.google.com/document/d/1huFCTBTo_V-qLagU39WpXXM1eQROCzyZlzvM63dEwec/edit?tab=t.0#heading=h.uv41rorcein5" text:style-name="Internet_20_link" text:visited-style-name="Visited_20_Internet_20_Link"><text:span text:style-name="T3">4.7.4. Scoring</text:span></text:a></text:p>
      <text:p text:style-name="P12"><text:a xlink:type="simple" xlink:href="https://docs.google.com/document/d/1huFCTBTo_V-qLagU39WpXXM1eQROCzyZlzvM63dEwec/edit?tab=t.0#heading=h.5perqdpijk4s" text:style-name="Internet_20_link" text:visited-style-name="Visited_20_Internet_20_Link"><text:soft-page-break/><text:span text:style-name="T3">4.7.5. Settings</text:span></text:a></text:p>
      <text:p text:style-name="P11"><text:a xlink:type="simple" xlink:href="https://docs.google.com/document/d/1huFCTBTo_V-qLagU39WpXXM1eQROCzyZlzvM63dEwec/edit?tab=t.0#heading=h.r6huc64adnvp" text:style-name="Internet_20_link" text:visited-style-name="Visited_20_Internet_20_Link"><text:span text:style-name="T3">4.8. Draw</text:span></text:a></text:p>
      <text:p text:style-name="P12"><text:a xlink:type="simple" xlink:href="https://docs.google.com/document/d/1huFCTBTo_V-qLagU39WpXXM1eQROCzyZlzvM63dEwec/edit?tab=t.0#heading=h.i8xcz920513n" text:style-name="Internet_20_link" text:visited-style-name="Visited_20_Internet_20_Link"><text:span text:style-name="T3">4.8.1. Description</text:span></text:a></text:p>
      <text:p text:style-name="P12"><text:a xlink:type="simple" xlink:href="https://docs.google.com/document/d/1huFCTBTo_V-qLagU39WpXXM1eQROCzyZlzvM63dEwec/edit?tab=t.0#heading=h.2pzxi2vc02ay" text:style-name="Internet_20_link" text:visited-style-name="Visited_20_Internet_20_Link"><text:span text:style-name="T3">4.8.2. UI</text:span></text:a></text:p>
      <text:p text:style-name="P12"><text:a xlink:type="simple" xlink:href="https://docs.google.com/document/d/1huFCTBTo_V-qLagU39WpXXM1eQROCzyZlzvM63dEwec/edit?tab=t.0#heading=h.7q2txu5evv32" text:style-name="Internet_20_link" text:visited-style-name="Visited_20_Internet_20_Link"><text:span text:style-name="T3">4.8.3. Controls</text:span></text:a></text:p>
      <text:p text:style-name="P12"><text:a xlink:type="simple" xlink:href="https://docs.google.com/document/d/1huFCTBTo_V-qLagU39WpXXM1eQROCzyZlzvM63dEwec/edit?tab=t.0#heading=h.i4dzd17kmutc" text:style-name="Internet_20_link" text:visited-style-name="Visited_20_Internet_20_Link"><text:span text:style-name="T3">4.8.4. Scoring</text:span></text:a></text:p>
      <text:p text:style-name="P12"><text:a xlink:type="simple" xlink:href="https://docs.google.com/document/d/1huFCTBTo_V-qLagU39WpXXM1eQROCzyZlzvM63dEwec/edit?tab=t.0#heading=h.tu0lv8jeeide" text:style-name="Internet_20_link" text:visited-style-name="Visited_20_Internet_20_Link"><text:span text:style-name="T3">4.8.5. Settings</text:span></text:a></text:p>
      <text:p text:style-name="P10"><text:a xlink:type="simple" xlink:href="https://docs.google.com/document/d/1huFCTBTo_V-qLagU39WpXXM1eQROCzyZlzvM63dEwec/edit?tab=t.0#heading=h.v3fn7xgd9j69" text:style-name="Internet_20_link" text:visited-style-name="Visited_20_Internet_20_Link"><text:span text:style-name="T3">5. UI</text:span></text:a></text:p>
      <text:p text:style-name="P10"><text:a xlink:type="simple" xlink:href="https://docs.google.com/document/d/1huFCTBTo_V-qLagU39WpXXM1eQROCzyZlzvM63dEwec/edit?tab=t.0#heading=h.g752te4q082x" text:style-name="Internet_20_link" text:visited-style-name="Visited_20_Internet_20_Link"><text:span text:style-name="T3">6. Software</text:span></text:a></text:p>
      <text:p text:style-name="P11"><text:a xlink:type="simple" xlink:href="https://docs.google.com/document/d/1huFCTBTo_V-qLagU39WpXXM1eQROCzyZlzvM63dEwec/edit?tab=t.0#heading=h.khxyyfhdojpr" text:style-name="Internet_20_link" text:visited-style-name="Visited_20_Internet_20_Link"><text:span text:style-name="T3">6.1. SRAM Memory Usage</text:span></text:a></text:p>
      <text:p text:style-name="P11"><text:a xlink:type="simple" xlink:href="https://docs.google.com/document/d/1huFCTBTo_V-qLagU39WpXXM1eQROCzyZlzvM63dEwec/edit?tab=t.0#heading=h.4jgszwnkh553" text:style-name="Internet_20_link" text:visited-style-name="Visited_20_Internet_20_Link"><text:span text:style-name="T3">6.2. EEPROM Memory Usage</text:span></text:a></text:p>
      <text:p text:style-name="P11"><text:a xlink:type="simple" xlink:href="https://docs.google.com/document/d/1huFCTBTo_V-qLagU39WpXXM1eQROCzyZlzvM63dEwec/edit?tab=t.0#heading=h.bqzt81f7czk3" text:style-name="Internet_20_link" text:visited-style-name="Visited_20_Internet_20_Link"><text:span text:style-name="T3">6.3. Flash Memory Usage</text:span></text:a></text:p>
      <text:p text:style-name="P10"><text:a xlink:type="simple" xlink:href="https://docs.google.com/document/d/1huFCTBTo_V-qLagU39WpXXM1eQROCzyZlzvM63dEwec/edit?tab=t.0#heading=h.5o55sopqelb" text:style-name="Internet_20_link" text:visited-style-name="Visited_20_Internet_20_Link"><text:span text:style-name="T3">7. Electronics</text:span></text:a></text:p>
      <text:p text:style-name="P11"><text:a xlink:type="simple" xlink:href="https://docs.google.com/document/d/1huFCTBTo_V-qLagU39WpXXM1eQROCzyZlzvM63dEwec/edit?tab=t.0#heading=h.fnlgx6usqks3" text:style-name="Internet_20_link" text:visited-style-name="Visited_20_Internet_20_Link"><text:span text:style-name="T3">7.1. Components</text:span></text:a></text:p>
      <text:p text:style-name="P11"><text:a xlink:type="simple" xlink:href="https://docs.google.com/document/d/1huFCTBTo_V-qLagU39WpXXM1eQROCzyZlzvM63dEwec/edit?tab=t.0#heading=h.ygmq7agcuaww" text:style-name="Internet_20_link" text:visited-style-name="Visited_20_Internet_20_Link"><text:span text:style-name="T3">7.2. CPU Pin usage</text:span></text:a></text:p>
      <text:p text:style-name="P11"><text:a xlink:type="simple" xlink:href="https://docs.google.com/document/d/1huFCTBTo_V-qLagU39WpXXM1eQROCzyZlzvM63dEwec/edit?tab=t.0#heading=h.p2eo1dn6z7dl" text:style-name="Internet_20_link" text:visited-style-name="Visited_20_Internet_20_Link"><text:span text:style-name="T3">7.3. Power Usage</text:span></text:a></text:p>
      <text:p text:style-name="P10"><text:a xlink:type="simple" xlink:href="https://docs.google.com/document/d/1huFCTBTo_V-qLagU39WpXXM1eQROCzyZlzvM63dEwec/edit?tab=t.0#heading=h.fj6vhskuagfo" text:style-name="Internet_20_link" text:visited-style-name="Visited_20_Internet_20_Link"><text:span text:style-name="T3">8. Enclosure</text:span></text:a></text:p>
      <text:p text:style-name="P11"><text:a xlink:type="simple" xlink:href="https://docs.google.com/document/d/1huFCTBTo_V-qLagU39WpXXM1eQROCzyZlzvM63dEwec/edit?tab=t.0#heading=h.1t2jr1xths4v" text:style-name="Internet_20_link" text:visited-style-name="Visited_20_Internet_20_Link"><text:span text:style-name="T3">8.1. General</text:span></text:a></text:p>
      <text:p text:style-name="P11"><text:a xlink:type="simple" xlink:href="https://docs.google.com/document/d/1huFCTBTo_V-qLagU39WpXXM1eQROCzyZlzvM63dEwec/edit?tab=t.0#heading=h.xdlrwjffh3gn" text:style-name="Internet_20_link" text:visited-style-name="Visited_20_Internet_20_Link"><text:span text:style-name="T3">8.2. Components</text:span></text:a></text:p>
      <text:p text:style-name="P13"><text:a xlink:type="simple" xlink:href="https://docs.google.com/document/d/1huFCTBTo_V-qLagU39WpXXM1eQROCzyZlzvM63dEwec/edit?tab=t.0#heading=h.5udsemj0gtib" text:style-name="Internet_20_link" text:visited-style-name="Visited_20_Internet_20_Link"><text:span text:style-name="T3">8.3. MDF Plate cutting</text:span></text:a></text:p>
      <text:p text:style-name="P14"/>
      <text:p text:style-name="P14"/>
      <text:h text:style-name="P15" text:outline-level="1">Introduction</text:h>
      <text:p text:style-name="Text_20_body">This device is called FRAXIS: Five Rows Arcade Experience Interactive System.</text:p>
      <text:p text:style-name="Text_20_body">The goal of the device is to play games, although there will also be graphical/sound demos and utilities available.</text:p>
      <text:p text:style-name="Text_20_body">The base of the system are five LED strips vertically or horizontally between two players. Also one player games will be supported.</text:p>
      <text:h text:style-name="P15" text:outline-level="1">Device</text:h>
      <text:p text:style-name="P16">The device is about <text:span text:style-name="T4">55</text:span> x <text:span text:style-name="T4">2</text:span>0 <text:span text:style-name="T5">x 8 </text:span>cm and contains:</text:p>
      <text:list text:style-name="L1">
        <text:list-item>
          <text:p text:style-name="P17">In the center, <text:span text:style-name="T5">five 50 centimeter</text:span> LED strip<text:span text:style-name="T5">s</text:span> <text:span text:style-name="T5">containing 72 * 5 RGB leds.</text:span></text:p>
        </text:list-item>
        <text:list-item>
          <text:p text:style-name="P18">To navigation the menu to select and adjust applications:</text:p>
          <text:list>
            <text:list-item>
              <text:p text:style-name="P17">A text display (LCD) (for selecting game/settings)</text:p>
            </text:list-item>
            <text:list-item>
              <text:p text:style-name="P19">Either joystick can be used for navigation.</text:p>
            </text:list-item>
            <text:list-item>
              <text:p text:style-name="P19">Three LEDs for showing the mode or game states (play/paused).</text:p>
            </text:list-item>
          </text:list>
        </text:list-item>
        <text:list-item>
          <text:p text:style-name="P18">A central display mostly used during games with 4 digits to be able to show time.</text:p>
        </text:list-item>
        <text:list-item>
          <text:p text:style-name="P17">For each player:</text:p>
          <text:list>
            <text:list-item>
              <text:p text:style-name="P19">A joystick that can be attached to the enclosure.</text:p>
            </text:list-item>
            <text:list-item>
              <text:p text:style-name="P19">A display capable of showing 6 digits, e.g. for the score.</text:p>
            </text:list-item>
            <text:list-item>
              <text:p text:style-name="P19">A small LED for player notifications.</text:p>
            </text:list-item>
          </text:list>
        </text:list-item>
        <text:list-item>
          <text:p text:style-name="P19">Audio control:</text:p>
          <text:list>
            <text:list-item>
              <text:p text:style-name="P19">A buzzer for beeps.</text:p>
            </text:list-item>
            <text:list-item>
              <text:p text:style-name="P19">A (mono) speaker for sound effects or better sound.</text:p>
            </text:list-item>
            <text:list-item>
              <text:p text:style-name="P19">A (low profile) microphone for e.g. sound controlled applications.</text:p>
            </text:list-item>
          </text:list>
        </text:list-item>
      </text:list>
      <text:p text:style-name="P20"/>
      <text:p text:style-name="P21">Below is a sketch picture.</text:p>
      <text:p text:style-name="P21"/>
      <text:p text:style-name="P22"><draw:frame draw:style-name="fr2" draw:name="Afbeelding3" text:anchor-type="char" svg:width="17.59cm" svg:height="5.463cm" draw:z-index="1"><draw:image xlink:href="Pictures/10000001000003BC0000012983F0B177.png" xlink:type="simple" xlink:show="embed" xlink:actuate="onLoad" draw:mime-type="image/png"/></draw:frame><text:span text:style-name="T6"><text:line-break/></text:span></text:p>
      <text:h text:style-name="P23" text:outline-level="1">Electronics</text:h>
      <text:h text:style-name="P24" text:outline-level="2">Introduction</text:h>
      <text:p text:style-name="P21">This chapter shows all schematics and PCB layout including many design decisions made.</text:p>
      <text:h text:style-name="P25" text:outline-level="2">Schematics</text:h>
      <text:h text:style-name="P26" text:outline-level="3">Overview</text:h>
      <text:p text:style-name="P27"><draw:frame draw:style-name="fr3" draw:name="Afbeelding1" text:anchor-type="char" svg:width="16.041cm" svg:height="17.272cm" draw:z-index="15"><draw:image xlink:href="Pictures/100000010000031A0000035723DB11BF.png" xlink:type="simple" xlink:show="embed" xlink:actuate="onLoad" draw:mime-type="image/png"/></draw:frame></text:p>
      <text:p text:style-name="P16"><text:soft-page-break/>The system is built in various parts:</text:p>
      <text:list text:style-name="L2">
        <text:list-item>
          <text:p text:style-name="P28">Main power: Power plug, adapter, ground/5V to led strips and ESP32 proto board.</text:p>
        </text:list-item>
        <text:list-item>
          <text:p text:style-name="P28">LED Strips</text:p>
        </text:list-item>
        <text:list-item>
          <text:p text:style-name="P28">ESP32 &amp; SPI (Micro SD Card Reader)</text:p>
        </text:list-item>
        <text:list-item>
          <text:p text:style-name="P28">I2S Sound: I2S microphone, amplifier, speaker and a passive buzzer</text:p>
        </text:list-item>
        <text:list-item>
          <text:p text:style-name="P28">Edge Pads: Edge pads of the ESP32 proto board</text:p>
        </text:list-item>
        <text:list-item>
          <text:p text:style-name="P28">Players: TM1637 displays, joysticks and LEDs</text:p>
        </text:list-item>
        <text:list-item>
          <text:p text:style-name="P28">I2C: MCP23017 GPIO expander, I2C level shifter and 1602 LED Display</text:p>
        </text:list-item>
      </text:list>
      <text:p text:style-name="P29">The design decisions are explained in the corresponding paragraphs.</text:p>
      <text:h text:style-name="P30" text:outline-level="3">Main Power</text:h>
      <text:p text:style-name="P31"><draw:frame draw:style-name="fr4" draw:name="Afbeelding2" text:anchor-type="as-char" svg:y="-6.535cm" svg:width="17.228cm" svg:height="7.301cm" draw:z-index="0"><draw:image xlink:href="Pictures/100000010000058D0000023AB016C227.png" xlink:type="simple" xlink:show="embed" xlink:actuate="onLoad" draw:mime-type="image/png"/></draw:frame></text:p>
      <text:p text:style-name="P31"/>
      <text:p text:style-name="Text_20_body">The main power comes from a IEC320 plugin to provide 220-240V/50-60 Hz. This is slightly overkill, however, that plugin comes with a builtin switch and light to see it’s switched on.</text:p>
      <text:p text:style-name="Text_20_body">There are mainl<text:span text:style-name="T7">y two power consuming elements: the LED strips which take up far the most current and the processing board, called ESP32 proto board.</text:span></text:p>
      <text:p text:style-name="P32">Since this device will not be a full display device and will be mostly used inside, full brightness is not needed. However, to be able to create interesting applications, 5 rows of 72 LEDs will be used meaning 360 LEDs. Each LED maximum can use 60 mA (20 mA) per color, resulting in 21.6 A. However, since not full brightness is needed, an adapter of 10A will be used, where the ESP32 proto board can use upto 1.<text:span text:style-name="T8">5</text:span>A <text:span text:style-name="T8">(both 3.3V and 5V components combined) </text:span>and 2A is used as headroom. This results in max <text:span text:style-name="T8">6.5</text:span>A to be used for the LED strips.</text:p>
      <text:p text:style-name="P33">The adapter has two V+ and V- output ports which are laid in parallel to each side of a small so called Power proto board where two thick copper wires are serving as 5V and GND rails.</text:p>
      <text:p text:style-name="P33"><text:soft-page-break/>Capacitors are added <text:span text:style-name="T9">and on the side rails 5V and GND can be taken for the LED strips and 5V for devices (such as the 1602 LCD and TM1637 displays).</text:span></text:p>
      <text:p text:style-name="P34">A special terminal block is used to provide 5V/GND towards the ESP32 proto board. This power is led through a diode to prevent accidental power reverse.</text:p>
      <text:p text:style-name="P34">For a rough calculation of the current needs for the proto board and related 3V3 components, below is a list. As can be seen, it’s well under 1.<text:span text:style-name="T8">5</text:span>A, <text:span text:style-name="T8">especially as the WIFI capability on the ESP32 will be used only for OTA updates and the microSD Card Reader will only be used occasionaly.</text:span></text:p>
      <table:table table:name="Tabel6" table:style-name="Tabel6">
        <table:table-column table:style-name="Tabel6.A" table:number-columns-repeated="3"/>
        <table:table-row>
          <table:table-cell table:style-name="Tabel6.A1" office:value-type="string">
            <text:p text:style-name="P35">Component</text:p>
          </table:table-cell>
          <table:table-cell table:style-name="Tabel6.A1" office:value-type="string">
            <text:p text:style-name="P36">Current (mA)</text:p>
          </table:table-cell>
          <table:table-cell table:style-name="Tabel6.A1" office:value-type="string">
            <text:p text:style-name="P36">Comment</text:p>
          </table:table-cell>
        </table:table-row>
        <table:table-row>
          <table:table-cell table:style-name="Tabel6.A1" office:value-type="string">
            <text:p text:style-name="P37">ESP32</text:p>
          </table:table-cell>
          <table:table-cell table:style-name="Tabel6.A1" office:value-type="string">
            <text:p text:style-name="P37">500</text:p>
          </table:table-cell>
          <table:table-cell table:style-name="Tabel6.A1" office:value-type="string">
            <text:p text:style-name="P37">Peaks when using WIFI</text:p>
          </table:table-cell>
        </table:table-row>
        <table:table-row>
          <table:table-cell table:style-name="Tabel6.A1" office:value-type="string">
            <text:p text:style-name="P37">MCP23017 module</text:p>
          </table:table-cell>
          <table:table-cell table:style-name="Tabel6.A1" office:value-type="string">
            <text:p text:style-name="P37">2</text:p>
          </table:table-cell>
          <table:table-cell table:style-name="Tabel6.A1" office:value-type="string">
            <text:p text:style-name="P38"/>
          </table:table-cell>
        </table:table-row>
        <table:table-row>
          <table:table-cell table:style-name="Tabel6.A1" office:value-type="string">
            <text:p text:style-name="P37">74AHCT125</text:p>
          </table:table-cell>
          <table:table-cell table:style-name="Tabel6.A1" office:value-type="string">
            <text:p text:style-name="P37">5</text:p>
          </table:table-cell>
          <table:table-cell table:style-name="Tabel6.A1" office:value-type="string">
            <text:p text:style-name="P38"/>
          </table:table-cell>
        </table:table-row>
        <table:table-row>
          <table:table-cell table:style-name="Tabel6.A1" office:value-type="string">
            <text:p text:style-name="P39">I2C Level shifter (BSS138)</text:p>
          </table:table-cell>
          <table:table-cell table:style-name="Tabel6.A1" office:value-type="string">
            <text:p text:style-name="P37">1</text:p>
          </table:table-cell>
          <table:table-cell table:style-name="Tabel6.A1" office:value-type="string">
            <text:p text:style-name="P38"/>
          </table:table-cell>
        </table:table-row>
        <table:table-row>
          <table:table-cell table:style-name="Tabel6.A1" office:value-type="string">
            <text:p text:style-name="P39">I2S MAX89753 amplifier</text:p>
          </table:table-cell>
          <table:table-cell table:style-name="Tabel6.A1" office:value-type="string">
            <text:p text:style-name="P40">600</text:p>
          </table:table-cell>
          <table:table-cell table:style-name="Tabel6.A1" office:value-type="string">
            <text:p text:style-name="P38"/>
          </table:table-cell>
        </table:table-row>
        <table:table-row>
          <table:table-cell table:style-name="Tabel6.A1" office:value-type="string">
            <text:p text:style-name="P39">I2S INMP441 microphone</text:p>
          </table:table-cell>
          <table:table-cell table:style-name="Tabel6.A1" office:value-type="string">
            <text:p text:style-name="P37">2</text:p>
          </table:table-cell>
          <table:table-cell table:style-name="Tabel6.A1" office:value-type="string">
            <text:p text:style-name="P38"/>
          </table:table-cell>
        </table:table-row>
        <table:table-row>
          <table:table-cell table:style-name="Tabel6.A1" office:value-type="string">
            <text:p text:style-name="P39">MicroSD Card Reader</text:p>
          </table:table-cell>
          <table:table-cell table:style-name="Tabel6.A1" office:value-type="string">
            <text:p text:style-name="P37">100</text:p>
          </table:table-cell>
          <table:table-cell table:style-name="Tabel6.A1" office:value-type="string">
            <text:p text:style-name="P38"/>
          </table:table-cell>
        </table:table-row>
        <table:table-row>
          <table:table-cell table:style-name="Tabel6.A1" office:value-type="string">
            <text:p text:style-name="P41">Total</text:p>
          </table:table-cell>
          <table:table-cell table:style-name="Tabel6.A1" office:value-type="string">
            <text:p text:style-name="P41">1210</text:p>
          </table:table-cell>
          <table:table-cell table:style-name="Tabel6.A1" office:value-type="string">
            <text:p text:style-name="P38"/>
          </table:table-cell>
        </table:table-row>
      </table:table>
      <text:p text:style-name="P42"/>
      <text:p text:style-name="P42">Regarding 3V3 components to be powered by the AMS1117, the list is:</text:p>
      <table:table table:name="Tabel7" table:style-name="Tabel7">
        <table:table-column table:style-name="Tabel7.A" table:number-columns-repeated="3"/>
        <table:table-row>
          <table:table-cell table:style-name="Tabel7.A1" office:value-type="string">
            <text:p text:style-name="P35">Component</text:p>
          </table:table-cell>
          <table:table-cell table:style-name="Tabel7.A1" office:value-type="string">
            <text:p text:style-name="P43">Current (mA)</text:p>
          </table:table-cell>
          <table:table-cell table:style-name="Tabel7.A1" office:value-type="string">
            <text:p text:style-name="P43">Comment</text:p>
          </table:table-cell>
        </table:table-row>
        <table:table-row>
          <table:table-cell table:style-name="Tabel7.A1" office:value-type="string">
            <text:p text:style-name="P44">MCP23017 module</text:p>
          </table:table-cell>
          <table:table-cell table:style-name="Tabel7.A1" office:value-type="string">
            <text:p text:style-name="P44">2</text:p>
          </table:table-cell>
          <table:table-cell table:style-name="Tabel7.A1" office:value-type="string">
            <text:p text:style-name="P45"/>
          </table:table-cell>
        </table:table-row>
        <table:table-row>
          <table:table-cell table:style-name="Tabel7.A1" office:value-type="string">
            <text:p text:style-name="P44">74AHCT125</text:p>
          </table:table-cell>
          <table:table-cell table:style-name="Tabel7.A1" office:value-type="string">
            <text:p text:style-name="P44">5</text:p>
          </table:table-cell>
          <table:table-cell table:style-name="Tabel7.A1" office:value-type="string">
            <text:p text:style-name="P45"/>
          </table:table-cell>
        </table:table-row>
        <table:table-row>
          <table:table-cell table:style-name="Tabel7.A1" office:value-type="string">
            <text:p text:style-name="P44">I2C Level Shifter (BSS138)</text:p>
          </table:table-cell>
          <table:table-cell table:style-name="Tabel7.A1" office:value-type="string">
            <text:p text:style-name="P44">1</text:p>
          </table:table-cell>
          <table:table-cell table:style-name="Tabel7.A1" office:value-type="string">
            <text:p text:style-name="P45"/>
          </table:table-cell>
        </table:table-row>
        <table:table-row>
          <table:table-cell table:style-name="Tabel7.A1" office:value-type="string">
            <text:p text:style-name="P44">INMP441 microphone</text:p>
          </table:table-cell>
          <table:table-cell table:style-name="Tabel7.A1" office:value-type="string">
            <text:p text:style-name="P44">2</text:p>
          </table:table-cell>
          <table:table-cell table:style-name="Tabel7.A1" office:value-type="string">
            <text:p text:style-name="P45"/>
          </table:table-cell>
        </table:table-row>
        <table:table-row>
          <table:table-cell table:style-name="Tabel7.A1" office:value-type="string">
            <text:p text:style-name="P44">MicroSD Card Reader</text:p>
          </table:table-cell>
          <table:table-cell table:style-name="Tabel7.A1" office:value-type="string">
            <text:p text:style-name="P44">100</text:p>
          </table:table-cell>
          <table:table-cell table:style-name="Tabel7.A1" office:value-type="string">
            <text:p text:style-name="P45"/>
          </table:table-cell>
        </table:table-row>
        <table:table-row>
          <table:table-cell table:style-name="Tabel7.A1" office:value-type="string">
            <text:p text:style-name="P35">Total</text:p>
          </table:table-cell>
          <table:table-cell table:style-name="Tabel7.A1" office:value-type="string">
            <text:p text:style-name="P35">110</text:p>
          </table:table-cell>
          <table:table-cell table:style-name="Tabel7.A1" office:value-type="string">
            <text:p text:style-name="P45"/>
          </table:table-cell>
        </table:table-row>
      </table:table>
      <text:p text:style-name="P46"/>
      <text:p text:style-name="P46">3.3V Power through AMS1117:</text:p>
      <text:p text:style-name="P46">P_3.3V,load = 3.3V⋅0.11A ≈ 0.36 W</text:p>
      <text:p text:style-name="P46"/>
      <text:p text:style-name="P46">Power dissipation of AMS1117:</text:p>
      <text:p text:style-name="P46">P_AMS1117= (5V −3.3V)⋅0.11A ≈ 0.19 W</text:p>
      <text:p text:style-name="P46"/>
      <text:p text:style-name="P46">For 0.19W, no heat sink is needed.</text:p>
      <text:h text:style-name="P47" text:outline-level="3">LED Strips</text:h>
      <text:p text:style-name="P48"><draw:frame draw:style-name="fr3" draw:name="Afbeelding4" text:anchor-type="char" svg:width="11.292cm" svg:height="21.763cm" draw:z-index="3"><draw:image xlink:href="Pictures/1000000100000166000002B26EAAA2CE.png" xlink:type="simple" xlink:show="embed" xlink:actuate="onLoad" draw:mime-type="image/png"/></draw:frame><text:tab/></text:p>
      <text:p text:style-name="P48"><text:soft-page-break/>Five 50 cm WS2812B led strips will be used. <text:span text:style-name="T10">Because the enclosure should not become too long but still many LEDs should be present, 144 LEDs/m strips will be used, which are cut in half resulting in 5 rows of 72 LEDs each, totalling 380 LEDs. In the Power schematics you can read about the power consumption.</text:span></text:p>
      <text:p text:style-name="P49">WS2813 is not needed as the chance of a breaking LED is fairly low. The strips will be placed inside aluminium strips, therefore no water protection is needed, anything from IP20 will do.</text:p>
      <text:p text:style-name="P50">The reason that five LED strips are selected have a non electronics reason (always a central row and three rows would feel too limited).</text:p>
      <text:p text:style-name="P50">Since the LED strips are enclosured, the chance of a LED failing is low, so WS2812B is selected over WS2813.</text:p>
      <text:p text:style-name="P50">One big chain will be used instead of five separate LED strip channels, otherwise two level shifters would be needed.</text:p>
      <text:p text:style-name="P50">To reduce the length of the LED strip length, the begin and end of each LED strip is laid out alternated.</text:p>
      <text:p text:style-name="P51">LED STRIP 1 Begin -------------------------------→ LED STRIP 1 END <text:s text:c="2"/>--\<text:line-break/>/--LED STRIP 2 End ←--------------------------------- LED STRIP 2 BEGIN &lt;-/<text:line-break/>\-&gt;LED STRIP 3 Begin -------------------------------→ LED STRIP 3 END <text:s text:c="2"/>--\<text:line-break/>/--LED STRIP 4 End ←--------------------------------- LED STRIP 4 BEGIN &lt;-/<text:line-break/>\-&gt;LED STRIP 5 Begin -------------------------------→ LED STRIP 5 END</text:p>
      <text:p text:style-name="P50">This reduces the total length of the LED strips chain to 250 cm excluding the distance from the ESP32 proto board.</text:p>
      <text:p text:style-name="P50">Because of this length, some measurements need to be taken:</text:p>
      <text:p text:style-name="P50">- Big capacitors are needed and are placed both on the Power proto board and a big capacitor at the other end (where is the start of the LED strips). </text:p>
      <text:p text:style-name="P50">- A level shifter is used: an 74AHCT125. Only one channel is used. The used channel must be connected to enable with GND. The unused channels MUST be connected (with 5V). The unused channels input/output are not allowed to be connected.</text:p>
      <text:p text:style-name="P50">- 5V is injected at both ends of each LED strip.</text:p>
      <text:h text:style-name="P52" text:outline-level="3">I2S Sound</text:h>
      <text:p text:style-name="P53"><draw:frame draw:style-name="fr5" draw:name="Afbeelding5" text:anchor-type="char" svg:width="15.235cm" svg:height="22.033cm" draw:z-index="5"><draw:image xlink:href="Pictures/10000001000001ED000002C90314E69F.png" xlink:type="simple" xlink:show="embed" xlink:actuate="onLoad" draw:mime-type="image/png"/></draw:frame></text:p>
      <text:p text:style-name="P54"><text:soft-page-break/><text:span text:style-name="T11">Two </text:span>sound production components will be used:</text:p>
      <text:p text:style-name="P54">- A passive buzzer, capable of making simple sounds, with varying frequencies but mostly usable for beeps and higher pitched sounds, definitely not high quality.</text:p>
      <text:p text:style-name="P53">- A MAX89357 module connected to a 3W 4Ohm 40mm speaker for higher quality sounds, although bass quality is still limited. A special box enclosure will be made to improve the bass pressure.</text:p>
      <text:p text:style-name="P55">The amplifier has its own output via a two pins terminal block, so it will not be broken out on an edge pad. </text:p>
      <text:p text:style-name="P53">One microphone is used: a INMP441 microphone module.</text:p>
      <text:p text:style-name="P56">Since I2S lines are critical, all external wires (to the microphone) will be twisted with specific GND wires.</text:p>
      <text:p text:style-name="P56">The passive buzzer will be used with 5V to increase the power, otherwise it will be mainly overpowered with the amplifier/speaker combination:</text:p>
      <table:table table:name="Tabel9" table:style-name="Tabel9">
        <table:table-column table:style-name="Tabel9.A"/>
        <table:table-column table:style-name="Tabel9.B"/>
        <table:table-column table:style-name="Tabel9.C"/>
        <table:table-header-rows>
          <table:table-row>
            <table:table-cell table:style-name="Tabel9.A1" office:value-type="string">
              <text:p text:style-name="P57">Source</text:p>
            </table:table-cell>
            <table:table-cell table:style-name="Tabel9.A1" office:value-type="string">
              <text:p text:style-name="P57">Assumptions</text:p>
            </table:table-cell>
            <table:table-cell table:style-name="Tabel9.A1" office:value-type="string">
              <text:p text:style-name="P57">Approx. SPL @ 30 cm</text:p>
            </table:table-cell>
          </table:table-row>
        </table:table-header-rows>
        <table:table-row>
          <table:table-cell table:style-name="Tabel9.A1" office:value-type="string">
            <text:p text:style-name="Table_20_Heading"><text:span text:style-name="Strong_20_Emphasis"><text:span text:style-name="T12">MAX98357 + 3 W / 4 Ω speaker</text:span></text:span></text:p>
          </table:table-cell>
          <table:table-cell table:style-name="Tabel9.A1" office:value-type="string">
            <text:p text:style-name="Table_20_Contents"><text:span text:style-name="T12">Speaker sensitivity ~</text:span><text:span text:style-name="Strong_20_Emphasis"><text:span text:style-name="T12">86 dB @ 1 W/1 m</text:span></text:span><text:span text:style-name="T12">, driven near </text:span><text:span text:style-name="Strong_20_Emphasis"><text:span text:style-name="T12">3 W @ 5 V</text:span></text:span></text:p>
          </table:table-cell>
          <table:table-cell table:style-name="Tabel9.A1" office:value-type="string">
            <text:p text:style-name="Table_20_Contents"><text:span text:style-name="Strong_20_Emphasis"><text:span text:style-name="T12">≈ 100–102 dB</text:span></text:span></text:p>
          </table:table-cell>
        </table:table-row>
        <table:table-row>
          <table:table-cell table:style-name="Tabel9.A1" office:value-type="string">
            <text:p text:style-name="Table_20_Heading"><text:span text:style-name="Strong_20_Emphasis"><text:span text:style-name="T12">Passive buzzer @ 3.3 V</text:span></text:span></text:p>
          </table:table-cell>
          <table:table-cell table:style-name="Tabel9.A1" office:value-type="string">
            <text:p text:style-name="Table_20_Contents"><text:span text:style-name="T12">Typical small piezo: </text:span><text:span text:style-name="Strong_20_Emphasis"><text:span text:style-name="T12">≈ 75 dB @ 10 cm</text:span></text:span><text:span text:style-name="T12"> at 3.3 V</text:span></text:p>
          </table:table-cell>
          <table:table-cell table:style-name="Tabel9.A1" office:value-type="string">
            <text:p text:style-name="Table_20_Contents"><text:span text:style-name="Strong_20_Emphasis"><text:span text:style-name="T12">≈ 65 dB</text:span></text:span></text:p>
          </table:table-cell>
        </table:table-row>
        <table:table-row>
          <table:table-cell table:style-name="Tabel9.A1" office:value-type="string">
            <text:p text:style-name="Table_20_Heading"><text:span text:style-name="Strong_20_Emphasis"><text:span text:style-name="T12">Passive buzzer @ 5 V</text:span></text:span></text:p>
          </table:table-cell>
          <table:table-cell table:style-name="Tabel9.A1" office:value-type="string">
            <text:p text:style-name="Table_20_Contents"><text:span text:style-name="T12">+3.5 dB vs 3.3 V → </text:span><text:span text:style-name="Strong_20_Emphasis"><text:span text:style-name="T12">≈ 78.5 dB @ 10 cm</text:span></text:span></text:p>
          </table:table-cell>
          <table:table-cell table:style-name="Tabel9.A1" office:value-type="string">
            <text:p text:style-name="Table_20_Contents"><text:span text:style-name="Strong_20_Emphasis"><text:span text:style-name="T12">≈ 69 dB</text:span></text:span></text:p>
          </table:table-cell>
        </table:table-row>
      </table:table>
      <text:p text:style-name="P53"/>
      <text:p text:style-name="P58">To increase the buzzer’s output (relative to the amp), the following design decisions are made:</text:p>
      <text:p text:style-name="P58">- A transistor (2N2222) and resistor are used to be able to drive the buzzer at 5V.</text:p>
      <text:p text:style-name="P58">- Software advice: use frequencies around the resonation spot, around 2-4 kHz.</text:p>
      <text:p text:style-name="P58">- Enclosure advice: Place buzzer under small whole in enclosure (not on ESP32 proto board).</text:p>
      <text:p text:style-name="P58">Note that longer wires do not affect quality and do not need to be twisted with GND.</text:p>
      <text:p text:style-name="P59">The buzzer will be powered from the 5V rail.</text:p>
      <text:h text:style-name="P60" text:outline-level="3">I2C</text:h>
      <text:p text:style-name="P61"><draw:frame draw:style-name="fr6" draw:name="Afbeelding23" text:anchor-type="char" svg:x="0cm" svg:y="0.229cm" svg:width="17.59cm" svg:height="10.433cm" draw:z-index="20"><draw:image xlink:href="Pictures/10000001000004A1000002BF1356BC96.png" xlink:type="simple" xlink:show="embed" xlink:actuate="onLoad" draw:mime-type="image/png"/></draw:frame></text:p>
      <text:p text:style-name="P61"><draw:frame draw:style-name="fr7" draw:name="Afbeelding6" text:anchor-type="char" svg:width="17.59cm" svg:height="6.348cm" draw:z-index="21"><draw:image xlink:href="Pictures/10000001000003D200000161E26D5225.png" xlink:type="simple" xlink:show="embed" xlink:actuate="onLoad" draw:mime-type="image/png"/></draw:frame></text:p>
      <text:p text:style-name="P62"><draw:frame draw:style-name="fr8" draw:name="Afbeelding21" text:anchor-type="char" svg:width="17.59cm" svg:height="4.798cm" draw:z-index="23"><draw:image xlink:href="Pictures/10000001000003AE00000101FE08D281.png" xlink:type="simple" xlink:show="embed" xlink:actuate="onLoad" draw:mime-type="image/png"/></draw:frame><draw:frame draw:style-name="fr2" draw:name="Afbeelding20" text:anchor-type="char" svg:width="17.59cm" svg:height="5.413cm" draw:z-index="22"><draw:image xlink:href="Pictures/10000001000003BB00000126B1B342C7.png" xlink:type="simple" xlink:show="embed" xlink:actuate="onLoad" draw:mime-type="image/png"/></draw:frame><text:soft-page-break/></text:p>
      <text:p text:style-name="P63">There will be two I2C components:</text:p>
      <text:p text:style-name="P64">- An MCP23017 GPIO Expander, needed to handle the inputs of the two player joysticks and all LEDs. This is to reduce the number of pin usage on the ESP32. </text:p>
      <text:p text:style-name="P64">- An 1602 LCD Display to be able to navigate the menu. <text:span text:style-name="T13">Two lines of 16 characters each should suffice.</text:span></text:p>
      <text:p text:style-name="P64">The MCP23017 works on 3.3V, but the 1602 <text:span text:style-name="T14">LCD Display</text:span> only works on 5V (otherwise at least the background display does not light). <text:span text:style-name="T14">The 1602 LCD Display will be powered from the 5V rail.</text:span></text:p>
      <text:p text:style-name="P64">Therefore a level shifter is needed, and the 74AHCT125 is not usable as it is one directional, where a BSS1338 level shifter is typically used for I2C line conversion. Only for the 3.3V side pulldowns are necessary, for the 1602 LCD Display, the existing ones built into the module will be used.</text:p>
      <text:p text:style-name="P64">For the MCP23017, below is a table of used inputs/outputs.</text:p>
      <table:table table:name="Tabel8" table:style-name="Tabel8">
        <table:table-column table:style-name="Tabel8.A"/>
        <table:table-column table:style-name="Tabel8.B"/>
        <table:table-column table:style-name="Tabel8.C"/>
        <table:table-row>
          <table:table-cell table:style-name="Tabel8.A1" office:value-type="string">
            <text:p text:style-name="P65">Pin Function</text:p>
          </table:table-cell>
          <table:table-cell table:style-name="Tabel8.A1" office:value-type="string">
            <text:p text:style-name="P65">Amount of pins</text:p>
          </table:table-cell>
          <table:table-cell table:style-name="Tabel8.A1" office:value-type="string">
            <text:p text:style-name="P65">Mandatory</text:p>
          </table:table-cell>
        </table:table-row>
        <table:table-row>
          <table:table-cell table:style-name="Tabel8.A1" office:value-type="string">
            <text:p text:style-name="P66">Joystick Player 1: Up, Down, Left, Right, Button</text:p>
          </table:table-cell>
          <table:table-cell table:style-name="Tabel8.A1" office:value-type="string">
            <text:p text:style-name="P66">5</text:p>
          </table:table-cell>
          <table:table-cell table:style-name="Tabel8.A1" office:value-type="string">
            <text:p text:style-name="P66">Yes</text:p>
          </table:table-cell>
        </table:table-row>
        <table:table-row>
          <table:table-cell table:style-name="Tabel8.A1" office:value-type="string">
            <text:p text:style-name="P66">Joystick Player 2: Up, Down, Left, Right, Button</text:p>
          </table:table-cell>
          <table:table-cell table:style-name="Tabel8.A1" office:value-type="string">
            <text:p text:style-name="P66">5</text:p>
          </table:table-cell>
          <table:table-cell table:style-name="Tabel8.A1" office:value-type="string">
            <text:p text:style-name="P66">Yes</text:p>
          </table:table-cell>
        </table:table-row>
        <table:table-row>
          <table:table-cell table:style-name="Tabel8.A1" office:value-type="string">
            <text:p text:style-name="P66">LED for Player 1 and 2</text:p>
          </table:table-cell>
          <table:table-cell table:style-name="Tabel8.A1" office:value-type="string">
            <text:p text:style-name="P66">2</text:p>
          </table:table-cell>
          <table:table-cell table:style-name="Tabel8.A1" office:value-type="string">
            <text:p text:style-name="P66">Yes</text:p>
          </table:table-cell>
        </table:table-row>
        <table:table-row>
          <table:table-cell table:style-name="Tabel8.A1" office:value-type="string">
            <text:p text:style-name="P66">Status LEDs: Select, Play/Pause, Setup</text:p>
          </table:table-cell>
          <table:table-cell table:style-name="Tabel8.A1" office:value-type="string">
            <text:p text:style-name="P66">3</text:p>
          </table:table-cell>
          <table:table-cell table:style-name="Tabel8.A1" office:value-type="string">
            <text:p text:style-name="P66">No</text:p>
          </table:table-cell>
        </table:table-row>
        <table:table-row>
          <table:table-cell table:style-name="Tabel8.A1" office:value-type="string">
            <text:p text:style-name="P66">Unused</text:p>
          </table:table-cell>
          <table:table-cell table:style-name="Tabel8.A1" office:value-type="string">
            <text:p text:style-name="P66">1</text:p>
          </table:table-cell>
          <table:table-cell table:style-name="Tabel8.A1" office:value-type="string">
            <text:p text:style-name="P66">No</text:p>
          </table:table-cell>
        </table:table-row>
      </table:table>
      <text:p text:style-name="P64"/>
      <text:p text:style-name="P64">The status LEDs are used as there were pins available anyway. The exact function can be changed later when felt necessary. <text:span text:style-name="T14">220-270 ohm resistors are used, however this may depend on the color and brightness needed.</text:span></text:p>
      <text:p text:style-name="P64">All inputs from the joystick need pullup resistors. <text:span text:style-name="T14">Note that the MCP23017 has pullup resistors, however these are too weak for long wires.</text:span></text:p>
      <text:p text:style-name="P67"><text:soft-page-break/>The System button has a capacitor (close to the button, not MCP23017). This is to prevent the need for software debouncing.</text:p>
      <text:p text:style-name="P64">The I2C wires need to be protected with twisted GND wires.</text:p>
      <text:p text:style-name="P64">The joystick inputs also need to be protected, however one GND wire per joystick wire ‘bundle’ will suffice.</text:p>
      <text:h text:style-name="P68" text:outline-level="3">ESP32 &amp; SPI</text:h>
      <text:p text:style-name="P69"><draw:frame draw:style-name="fr9" draw:name="Afbeelding7" text:anchor-type="char" svg:width="12.04cm" svg:height="22.544cm" draw:z-index="4"><draw:image xlink:href="Pictures/10000001000001C700000354E8D65000.png" xlink:type="simple" xlink:show="embed" xlink:actuate="onLoad" draw:mime-type="image/png"/></draw:frame></text:p>
      <text:p text:style-name="P70">Looking at the vast amount of peripherals and pins needed, and the processing power need, and WIFI connection (for possible OTA updates), the ESP32 is a good candidate. An ESP32 Supermini C6 would be too limited regarding pins, but the ESP32 WROOM DevKit C1 has everything needed.</text:p>
      <text:p text:style-name="P71">To prevent soldering issues, a full development board will be soldered on the ESP32 proto board (although with female pin headers for soldering heat protection and easy replacement).</text:p>
      <text:p text:style-name="P72">To prevent using too much 3.3V power, it is not drawn directly from the ESP32.</text:p>
      <text:p text:style-name="P72">The following components use 3.3V power:</text:p>
      <table:table table:name="Tabel10" table:style-name="Tabel10">
        <table:table-column table:style-name="Tabel10.A"/>
        <table:table-column table:style-name="Tabel10.B"/>
        <table:table-row>
          <table:table-cell table:style-name="Tabel10.A1" office:value-type="string">
            <text:p text:style-name="P73">Component</text:p>
          </table:table-cell>
          <table:table-cell table:style-name="Tabel10.A1" office:value-type="string">
            <text:p text:style-name="P73">Current Consumption</text:p>
          </table:table-cell>
        </table:table-row>
        <table:table-row>
          <table:table-cell table:style-name="Tabel10.A1" office:value-type="string">
            <text:p text:style-name="P74">MCP23017</text:p>
          </table:table-cell>
          <table:table-cell table:style-name="Tabel10.A1" office:value-type="string">
            <text:p text:style-name="P74">2</text:p>
          </table:table-cell>
        </table:table-row>
        <table:table-row>
          <table:table-cell table:style-name="Tabel10.A1" office:value-type="string">
            <text:p text:style-name="P74">74AHCT125</text:p>
          </table:table-cell>
          <table:table-cell table:style-name="Tabel10.A1" office:value-type="string">
            <text:p text:style-name="P74">5</text:p>
          </table:table-cell>
        </table:table-row>
        <table:table-row>
          <table:table-cell table:style-name="Tabel10.A1" office:value-type="string">
            <text:p text:style-name="P74">I2C Level Shifter</text:p>
          </table:table-cell>
          <table:table-cell table:style-name="Tabel10.A1" office:value-type="string">
            <text:p text:style-name="P74">1</text:p>
          </table:table-cell>
        </table:table-row>
        <table:table-row>
          <table:table-cell table:style-name="Tabel10.A1" office:value-type="string">
            <text:p text:style-name="P74">INMP441 I2S Microphone</text:p>
          </table:table-cell>
          <table:table-cell table:style-name="Tabel10.A1" office:value-type="string">
            <text:p text:style-name="P74">2</text:p>
          </table:table-cell>
        </table:table-row>
        <table:table-row>
          <table:table-cell table:style-name="Tabel10.A1" office:value-type="string">
            <text:p text:style-name="P74">MicroSD Card Reader</text:p>
          </table:table-cell>
          <table:table-cell table:style-name="Tabel10.A1" office:value-type="string">
            <text:p text:style-name="P74">100</text:p>
          </table:table-cell>
        </table:table-row>
        <table:table-row>
          <table:table-cell table:style-name="Tabel10.A1" office:value-type="string">
            <text:p text:style-name="P74">I2C pullups on 3.3V</text:p>
          </table:table-cell>
          <table:table-cell table:style-name="Tabel10.A1" office:value-type="string">
            <text:p text:style-name="P74">2</text:p>
          </table:table-cell>
        </table:table-row>
        <table:table-row>
          <table:table-cell table:style-name="Tabel10.A1" office:value-type="string">
            <text:p text:style-name="P73">Total</text:p>
          </table:table-cell>
          <table:table-cell table:style-name="Tabel10.A1" office:value-type="string">
            <text:p text:style-name="P74">112</text:p>
          </table:table-cell>
        </table:table-row>
      </table:table>
      <text:p text:style-name="P72"/>
      <text:p text:style-name="P72">The ESP32 DevKit C1 can produce about 250-300 mA, theorethically 500 mA but that heats up the regulator. Since the ESP32 is using 200-300 mA during a WiFi burst, there is almost no spare current left. Therefore, an AMS1117 will be used, using various capacitors around it according to the reference design.</text:p>
      <text:p text:style-name="P72">Below is a full ESP32 pin out table including design decisions.</text:p>
      <table:table table:name="Tabel11" table:style-name="Tabel11">
        <table:table-column table:style-name="Tabel11.A"/>
        <table:table-column table:style-name="Tabel11.B"/>
        <table:table-column table:style-name="Tabel11.C"/>
        <table:table-column table:style-name="Tabel11.D"/>
        <table:table-row>
          <table:table-cell table:style-name="Tabel11.A1" office:value-type="string">
            <text:p text:style-name="P73">Pin Nr</text:p>
          </table:table-cell>
          <table:table-cell table:style-name="Tabel11.A1" office:value-type="string">
            <text:p text:style-name="P73">GPIO Name</text:p>
          </table:table-cell>
          <table:table-cell table:style-name="Tabel11.A1" office:value-type="string">
            <text:p text:style-name="P75">Connected</text:p>
          </table:table-cell>
          <table:table-cell table:style-name="Tabel11.A1" office:value-type="string">
            <text:p text:style-name="P73">Rationale</text:p>
          </table:table-cell>
        </table:table-row>
        <table:table-row>
          <table:table-cell table:style-name="Tabel11.A1" office:value-type="string">
            <text:p text:style-name="P74">1</text:p>
          </table:table-cell>
          <table:table-cell table:style-name="Tabel11.A1" office:value-type="string">
            <text:p text:style-name="P74">3V3</text:p>
          </table:table-cell>
          <table:table-cell table:style-name="Tabel11.A1" office:value-type="string">
            <text:p text:style-name="P76">-</text:p>
          </table:table-cell>
          <table:table-cell table:style-name="Tabel11.A1" office:value-type="string">
            <text:p text:style-name="P76">Unconnected, as the AMS1117 provides 3V3 power.</text:p>
          </table:table-cell>
        </table:table-row>
        <table:table-row>
          <table:table-cell table:style-name="Tabel11.A1" office:value-type="string">
            <text:p text:style-name="P74">2</text:p>
          </table:table-cell>
          <table:table-cell table:style-name="Tabel11.A1" office:value-type="string">
            <text:p text:style-name="P74">EN</text:p>
          </table:table-cell>
          <table:table-cell table:style-name="Tabel11.A1" office:value-type="string">
            <text:p text:style-name="P76">-</text:p>
          </table:table-cell>
          <table:table-cell table:style-name="Tabel11.A1" office:value-type="string">
            <text:p text:style-name="P76">Default kept to the correct value.</text:p>
          </table:table-cell>
        </table:table-row>
        <table:table-row>
          <table:table-cell table:style-name="Tabel11.A1" office:value-type="string">
            <text:p text:style-name="P74">3</text:p>
          </table:table-cell>
          <table:table-cell table:style-name="Tabel11.A1" office:value-type="string">
            <text:p text:style-name="P74">SENSOR_VP</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4</text:p>
          </table:table-cell>
          <table:table-cell table:style-name="Tabel11.A1" office:value-type="string">
            <text:p text:style-name="P74">SENSOR_VN</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5</text:p>
          </table:table-cell>
          <table:table-cell table:style-name="Tabel11.A1" office:value-type="string">
            <text:p text:style-name="P74">IO34</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6</text:p>
          </table:table-cell>
          <table:table-cell table:style-name="Tabel11.A1" office:value-type="string">
            <text:p text:style-name="P74">IO35</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7</text:p>
          </table:table-cell>
          <table:table-cell table:style-name="Tabel11.A1" office:value-type="string">
            <text:p text:style-name="P74">IO32</text:p>
          </table:table-cell>
          <table:table-cell table:style-name="Tabel11.A1" office:value-type="string">
            <text:p text:style-name="P76">SPI_MISO</text:p>
          </table:table-cell>
          <table:table-cell table:style-name="Tabel11.A1" office:value-type="string">
            <text:p text:style-name="P76">SPI functions can be connected to almost any pin</text:p>
          </table:table-cell>
        </table:table-row>
        <table:table-row>
          <table:table-cell table:style-name="Tabel11.A1" office:value-type="string">
            <text:p text:style-name="P74">8</text:p>
          </table:table-cell>
          <table:table-cell table:style-name="Tabel11.A1" office:value-type="string">
            <text:p text:style-name="P74">IO33</text:p>
          </table:table-cell>
          <table:table-cell table:style-name="Tabel11.A1" office:value-type="string">
            <text:p text:style-name="P76">SPI_CS</text:p>
          </table:table-cell>
          <table:table-cell table:style-name="Tabel11.A1" office:value-type="string">
            <text:p text:style-name="P76">SPI functions can be connected to almost any pin</text:p>
          </table:table-cell>
        </table:table-row>
        <table:table-row>
          <table:table-cell table:style-name="Tabel11.A1" office:value-type="string">
            <text:p text:style-name="P74">9</text:p>
          </table:table-cell>
          <table:table-cell table:style-name="Tabel11.A1" office:value-type="string">
            <text:p text:style-name="P74">IO25</text:p>
          </table:table-cell>
          <table:table-cell table:style-name="Tabel11.A1" office:value-type="string">
            <text:p text:style-name="P76">SPI_MOSI</text:p>
          </table:table-cell>
          <table:table-cell table:style-name="Tabel11.A1" office:value-type="string">
            <text:p text:style-name="P76">SPI functions can be connected to almost any pin</text:p>
          </table:table-cell>
        </table:table-row>
        <table:table-row>
          <table:table-cell table:style-name="Tabel11.A1" office:value-type="string">
            <text:p text:style-name="P74">10</text:p>
          </table:table-cell>
          <table:table-cell table:style-name="Tabel11.A1" office:value-type="string">
            <text:p text:style-name="P74">IO26</text:p>
          </table:table-cell>
          <table:table-cell table:style-name="Tabel11.A1" office:value-type="string">
            <text:p text:style-name="P76">SPI_SCK</text:p>
          </table:table-cell>
          <table:table-cell table:style-name="Tabel11.A1" office:value-type="string">
            <text:p text:style-name="P76">SPI functions can be connected to almost any pin</text:p>
          </table:table-cell>
        </table:table-row>
        <table:table-row>
          <table:table-cell table:style-name="Tabel11.A1" office:value-type="string">
            <text:p text:style-name="P74">11</text:p>
          </table:table-cell>
          <table:table-cell table:style-name="Tabel11.A1" office:value-type="string">
            <text:p text:style-name="P74">IO27</text:p>
          </table:table-cell>
          <table:table-cell table:style-name="Tabel11.A1" office:value-type="string">
            <text:p text:style-name="P76">P2_TM1637_DIN</text:p>
          </table:table-cell>
          <table:table-cell table:style-name="Tabel11.A1" office:value-type="string">
            <text:p text:style-name="P76">TM1637 functions can be connected to almost any pin</text:p>
          </table:table-cell>
        </table:table-row>
        <table:table-row>
          <table:table-cell table:style-name="Tabel11.A1" office:value-type="string">
            <text:p text:style-name="P74">12</text:p>
          </table:table-cell>
          <table:table-cell table:style-name="Tabel11.A1" office:value-type="string">
            <text:p text:style-name="P74">IO14</text:p>
          </table:table-cell>
          <table:table-cell table:style-name="Tabel11.A1" office:value-type="string">
            <text:p text:style-name="P76">P1_TM1637_DIN</text:p>
          </table:table-cell>
          <table:table-cell table:style-name="Tabel11.A1" office:value-type="string">
            <text:p text:style-name="P76">TM1637 functions can be connected to almost any pin. </text:p>
          </table:table-cell>
        </table:table-row>
        <table:table-row>
          <table:table-cell table:style-name="Tabel11.A1" office:value-type="string">
            <text:p text:style-name="P74">13</text:p>
          </table:table-cell>
          <table:table-cell table:style-name="Tabel11.A1" office:value-type="string">
            <text:p text:style-name="P74">IO12</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14</text:p>
          </table:table-cell>
          <table:table-cell table:style-name="Tabel11.A1" office:value-type="string">
            <text:p text:style-name="P74">GND1</text:p>
          </table:table-cell>
          <table:table-cell table:style-name="Tabel11.A1" office:value-type="string">
            <text:p text:style-name="P76">GND</text:p>
          </table:table-cell>
          <table:table-cell table:style-name="Tabel11.A1" office:value-type="string">
            <text:p text:style-name="P76">All GND pins must be connected to ground.</text:p>
          </table:table-cell>
        </table:table-row>
        <table:table-row>
          <table:table-cell table:style-name="Tabel11.A1" office:value-type="string">
            <text:p text:style-name="P74">15</text:p>
          </table:table-cell>
          <table:table-cell table:style-name="Tabel11.A1" office:value-type="string">
            <text:p text:style-name="P77">IO13</text:p>
          </table:table-cell>
          <table:table-cell table:style-name="Tabel11.A1" office:value-type="string">
            <text:p text:style-name="P76">CP_TM1637_DIN</text:p>
          </table:table-cell>
          <table:table-cell table:style-name="Tabel11.A1" office:value-type="string">
            <text:p text:style-name="P76">TM1637 functions can be connected to almost any pin.</text:p>
          </table:table-cell>
        </table:table-row>
        <table:table-row>
          <table:table-cell table:style-name="Tabel11.A1" office:value-type="string">
            <text:p text:style-name="P74">16</text:p>
          </table:table-cell>
          <table:table-cell table:style-name="Tabel11.A1" office:value-type="string">
            <text:p text:style-name="P74">SD2</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17</text:p>
          </table:table-cell>
          <table:table-cell table:style-name="Tabel11.A1" office:value-type="string">
            <text:p text:style-name="P74">SD3</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18</text:p>
          </table:table-cell>
          <table:table-cell table:style-name="Tabel11.A1" office:value-type="string">
            <text:p text:style-name="P74">CMD</text:p>
          </table:table-cell>
          <table:table-cell table:style-name="Tabel11.A1" office:value-type="string">
            <text:p text:style-name="P38">-</text:p>
          </table:table-cell>
          <table:table-cell table:style-name="Tabel11.A1" office:value-type="string">
            <text:p text:style-name="P74"/>
          </table:table-cell>
        </table:table-row>
        <text:soft-page-break/>
        <table:table-row>
          <table:table-cell table:style-name="Tabel11.A1" office:value-type="string">
            <text:p text:style-name="P74">19</text:p>
          </table:table-cell>
          <table:table-cell table:style-name="Tabel11.A1" office:value-type="string">
            <text:p text:style-name="P74">EXT_5V</text:p>
          </table:table-cell>
          <table:table-cell table:style-name="Tabel11.A1" office:value-type="string">
            <text:p text:style-name="P76">5V</text:p>
          </table:table-cell>
          <table:table-cell table:style-name="Tabel11.A1" office:value-type="string">
            <text:p text:style-name="P76">5V_BOARD is used, i.e. the power that comes from the Power proto board (and is diode protected).</text:p>
          </table:table-cell>
        </table:table-row>
        <table:table-row>
          <table:table-cell table:style-name="Tabel11.A1" office:value-type="string">
            <text:p text:style-name="P74">20</text:p>
          </table:table-cell>
          <table:table-cell table:style-name="Tabel11.A1" office:value-type="string">
            <text:p text:style-name="P74">CLK</text:p>
          </table:table-cell>
          <table:table-cell table:style-name="Tabel11.A1" office:value-type="string">
            <text:p text:style-name="P38">-</text:p>
          </table:table-cell>
          <table:table-cell table:style-name="Tabel11.A1" office:value-type="string">
            <text:p text:style-name="P74"/>
          </table:table-cell>
        </table:table-row>
      </table:table>
      <table:table table:name="Tabel12" table:style-name="Tabel12">
        <table:table-column table:style-name="Tabel12.A"/>
        <table:table-column table:style-name="Tabel12.B"/>
        <table:table-column table:style-name="Tabel12.C"/>
        <table:table-column table:style-name="Tabel12.D"/>
        <table:table-row>
          <table:table-cell table:style-name="Tabel12.A1" office:value-type="string">
            <text:p text:style-name="P74">21</text:p>
          </table:table-cell>
          <table:table-cell table:style-name="Tabel12.A1" office:value-type="string">
            <text:p text:style-name="P74">SD0</text:p>
          </table:table-cell>
          <table:table-cell table:style-name="Tabel12.A1" office:value-type="string">
            <text:p text:style-name="P78">-</text:p>
          </table:table-cell>
          <table:table-cell table:style-name="Tabel12.A1" office:value-type="string">
            <text:p text:style-name="P78"/>
          </table:table-cell>
        </table:table-row>
        <table:table-row>
          <table:table-cell table:style-name="Tabel12.A1" office:value-type="string">
            <text:p text:style-name="P74">22</text:p>
          </table:table-cell>
          <table:table-cell table:style-name="Tabel12.A1" office:value-type="string">
            <text:p text:style-name="P74">SD1</text:p>
          </table:table-cell>
          <table:table-cell table:style-name="Tabel12.A1" office:value-type="string">
            <text:p text:style-name="P78">-</text:p>
          </table:table-cell>
          <table:table-cell table:style-name="Tabel12.A1" office:value-type="string">
            <text:p text:style-name="P78"/>
          </table:table-cell>
        </table:table-row>
        <table:table-row>
          <table:table-cell table:style-name="Tabel12.A1" office:value-type="string">
            <text:p text:style-name="P74">23</text:p>
          </table:table-cell>
          <table:table-cell table:style-name="Tabel12.A1" office:value-type="string">
            <text:p text:style-name="P74">IO15</text:p>
          </table:table-cell>
          <table:table-cell table:style-name="Tabel12.A1" office:value-type="string">
            <text:p text:style-name="P78">-</text:p>
          </table:table-cell>
          <table:table-cell table:style-name="Tabel12.A1" office:value-type="string">
            <text:p text:style-name="P74"/>
          </table:table-cell>
        </table:table-row>
        <table:table-row>
          <table:table-cell table:style-name="Tabel12.A1" office:value-type="string">
            <text:p text:style-name="P74">24</text:p>
          </table:table-cell>
          <table:table-cell table:style-name="Tabel12.A1" office:value-type="string">
            <text:p text:style-name="P74">IO2</text:p>
          </table:table-cell>
          <table:table-cell table:style-name="Tabel12.A1" office:value-type="string">
            <text:p text:style-name="P76">LED_STRIP_DATA_3V3</text:p>
          </table:table-cell>
          <table:table-cell table:style-name="Tabel12.A1" office:value-type="string">
            <text:p text:style-name="P76">This is a strapping pin. The LED strips keep this pin low during boot which means normal boot. </text:p>
          </table:table-cell>
        </table:table-row>
        <table:table-row>
          <table:table-cell table:style-name="Tabel12.A1" office:value-type="string">
            <text:p text:style-name="P74">25</text:p>
          </table:table-cell>
          <table:table-cell table:style-name="Tabel12.A1" office:value-type="string">
            <text:p text:style-name="P74">IO0</text:p>
          </table:table-cell>
          <table:table-cell table:style-name="Tabel12.A1" office:value-type="string">
            <text:p text:style-name="P78">-</text:p>
          </table:table-cell>
          <table:table-cell table:style-name="Tabel12.A1" office:value-type="string">
            <text:p text:style-name="P74"/>
          </table:table-cell>
        </table:table-row>
        <table:table-row>
          <table:table-cell table:style-name="Tabel12.A1" office:value-type="string">
            <text:p text:style-name="P74">26</text:p>
          </table:table-cell>
          <table:table-cell table:style-name="Tabel12.A1" office:value-type="string">
            <text:p text:style-name="P74">IO4</text:p>
          </table:table-cell>
          <table:table-cell table:style-name="Tabel12.A1" office:value-type="string">
            <text:p text:style-name="P76">PASSIVE_BUZZER_<text:line-break/>SIGNAL</text:p>
          </table:table-cell>
          <table:table-cell table:style-name="Tabel12.A1" office:value-type="string">
            <text:p text:style-name="P79">This pin can be used for the passive buzzer without any limitations.</text:p>
          </table:table-cell>
        </table:table-row>
        <table:table-row>
          <table:table-cell table:style-name="Tabel12.A1" office:value-type="string">
            <text:p text:style-name="P74">27</text:p>
          </table:table-cell>
          <table:table-cell table:style-name="Tabel12.A1" office:value-type="string">
            <text:p text:style-name="P74">IO16</text:p>
          </table:table-cell>
          <table:table-cell table:style-name="Tabel12.A1" office:value-type="string">
            <text:p text:style-name="P79">I2C_SDA_3V3</text:p>
          </table:table-cell>
          <table:table-cell table:style-name="Tabel12.A1" office:value-type="string">
            <text:p text:style-name="P79">Preferred pin for I2C SDA.</text:p>
          </table:table-cell>
        </table:table-row>
        <table:table-row>
          <table:table-cell table:style-name="Tabel12.A1" office:value-type="string">
            <text:p text:style-name="P74">28</text:p>
          </table:table-cell>
          <table:table-cell table:style-name="Tabel12.A1" office:value-type="string">
            <text:p text:style-name="P74">IO17</text:p>
          </table:table-cell>
          <table:table-cell table:style-name="Tabel12.A1" office:value-type="string">
            <text:p text:style-name="P79">I2C_SCL_3V3</text:p>
          </table:table-cell>
          <table:table-cell table:style-name="Tabel12.A1" office:value-type="string">
            <text:p text:style-name="P79">Preferred pin for I2C SCL.</text:p>
          </table:table-cell>
        </table:table-row>
        <table:table-row>
          <table:table-cell table:style-name="Tabel12.A1" office:value-type="string">
            <text:p text:style-name="P74">29</text:p>
          </table:table-cell>
          <table:table-cell table:style-name="Tabel12.A1" office:value-type="string">
            <text:p text:style-name="P74">IO5</text:p>
          </table:table-cell>
          <table:table-cell table:style-name="Tabel12.A1" office:value-type="string">
            <text:p text:style-name="P78">-</text:p>
          </table:table-cell>
          <table:table-cell table:style-name="Tabel12.A1" office:value-type="string">
            <text:p text:style-name="P74"/>
          </table:table-cell>
        </table:table-row>
        <table:table-row>
          <table:table-cell table:style-name="Tabel12.A1" office:value-type="string">
            <text:p text:style-name="P74">30</text:p>
          </table:table-cell>
          <table:table-cell table:style-name="Tabel12.A1" office:value-type="string">
            <text:p text:style-name="P74">IO18</text:p>
          </table:table-cell>
          <table:table-cell table:style-name="Tabel12.A1" office:value-type="string">
            <text:p text:style-name="P76">TM1637_SHARED_CLK</text:p>
          </table:table-cell>
          <table:table-cell table:style-name="Tabel12.A1" office:value-type="string">
            <text:p text:style-name="P76">TM1637 functions can be connected to almost any pin</text:p>
          </table:table-cell>
        </table:table-row>
      </table:table>
      <table:table table:name="Tabel13" table:style-name="Tabel13">
        <table:table-column table:style-name="Tabel13.A"/>
        <table:table-column table:style-name="Tabel13.B"/>
        <table:table-column table:style-name="Tabel13.C"/>
        <table:table-column table:style-name="Tabel13.D"/>
        <table:table-row>
          <table:table-cell table:style-name="Tabel13.A1" office:value-type="string">
            <text:p text:style-name="P74">31</text:p>
          </table:table-cell>
          <table:table-cell table:style-name="Tabel13.A1" office:value-type="string">
            <text:p text:style-name="P74">IO19</text:p>
          </table:table-cell>
          <table:table-cell table:style-name="Tabel13.A1" office:value-type="string">
            <text:p text:style-name="P79">I2S_MAX98357</text:p>
          </table:table-cell>
          <table:table-cell table:style-name="Tabel13.A1" office:value-type="string">
            <text:p text:style-name="P79">This pin can be used for I2S without any limitations.</text:p>
          </table:table-cell>
        </table:table-row>
        <table:table-row>
          <table:table-cell table:style-name="Tabel13.A1" office:value-type="string">
            <text:p text:style-name="P74">32</text:p>
          </table:table-cell>
          <table:table-cell table:style-name="Tabel13.A1" office:value-type="string">
            <text:p text:style-name="P74">GND2</text:p>
          </table:table-cell>
          <table:table-cell table:style-name="Tabel13.A1" office:value-type="string">
            <text:p text:style-name="P79">GND</text:p>
          </table:table-cell>
          <table:table-cell table:style-name="Tabel13.A1" office:value-type="string">
            <text:p text:style-name="P76">All GND pins must be connected to ground.</text:p>
          </table:table-cell>
        </table:table-row>
        <table:table-row>
          <table:table-cell table:style-name="Tabel13.A1" office:value-type="string">
            <text:p text:style-name="P74">33</text:p>
          </table:table-cell>
          <table:table-cell table:style-name="Tabel13.A1" office:value-type="string">
            <text:p text:style-name="P74">IO21</text:p>
          </table:table-cell>
          <table:table-cell table:style-name="Tabel13.A1" office:value-type="string">
            <text:p text:style-name="P79">I2S_INMP441_DIN</text:p>
          </table:table-cell>
          <table:table-cell table:style-name="Tabel13.A1" office:value-type="string">
            <text:p text:style-name="P79">This pin can be used for I2S without any limitations.</text:p>
          </table:table-cell>
        </table:table-row>
        <table:table-row>
          <table:table-cell table:style-name="Tabel13.A1" office:value-type="string">
            <text:p text:style-name="P74">34</text:p>
          </table:table-cell>
          <table:table-cell table:style-name="Tabel13.A1" office:value-type="string">
            <text:p text:style-name="P74">RXD0</text:p>
          </table:table-cell>
          <table:table-cell table:style-name="Tabel13.A1" office:value-type="string">
            <text:p text:style-name="P78">-</text:p>
          </table:table-cell>
          <table:table-cell table:style-name="Tabel13.A1" office:value-type="string">
            <text:p text:style-name="P74"/>
          </table:table-cell>
        </table:table-row>
        <table:table-row>
          <table:table-cell table:style-name="Tabel13.A1" office:value-type="string">
            <text:p text:style-name="P74">35</text:p>
          </table:table-cell>
          <table:table-cell table:style-name="Tabel13.A1" office:value-type="string">
            <text:p text:style-name="P74">TXD0</text:p>
          </table:table-cell>
          <table:table-cell table:style-name="Tabel13.A1" office:value-type="string">
            <text:p text:style-name="P78">-</text:p>
          </table:table-cell>
          <table:table-cell table:style-name="Tabel13.A1" office:value-type="string">
            <text:p text:style-name="P74"/>
          </table:table-cell>
        </table:table-row>
        <table:table-row>
          <table:table-cell table:style-name="Tabel13.A1" office:value-type="string">
            <text:p text:style-name="P74">36</text:p>
          </table:table-cell>
          <table:table-cell table:style-name="Tabel13.A1" office:value-type="string">
            <text:p text:style-name="P74">IO22</text:p>
          </table:table-cell>
          <table:table-cell table:style-name="Tabel13.A1" office:value-type="string">
            <text:p text:style-name="P79">I2S_BCLK</text:p>
          </table:table-cell>
          <table:table-cell table:style-name="Tabel13.A1" office:value-type="string">
            <text:p text:style-name="P79">This pin can be used for I2S without any limitations.</text:p>
          </table:table-cell>
        </table:table-row>
        <table:table-row>
          <table:table-cell table:style-name="Tabel13.A1" office:value-type="string">
            <text:p text:style-name="P74">37</text:p>
          </table:table-cell>
          <table:table-cell table:style-name="Tabel13.A1" office:value-type="string">
            <text:p text:style-name="P74">IO23</text:p>
          </table:table-cell>
          <table:table-cell table:style-name="Tabel13.A1" office:value-type="string">
            <text:p text:style-name="P79">I2S_WS_LRCLK</text:p>
          </table:table-cell>
          <table:table-cell table:style-name="Tabel13.A1" office:value-type="string">
            <text:p text:style-name="P79">This pin can be used for I2S without any limitations.</text:p>
          </table:table-cell>
        </table:table-row>
        <table:table-row>
          <table:table-cell table:style-name="Tabel13.A1" office:value-type="string">
            <text:p text:style-name="P74">38</text:p>
          </table:table-cell>
          <table:table-cell table:style-name="Tabel13.A1" office:value-type="string">
            <text:p text:style-name="P74">GND3</text:p>
          </table:table-cell>
          <table:table-cell table:style-name="Tabel13.A1" office:value-type="string">
            <text:p text:style-name="P79">GND</text:p>
          </table:table-cell>
          <table:table-cell table:style-name="Tabel13.A1" office:value-type="string">
            <text:p text:style-name="P76">All GND pins must be connected to ground.</text:p>
          </table:table-cell>
        </table:table-row>
      </table:table>
      <text:p text:style-name="P80"/>
      <text:p text:style-name="P81">Note that I2S bus is shared. This means that the I2S frequency/sample rate is used for both the microphone and amplifier, which will be set to 16 kHz and 16 bit sampling.</text:p>
      <text:p text:style-name="P81"/>
      <text:h text:style-name="P82" text:outline-level="3">Edge Pads</text:h>
      <text:p text:style-name="P83"><draw:frame draw:style-name="fr2" draw:name="Afbeelding8" text:anchor-type="char" svg:width="17.59cm" svg:height="20.392cm" draw:z-index="14"><draw:image xlink:href="Pictures/10000001000002EB000003629D50D39E.png" xlink:type="simple" xlink:show="embed" xlink:actuate="onLoad" draw:mime-type="image/png"/></draw:frame></text:p>
      <text:p text:style-name="Text_20_body"/>
      <text:p text:style-name="P84">On both sides of the ESP32 proto board are edge pads, 27 in one row. Both the top and bottom side can be used, giving 27 * 2 * 2 = 108 pads.</text:p>
      <text:p text:style-name="P85">On the left side mostly 3V3, 5V and GND is used. Some exceptions are:</text:p>
      <text:p text:style-name="P85">- I2C: Since the converter is on that side of the proto board and the other side is pretty much filled.</text:p>
      <text:p text:style-name="P85">- LED Strip data: The LED strip signal is important and LED strip 1 begins left of the proto board.</text:p>
      <text:p text:style-name="P85">- Note that several pins from the left top side are blocked by the MicroSD Card Reader.</text:p>
      <text:p text:style-name="P85">On the right side, mostly signals are used, and GND that serves as wires to twist around the signal on the other side on the top side of the edge pad. Although there are 108 pads available, the signal pins have each one pad, both for the internal routing (typically to the ESP32), and external (to the component in the enclosure top).</text:p>
      <text:p text:style-name="P85">For various signals and due to long wires, resistors are used to keep the signal clean.</text:p>
      <text:p text:style-name="P85">For most signals on this side, the location is to make sure wiring distance is minimal.</text:p>
      <text:p text:style-name="P85">I2S clock pins are doubled to split between INMP4441 Microphone and MAX89357 amplifier.</text:p>
      <text:p text:style-name="P85"/>
      <text:p text:style-name="P85"/>
      <text:h text:style-name="P86" text:outline-level="3">Players <text:span text:style-name="T15">&amp; Central Panel</text:span></text:h>
      <text:p text:style-name="P87"><draw:frame draw:style-name="fr10" draw:name="Afbeelding9" text:anchor-type="char" svg:width="14.208cm" svg:height="20.556cm" draw:z-index="16"><draw:image xlink:href="Pictures/10000001000002AD000003DFE5EA9A87.png" xlink:type="simple" xlink:show="embed" xlink:actuate="onLoad" draw:mime-type="image/png"/></draw:frame></text:p>
      <text:p text:style-name="P71"><text:soft-page-break/>This page consists of both the player controls/feedback and central panel visual feedback with the exception of the 1602 LCD Display which is handled in the I2C section.</text:p>
      <text:p text:style-name="P71">The following items are present:</text:p>
      <text:list text:style-name="L3">
        <text:list-item>
          <text:p text:style-name="P88">Central Panel LEDs: 3 LEDs with functions Select, Play/Pause and Settings, although these function can be changed during the project when necessary. Note that the limiting resistors are placed on the I2C schematics page, as they are coupled to the MCP23017.</text:p>
        </text:list-item>
        <text:list-item>
          <text:p text:style-name="P88">Central Panel: TM1637 Seven Segments display. All displays are 0.56” instead of the default 0.36” to allow for better reading during arcade games. This display can show 4 digits and has a colon in the middle so it can show time.</text:p>
        </text:list-item>
        <text:list-item>
          <text:p text:style-name="P88">Player 1 and Player 2 LED: this is a 3mm led that can be used for notifications</text:p>
        </text:list-item>
        <text:list-item>
          <text:p text:style-name="P88">Player 1 and Player 2 TM1637 Seven Segments display. This display has 6 digits so it can show higher value scores. It does not have a colon so a time would be represented as 12.34 instead of 12:34.</text:p>
        </text:list-item>
        <text:list-item>
          <text:p text:style-name="P88">Player 1 and Player 2 joysticks. These are Atari 2600 style joysticks with the micro switches for Up, Down, Left, Right, (Fire) Button. They need pullup resistors which are placed on the I2C schematics page. Software advice: likely software switch debouncing is not necessary, <text:span text:style-name="T16">except for menu navigation possibly as the debounce time is 2-3 ms which can be too much for short movements. The joysticks are connected on the enclosure via DB9 connector mounted plugs.</text:span></text:p>
        </text:list-item>
        <text:list-item>
          <text:p text:style-name="P89">A system button which is used to activate the menu during a running app. E.g. in games, high likely both joysticks are active simultaneously and creating a kind of ‘tricky’ joystick combination is not intuitive and can lead to unexpected user experiences.</text:p>
        </text:list-item>
      </text:list>
      <text:p text:style-name="P71"/>
      <text:h text:style-name="P90" text:outline-level="2">PCB</text:h>
      <text:h text:style-name="Heading_20_3" text:outline-level="3">Overview</text:h>
      <text:p text:style-name="P91"><draw:frame draw:style-name="fr2" draw:name="Afbeelding10" text:anchor-type="char" svg:width="17.59cm" svg:height="4.717cm" draw:z-index="6"><draw:image xlink:href="Pictures/1000000100000622000001A5E9EC71F6.png" xlink:type="simple" xlink:show="embed" xlink:actuate="onLoad" draw:mime-type="image/png"/></draw:frame>Above an overview is shown. In the top row there are the components which are visible typically for the players.</text:p>
      <text:p text:style-name="P91">On the outmost left and right side there are five led strip begin/end headers depicting the LED strips.</text:p>
      <text:p text:style-name="P91">On the right <text:s/>inwards is the Power proto board. On the left side is the ESP32 proto board.</text:p>
      <text:p text:style-name="P91">Conventions:</text:p>
      <text:list text:style-name="L4">
        <text:list-item>
          <text:p text:style-name="P92">Since handsoldering and manual routing wires mean there are no layer restrictions, layers are used to be able to place wires over each other as will. </text:p>
        </text:list-item>
        <text:list-item>
          <text:p text:style-name="P92">For the ESP32 proto board, most wires have been laid around the board, even internal ones, to not clutter up the space.</text:p>
        </text:list-item>
        <text:list-item>
          <text:p text:style-name="P92">Thicker wires are 18-22AWG, otherwise 26AWG is assumed.</text:p>
        </text:list-item>
        <text:list-item>
          <text:p text:style-name="P92">The locations and dimensions are not fully according reality but show an indication.</text:p>
        </text:list-item>
      </text:list>
      <text:p text:style-name="P91">In the next paragraphs a few closeups of specific areas are shown.</text:p>
      <text:h text:style-name="P93" text:outline-level="3"><text:soft-page-break/>Power</text:h>
      <text:p text:style-name="P91"><draw:frame draw:style-name="fr3" draw:name="Afbeelding11" text:anchor-type="char" svg:width="4.507cm" svg:height="4.473cm" draw:z-index="7"><draw:image xlink:href="Pictures/100000010000018B000001881E7C0331.png" xlink:type="simple" xlink:show="embed" xlink:actuate="onLoad" draw:mime-type="image/png"/></draw:frame>Above, the power (IEC320) plugin is shown as a 3 pin header. The 7 pin header is the 5V/10A adapter which has 220-240V Left/Right, GND pin, and two V+ and V- supplying 5V.</text:p>
      <text:h text:style-name="P93" text:outline-level="3"><text:soft-page-break/>Power Proto Board</text:h>
      <text:p text:style-name="P94"><draw:frame draw:style-name="fr10" draw:name="Afbeelding12" text:anchor-type="char" svg:width="13.945cm" svg:height="18.443cm" draw:z-index="8"><draw:image xlink:href="Pictures/100000010000020F000002B91C4C51E6.png" xlink:type="simple" xlink:show="embed" xlink:actuate="onLoad" draw:mime-type="image/png"/></draw:frame></text:p>
      <text:p text:style-name="P91">Above the Power proto board is shown. The wires in the top left are for the power adapter. Instead of the edge pads, probably a big copper strip will be solderd over each side giving more stability. These provide power for the LED strips. On the right you can see the connection from that half of the LED strips from the power proto board.</text:p>
      <text:p text:style-name="P91"/>
      <text:h text:style-name="P95" text:outline-level="2">ESP32 Proto Board</text:h>
      <text:p text:style-name="P91"><draw:frame draw:style-name="fr2" draw:name="Afbeelding13" text:anchor-type="char" svg:width="17.59cm" svg:height="11.158cm" draw:z-index="17"><draw:image xlink:href="Pictures/10000001000004C400000306C0DBED44.png" xlink:type="simple" xlink:show="embed" xlink:actuate="onLoad" draw:mime-type="image/png"/></draw:frame></text:p>
      <text:p text:style-name="P96">The picture above shows the ESP32 Proto Board.</text:p>
      <text:list text:style-name="L5">
        <text:list-item>
          <text:p text:style-name="P97">On the sides the edge pads are shown, both used on the top and bottom side for more signals.</text:p>
        </text:list-item>
        <text:list-item>
          <text:p text:style-name="P97">In the lower left the AMS1117 regularor is placed together with some capacitors.</text:p>
        </text:list-item>
        <text:list-item>
          <text:p text:style-name="P97">Right of it, pullup and line resistors are used <text:s/>and connected to the MSP23017 which is depicted as a 1x8 and 2x8 pin header. </text:p>
        </text:list-item>
        <text:list-item>
          <text:p text:style-name="P97">Above the right pullup resistors is the I2S amplifier module. The two gate terminal block shows the speaker in/out from that amplifier module.</text:p>
        </text:list-item>
        <text:list-item>
          <text:p text:style-name="P97">Left above the amplifier module is the ESP32 development kit WROOM C1. It is located in this way to make room for the micro USB cable in case needed and on the left to leave space for the antenna area.</text:p>
        </text:list-item>
        <text:list-item>
          <text:p text:style-name="P97">On the left of the ESP32 is the 74HC125N level shifter for the LED strips signal. </text:p>
        </text:list-item>
        <text:list-item>
          <text:p text:style-name="P97">Lower between the ESP32 and 74HC125N, the level shifter for I2C is placed. </text:p>
        </text:list-item>
      </text:list>
      <text:p text:style-name="P91"/>
      <text:h text:style-name="Heading_20_2" text:outline-level="2"><text:soft-page-break/>Bill of Materials</text:h>
      <text:list text:style-name="L6">
        <text:list-item>
          <text:p text:style-name="P98">ESP32 <text:span text:style-name="T17">WROOM DevKit C1</text:span></text:p>
        </text:list-item>
        <text:list-item>
          <text:p text:style-name="P98"><text:span text:style-name="T17">2.5m of </text:span>144 leds/m WS2812B <text:span text:style-name="T17">LED strips cut in 5 times 50 cm, resulting in 250 cm having 72 * 5 = 360 LEDs.</text:span></text:p>
        </text:list-item>
        <text:list-item>
          <text:p text:style-name="P99">5 x 50 cm LED strip holders</text:p>
        </text:list-item>
        <text:list-item>
          <text:p text:style-name="P99">2 x 6 digit seven segments display, 0.56”, TM1637 controlled.</text:p>
        </text:list-item>
        <text:list-item>
          <text:p text:style-name="P99">1 x 4 digit seven segments display, 0.56”, TM1637 controlled.</text:p>
        </text:list-item>
        <text:list-item>
          <text:p text:style-name="P98">1602 LCD Display, <text:span text:style-name="T17">I2C </text:span>controlled by I2C</text:p>
        </text:list-item>
        <text:list-item>
          <text:p text:style-name="P99">I2C Level Shifter</text:p>
        </text:list-item>
        <text:list-item>
          <text:p text:style-name="P99">MCP23017 GPIO Expander</text:p>
        </text:list-item>
        <text:list-item>
          <text:p text:style-name="P99">MAX98357 Amplifier module.</text:p>
        </text:list-item>
        <text:list-item>
          <text:p text:style-name="P99">4W 4ohm 40mm speaker.</text:p>
        </text:list-item>
        <text:list-item>
          <text:p text:style-name="P99">INMP441 Microphone module.</text:p>
        </text:list-item>
        <text:list-item>
          <text:p text:style-name="P99">2 x Atari 2600 style joysticks using DB9 connectors</text:p>
        </text:list-item>
        <text:list-item>
          <text:p text:style-name="P99">5 x 3mm LEDs, color to be decided.</text:p>
        </text:list-item>
        <text:list-item>
          <text:p text:style-name="P99">FC4 Protoboard 8x12 cm</text:p>
        </text:list-item>
        <text:list-item>
          <text:p text:style-name="P99">FC4 Protoboard 2x8 cm</text:p>
        </text:list-item>
        <text:list-item>
          <text:p text:style-name="P99">Small electronic components, like resistors, capacitors, diodes, small transistors etc.</text:p>
        </text:list-item>
        <text:list-item>
          <text:p text:style-name="P99">Tie wraps, cable markers etc.</text:p>
        </text:list-item>
        <text:list-item>
          <text:p text:style-name="P99">Wire (18-22AWG and 26AWG)</text:p>
        </text:list-item>
        <text:list-item>
          <text:p text:style-name="P99">Passive Buzzer.</text:p>
        </text:list-item>
        <text:list-item>
          <text:p text:style-name="P100">5V adapter, <text:span text:style-name="T17">10A</text:span></text:p>
        </text:list-item>
        <text:list-item>
          <text:p text:style-name="P99">IEC320 plug.</text:p>
        </text:list-item>
        <text:list-item>
          <text:p text:style-name="P99">Wooden enclosure using MDF </text:p>
        </text:list-item>
        <text:list-item>
          <text:p text:style-name="P99">Wooden strengthening blocks/ribs.</text:p>
        </text:list-item>
      </text:list>
      <text:list text:style-name="L7">
        <text:list-item>
          <text:list>
            <text:list-header>
              <text:h text:style-name="P101" text:outline-level="2"/>
            </text:list-header>
          </text:list>
        </text:list-item>
      </text:list>
      <text:h text:style-name="P102" text:outline-level="1">Enclosure</text:h>
      <text:h text:style-name="P103" text:outline-level="2">Introduction</text:h>
      <text:p text:style-name="P104">The enclosure will look like the front page which is copied here:</text:p>
      <text:p text:style-name="P104"><draw:frame draw:style-name="fr1" draw:name="Afbeelding3 Kopiëren 1 Kopiëren 1" text:anchor-type="char" svg:x="0cm" svg:y="-0.101cm" svg:width="17.59cm" svg:height="5.463cm" draw:z-index="9"><draw:image xlink:href="Pictures/10000001000003BC0000012983F0B177.png" xlink:type="simple" xlink:show="embed" xlink:actuate="onLoad" draw:mime-type="image/png"/></draw:frame></text:p>
      <text:p text:style-name="P104">The picture below shows the back side:</text:p>
      <text:p text:style-name="P104"><draw:frame draw:style-name="fr2" draw:name="Afbeelding14" text:anchor-type="char" svg:width="17.59cm" svg:height="2.97cm" draw:z-index="10"><draw:image xlink:href="Pictures/100000010000061500000107F3A2B20F.png" xlink:type="simple" xlink:show="embed" xlink:actuate="onLoad" draw:mime-type="image/png"/></draw:frame></text:p>
      <text:p text:style-name="P104">Note that the switch/LED/power plugin will be replaced by a ‘all in one’ IEC320 connector with switch and light.</text:p>
      <text:p text:style-name="P105">On the inside, below the LED strips a wooden MDF plate will be assembled, which connects to the proto boards and adapter. Reinforcement ribs and bridges will be used. See pictures below.</text:p>
      <text:p text:style-name="P106"><draw:frame draw:style-name="fr10" draw:name="Afbeelding17" text:anchor-type="char" svg:width="16.387cm" svg:height="5.994cm" draw:z-index="12"><draw:image xlink:href="Pictures/1000000100000562000001F8DCF5277A.png" xlink:type="simple" xlink:show="embed" xlink:actuate="onLoad" draw:mime-type="image/png"/></draw:frame><text:soft-page-break/></text:p>
      <text:p text:style-name="P106"><draw:frame draw:style-name="fr3" draw:name="Afbeelding15" text:anchor-type="char" svg:width="9.44cm" svg:height="5.121cm" draw:z-index="11"><draw:image xlink:href="Pictures/10000001000005A7000003117CA2ACFE.png" xlink:type="simple" xlink:show="embed" xlink:actuate="onLoad" draw:mime-type="image/png"/></draw:frame><draw:frame draw:style-name="fr2" draw:name="Afbeelding16" text:anchor-type="char" svg:width="17.59cm" svg:height="7.726cm" draw:z-index="13"><draw:image xlink:href="Pictures/10000001000005CA0000028B9A901D31.png" xlink:type="simple" xlink:show="embed" xlink:actuate="onLoad" draw:mime-type="image/png"/></draw:frame></text:p>
      <text:p text:style-name="P107">Note in these pictures, the proto board/adapter have not been connected to the top plate but still to the bottom plate.</text:p>
      <text:h text:style-name="P103" text:outline-level="2">Construction Material</text:h>
      <text:p text:style-name="P104">No 3D printing is used although it would be the esthetically best solution, because:</text:p>
      <text:list text:style-name="L8">
        <text:list-item>
          <text:p text:style-name="P108">The length of the enclosure is more than 50 cm, meaning not many printers can handle this.</text:p>
        </text:list-item>
        <text:list-item>
          <text:p text:style-name="P108">The size of th enclosure would make it expensive.</text:p>
        </text:list-item>
        <text:list-item>
          <text:p text:style-name="P108">Out of scope for this project.</text:p>
        </text:list-item>
      </text:list>
      <text:p text:style-name="P104">Therefore, wood is used. To reduce the costs, MDF will be used for most ‘platework’ and <text:span text:style-name="T18">glue/corner</text:span> blocks and <text:span text:style-name="T18">reinforcement </text:span>ribs will be made from a wooden <text:span text:style-name="T18">strip.</text:span></text:p>
      <text:h text:style-name="P109" text:outline-level="2"><text:soft-page-break/>Enclosure Opening</text:h>
      <text:p text:style-name="P105">Since the board probably needs to be ropened for fixes/adaptations initially and creating a sort of esthetically opening on the side is hard, the entire bottom plate will be fixed with magnets. By holes in the bottom fingers can be used to pull the bottom plate by overcoming the magnetic strength.</text:p>
      <text:p text:style-name="P105">To prevent the wires from being pulled, both proto boards and the adapter will be attached to the top instead of attached to the bottom plate. Tie wraps and/or other means will be used to fix them.</text:p>
      <text:h text:style-name="P110" text:outline-level="2">Properties</text:h>
      <text:list text:style-name="L9">
        <text:list-item>
          <text:p text:style-name="P111"><text:span text:style-name="T19">Dimensions: </text:span><text:span text:style-name="T20">approximately 530 x 180 x 70 mm</text:span></text:p>
        </text:list-item>
        <text:list-item>
          <text:p text:style-name="P112">Weight: unknown</text:p>
        </text:list-item>
      </text:list>
      <text:h text:style-name="P113" text:outline-level="2">Components</text:h>
      <text:p text:style-name="P114">The following material is used:</text:p>
      <text:list text:style-name="L10">
        <text:list-item>
          <text:p text:style-name="P115"><text:span text:style-name="T21">MDF wood</text:span><text:span text:style-name="T22">en plate,</text:span><text:span text:style-name="T21">122 x 61 cm, 4 mm</text:span></text:p>
        </text:list-item>
      </text:list>
      <text:p text:style-name="P114"><text:tab/><text:a xlink:type="simple" xlink:href="https://www.karwei.nl/assortiment/mdf-plaat-122-x-61-cm-4-mm/p/B340344" text:style-name="Internet_20_link" text:visited-style-name="Visited_20_Internet_20_Link">https://www.karwei.nl/assortiment/mdf-plaat-122-x-61-cm-4-mm/p/B340344</text:a><text:line-break/><text:tab/><text:span text:style-name="T23">Rationale: normal wood is too heavy, 4 mm is more than enough.</text:span></text:p>
      <text:list text:continue-numbering="true" text:style-name="L10">
        <text:list-item>
          <text:p text:style-name="P116">Wooden strip/batten, spruce, planed (smooth), 12 x 12 mm, 210 cm<text:line-break/><text:a xlink:type="simple" xlink:href="https://www.gamma.nl/assortiment/lat-vuren-geschaafd-12x12-mm-210-cm/p/B159292" text:style-name="Internet_20_link" text:visited-style-name="Visited_20_Internet_20_Link">https://www.gamma.nl/assortiment/lat-vuren-geschaafd-12x12-mm-210-cm/p/B159292</text:a> <text:line-break/>Spruce (Dutch: Vuren) is high quality wood but not too hard so easy to saw, 12 x 12 mm is a practical size for ribs/corner blocks without becoming too big. Being planed smooth (Dutch: Geschaafd) is a must.</text:p>
        </text:list-item>
        <text:list-item>
          <text:p text:style-name="P116">Wooden glue (D2/D3): The need of screws or nails is not necessary.</text:p>
        </text:list-item>
        <text:list-item>
          <text:p text:style-name="P116">Magnets: to keep the bottom plate attached to the enclosure. </text:p>
        </text:list-item>
        <text:list-item>
          <text:p text:style-name="P116">Paint (optionally).</text:p>
        </text:list-item>
      </text:list>
      <text:p text:style-name="P117"/>
      <text:p text:style-name="P118"/>
      <table:table table:name="Tabel5" table:style-name="Tabel5">
        <table:table-column table:style-name="Tabel5.A"/>
        <table:table-column table:style-name="Tabel5.B" table:number-columns-repeated="3"/>
        <table:table-column table:style-name="Tabel5.E"/>
        <table:table-row>
          <table:table-cell table:style-name="Tabel5.A1" office:value-type="string">
            <text:p text:style-name="P119">MDF Plate</text:p>
          </table:table-cell>
          <table:table-cell table:style-name="Tabel5.A1" office:value-type="string">
            <text:p text:style-name="P120"/>
          </table:table-cell>
          <table:table-cell table:style-name="Tabel5.A1" office:value-type="string">
            <text:p text:style-name="P120"/>
          </table:table-cell>
          <table:table-cell table:style-name="Tabel5.A1" office:value-type="string">
            <text:p text:style-name="P120"/>
          </table:table-cell>
          <table:table-cell table:style-name="Tabel5.A1" office:value-type="string">
            <text:p text:style-name="P120"/>
          </table:table-cell>
        </table:table-row>
        <table:table-row>
          <table:table-cell table:style-name="Tabel5.A1" office:value-type="string">
            <text:p text:style-name="P119">Item</text:p>
          </table:table-cell>
          <table:table-cell table:style-name="Tabel5.A1" office:value-type="string">
            <text:p text:style-name="P119">Amount</text:p>
          </table:table-cell>
          <table:table-cell table:style-name="Tabel5.A1" office:value-type="string">
            <text:p text:style-name="P119">Width</text:p>
          </table:table-cell>
          <table:table-cell table:style-name="Tabel5.A1" office:value-type="string">
            <text:p text:style-name="P119">Length</text:p>
          </table:table-cell>
          <table:table-cell table:style-name="Tabel5.A1" office:value-type="string">
            <text:p text:style-name="P119">Area</text:p>
          </table:table-cell>
        </table:table-row>
        <table:table-row>
          <table:table-cell table:style-name="Tabel5.A3" office:value-type="string">
            <text:p text:style-name="P121">Front/back plate</text:p>
          </table:table-cell>
          <table:table-cell table:style-name="Tabel5.B3" office:value-type="string">
            <text:p text:style-name="P122">2</text:p>
          </table:table-cell>
          <table:table-cell table:style-name="Tabel5.C3" office:value-type="string">
            <text:p text:style-name="P122">640</text:p>
          </table:table-cell>
          <table:table-cell table:style-name="Tabel5.D3" office:value-type="string">
            <text:p text:style-name="P122">120</text:p>
          </table:table-cell>
          <table:table-cell table:style-name="Tabel5.E3" office:value-type="string">
            <text:p text:style-name="P122">153,600</text:p>
          </table:table-cell>
        </table:table-row>
        <table:table-row>
          <table:table-cell table:style-name="Tabel5.A4" office:value-type="string">
            <text:p text:style-name="P121">Long vertical plates</text:p>
          </table:table-cell>
          <table:table-cell table:style-name="Tabel5.B4" office:value-type="string">
            <text:p text:style-name="P122">2</text:p>
          </table:table-cell>
          <table:table-cell table:style-name="Tabel5.C4" office:value-type="string">
            <text:p text:style-name="P122">640</text:p>
          </table:table-cell>
          <table:table-cell table:style-name="Tabel5.D4" office:value-type="string">
            <text:p text:style-name="P122">70</text:p>
          </table:table-cell>
          <table:table-cell table:style-name="Tabel5.E4" office:value-type="string">
            <text:p text:style-name="P122">89,600</text:p>
          </table:table-cell>
        </table:table-row>
        <table:table-row>
          <table:table-cell table:style-name="Tabel5.A5" office:value-type="string">
            <text:p text:style-name="P121">Short vertical plates</text:p>
          </table:table-cell>
          <table:table-cell table:style-name="Tabel5.B5" office:value-type="string">
            <text:p text:style-name="P122">4</text:p>
          </table:table-cell>
          <table:table-cell table:style-name="Tabel5.C5" office:value-type="string">
            <text:p text:style-name="P122">120</text:p>
          </table:table-cell>
          <table:table-cell table:style-name="Tabel5.D5" office:value-type="string">
            <text:p text:style-name="P122">70</text:p>
          </table:table-cell>
          <table:table-cell table:style-name="Tabel5.E5" office:value-type="string">
            <text:p text:style-name="P122">33,600</text:p>
          </table:table-cell>
        </table:table-row>
        <table:table-row>
          <table:table-cell table:style-name="Tabel5.A6" office:value-type="string">
            <text:p text:style-name="P121">Strengthening blocks</text:p>
          </table:table-cell>
          <table:table-cell table:style-name="Tabel5.B6" office:value-type="string">
            <text:p text:style-name="P122">20</text:p>
          </table:table-cell>
          <table:table-cell table:style-name="Tabel5.C6" office:value-type="string">
            <text:p text:style-name="P122">15</text:p>
          </table:table-cell>
          <table:table-cell table:style-name="Tabel5.D6" office:value-type="string">
            <text:p text:style-name="P122">15</text:p>
          </table:table-cell>
          <table:table-cell table:style-name="Tabel5.E6" office:value-type="string">
            <text:p text:style-name="P122">4,500</text:p>
          </table:table-cell>
        </table:table-row>
        <table:table-row>
          <table:table-cell table:style-name="Tabel5.A7" office:value-type="string">
            <text:p text:style-name="P119">Total</text:p>
          </table:table-cell>
          <table:table-cell table:style-name="Tabel5.B7" office:value-type="string">
            <text:p text:style-name="P120"/>
          </table:table-cell>
          <table:table-cell table:style-name="Tabel5.C7" office:value-type="string">
            <text:p text:style-name="P120"/>
          </table:table-cell>
          <table:table-cell table:style-name="Tabel5.D7" office:value-type="string">
            <text:p text:style-name="P120"/>
          </table:table-cell>
          <table:table-cell table:style-name="Tabel5.E7" office:value-type="string">
            <text:p text:style-name="P123">281,300</text:p>
          </table:table-cell>
        </table:table-row>
        <table:table-row>
          <table:table-cell table:style-name="Tabel5.A8" office:value-type="string">
            <text:p text:style-name="P120"/>
          </table:table-cell>
          <table:table-cell table:style-name="Tabel5.B8" office:value-type="string">
            <text:p text:style-name="P120"/>
          </table:table-cell>
          <table:table-cell table:style-name="Tabel5.C8" office:value-type="string">
            <text:p text:style-name="P120"/>
          </table:table-cell>
          <table:table-cell table:style-name="Tabel5.D8" office:value-type="string">
            <text:p text:style-name="P120"/>
          </table:table-cell>
          <table:table-cell table:style-name="Tabel5.E8" office:value-type="string">
            <text:p text:style-name="P120"/>
          </table:table-cell>
        </table:table-row>
        <table:table-row>
          <table:table-cell table:style-name="Tabel5.A9" office:value-type="string">
            <text:p text:style-name="P119">MDF Plate</text:p>
          </table:table-cell>
          <table:table-cell table:style-name="Tabel5.B9" office:value-type="string">
            <text:p text:style-name="P122">1</text:p>
          </table:table-cell>
          <table:table-cell table:style-name="Tabel5.C9" office:value-type="string">
            <text:p text:style-name="P122">1,220</text:p>
          </table:table-cell>
          <table:table-cell table:style-name="Tabel5.D9" office:value-type="string">
            <text:p text:style-name="P122">610</text:p>
          </table:table-cell>
          <table:table-cell table:style-name="Tabel5.E9" office:value-type="string">
            <text:p text:style-name="P123">409,000</text:p>
          </table:table-cell>
        </table:table-row>
        <table:table-row>
          <table:table-cell table:style-name="Tabel5.A10" office:value-type="string">
            <text:p text:style-name="P119">Left</text:p>
          </table:table-cell>
          <table:table-cell table:style-name="Tabel5.B10" office:value-type="string">
            <text:p text:style-name="P120"/>
          </table:table-cell>
          <table:table-cell table:style-name="Tabel5.C10" office:value-type="string">
            <text:p text:style-name="P120"/>
          </table:table-cell>
          <table:table-cell table:style-name="Tabel5.D10" office:value-type="string">
            <text:p text:style-name="P120"/>
          </table:table-cell>
          <table:table-cell table:style-name="Tabel5.E10" office:value-type="string">
            <text:p text:style-name="P123">127,700<text:soft-page-break/></text:p>
          </table:table-cell>
        </table:table-row>
        <table:table-row>
          <table:table-cell table:style-name="Tabel5.A11" office:value-type="string">
            <text:p text:style-name="P119">Left (%)</text:p>
          </table:table-cell>
          <table:table-cell table:style-name="Tabel5.B11" office:value-type="string">
            <text:p text:style-name="P120"/>
          </table:table-cell>
          <table:table-cell table:style-name="Tabel5.C11" office:value-type="string">
            <text:p text:style-name="P120"/>
          </table:table-cell>
          <table:table-cell table:style-name="Tabel5.D11" office:value-type="string">
            <text:p text:style-name="P120"/>
          </table:table-cell>
          <table:table-cell table:style-name="Tabel5.E11" office:value-type="string">
            <text:p text:style-name="P123">31.2%</text:p>
          </table:table-cell>
        </table:table-row>
      </table:table>
      <text:p text:style-name="P124"><text:line-break/><text:line-break/><text:line-break/><text:line-break/></text:p>
      <text:h text:style-name="P15" text:outline-level="1">Applications</text:h>
      <text:h text:style-name="P125" text:outline-level="2">Introduction</text:h>
      <text:p text:style-name="P126">There are various types:</text:p>
      <text:list text:style-name="L11">
        <text:list-item>
          <text:p text:style-name="P127">Games</text:p>
        </text:list-item>
        <text:list-item>
          <text:p text:style-name="P127">Utilities</text:p>
        </text:list-item>
        <text:list-item>
          <text:p text:style-name="P127">Demos</text:p>
        </text:list-item>
        <text:list-item>
          <text:p text:style-name="P128">Settings</text:p>
        </text:list-item>
      </text:list>
      <text:h text:style-name="P129" text:outline-level="2">Navigation</text:h>
      <text:p text:style-name="P130">The central panel joystick can be used to navigate:</text:p>
      <text:list xml:id="list2663744180" text:style-name="L12">
        <text:list-item>
          <text:p text:style-name="P131">Left returns to the parent menu</text:p>
        </text:list-item>
        <text:list-item>
          <text:p text:style-name="P131">Right moves into the selected menu.</text:p>
        </text:list-item>
        <text:list-item>
          <text:p text:style-name="P131">Up moves the menu one menu option higher</text:p>
        </text:list-item>
        <text:list-item>
          <text:p text:style-name="P131">Down moves the menu one menu option lower</text:p>
        </text:list-item>
        <text:list-item>
          <text:p text:style-name="P131">Press is unused (so far)</text:p>
        </text:list-item>
      </text:list>
      <text:h text:style-name="Heading_20_2" text:outline-level="2">Structure</text:h>
      <text:h text:style-name="P132" text:outline-level="3">Introduction</text:h>
      <text:p text:style-name="P130">The menu has the following structure:</text:p>
      <text:p text:style-name="P133"/>
      <text:p text:style-name="P133"><draw:frame draw:style-name="fr8" draw:name="Afbeelding18" text:anchor-type="char" svg:width="17.59cm" svg:height="8.246cm" draw:z-index="18"><draw:image xlink:href="Pictures/10000001000007740000037E7C7F80FD.png" xlink:type="simple" xlink:show="embed" xlink:actuate="onLoad" draw:mime-type="image/png"/></draw:frame></text:p>
      <text:p text:style-name="P134"/>
      <text:p text:style-name="P135"><text:soft-page-break/>The diagram above can be split in three parts which will be covered in detail in the next paragraphs:</text:p>
      <text:list text:style-name="L13">
        <text:list-item>
          <text:p text:style-name="P136">App Selection</text:p>
        </text:list-item>
        <text:list-item>
          <text:p text:style-name="P136">App Execution</text:p>
        </text:list-item>
        <text:list-item>
          <text:p text:style-name="P136">App Management</text:p>
        </text:list-item>
      </text:list>
      <text:h text:style-name="P132" text:outline-level="3">App Selection</text:h>
      <text:p text:style-name="P137">The following diagram shows the app selection part:</text:p>
      <text:p text:style-name="P137"><draw:frame draw:style-name="fr2" draw:name="Afbeelding19" text:anchor-type="char" svg:width="17.59cm" svg:height="10.294cm" draw:z-index="19"><draw:image xlink:href="Pictures/100000010000057900000334F20F2F96.png" xlink:type="simple" xlink:show="embed" xlink:actuate="onLoad" draw:mime-type="image/png"/></draw:frame></text:p>
      <text:p text:style-name="P138">Screen <text:span text:style-name="T24">S</text:span>000: <text:span text:style-name="T25">Welcome</text:span></text:p>
      <text:p text:style-name="P139">┌────────────────┐</text:p>
      <text:p text:style-name="P140">│ <text:s text:c="2"/><text:span text:style-name="T26">Welcome to </text:span><text:s text:c="2"/>│<text:line-break/>│ <text:span text:style-name="T25">FIRAXIS 0.0.1 <text:s/></text:span>│<text:line-break/>└────────────────┘</text:p>
      <text:p text:style-name="P141">After two seconds or a direction/button press, the navigation moves to screen S010.</text:p>
      <text:p text:style-name="P142"><text:span text:style-name="T27">Screen S0</text:span><text:span text:style-name="T28">1</text:span><text:span text:style-name="T27">-</text:span><text:span text:style-name="T29">S010</text:span><text:span text:style-name="T27">: Select </text:span><text:span text:style-name="T30">App Type</text:span></text:p>
      <text:p text:style-name="P143">This screen selects between the application type: Game, Demo, Utility or Setup App.</text:p>
      <text:p text:style-name="P144"><text:soft-page-break/><text:span text:style-name="T31">┌────────────────┐</text:span></text:p>
      <text:p text:style-name="P140"><text:span text:style-name="T32">│</text:span><text:span text:style-name="T33">S</text:span><text:span text:style-name="T32">elect App </text:span><text:span text:style-name="T33">Type </text:span><text:span text:style-name="T32">│<text:line-break/>│ </text:span><text:span text:style-name="T34"><text:s text:c="5"/>GAME </text:span><text:span text:style-name="T32"><text:s text:c="4"/></text:span><text:span text:style-name="T34"><text:s/></text:span><text:span text:style-name="T32">│<text:line-break/>└────────────────┘</text:span></text:p>
      <text:p text:style-name="P145">┌────────────────┐</text:p>
      <text:p text:style-name="P146"><text:span text:style-name="T32">│</text:span><text:span text:style-name="T33">S</text:span><text:span text:style-name="T32">elect App </text:span><text:span text:style-name="T33">Type </text:span><text:span text:style-name="T32">│<text:line-break/>│ </text:span><text:span text:style-name="T34"><text:s text:c="5"/>DEMO </text:span><text:span text:style-name="T32"><text:s text:c="4"/></text:span><text:span text:style-name="T34"><text:s/></text:span><text:span text:style-name="T32">│<text:line-break/>└────────────────┘</text:span></text:p>
      <text:p text:style-name="P145">┌────────────────┐</text:p>
      <text:p text:style-name="P146"><text:span text:style-name="T32">│</text:span><text:span text:style-name="T33">S</text:span><text:span text:style-name="T32">elect App </text:span><text:span text:style-name="T33">Type </text:span><text:span text:style-name="T32">│<text:line-break/>│ </text:span><text:span text:style-name="T34"><text:s text:c="3"/>UTILITY</text:span><text:span text:style-name="T32"> <text:s text:c="3"/></text:span><text:span text:style-name="T34"><text:s/></text:span><text:span text:style-name="T32">│<text:line-break/>└────────────────┘</text:span></text:p>
      <text:p text:style-name="P145">┌────────────────┐</text:p>
      <text:p text:style-name="P146"><text:span text:style-name="T32">│</text:span><text:span text:style-name="T33">S</text:span><text:span text:style-name="T32">elect App </text:span><text:span text:style-name="T33">Type </text:span><text:span text:style-name="T32">│<text:line-break/>│</text:span><text:span text:style-name="T34"> <text:s text:c="2"/>SETUP APP <text:s/></text:span><text:span text:style-name="T32"><text:s/></text:span><text:span text:style-name="T34"><text:s/></text:span><text:span text:style-name="T32">│<text:line-break/>└────────────────┘</text:span></text:p>
      <text:p text:style-name="P147">Right/Mouse button press causes the navigation to move to screen S020.</text:p>
      <text:p text:style-name="P148"><text:span text:style-name="T27">Screen S020: </text:span><text:span text:style-name="T28">View Modes</text:span></text:p>
      <text:p text:style-name="P149">Here the view modes to select an app can be set:</text:p>
      <table:table table:name="Tabel14" table:style-name="Tabel14">
        <table:table-column table:style-name="Tabel14.A"/>
        <table:table-column table:style-name="Tabel14.B"/>
        <table:table-row>
          <table:table-cell table:style-name="Tabel14.A1" office:value-type="string">
            <text:p text:style-name="P150">View Mode</text:p>
          </table:table-cell>
          <table:table-cell table:style-name="Tabel14.A1" office:value-type="string">
            <text:p text:style-name="P150">Description</text:p>
          </table:table-cell>
        </table:table-row>
        <table:table-row>
          <table:table-cell table:style-name="Tabel14.A1" office:value-type="string">
            <text:p text:style-name="P151">RECENT</text:p>
          </table:table-cell>
          <table:table-cell table:style-name="Tabel14.A1" office:value-type="string">
            <text:p text:style-name="P151">Recently used apps</text:p>
          </table:table-cell>
        </table:table-row>
        <table:table-row>
          <table:table-cell table:style-name="Tabel14.A1" office:value-type="string">
            <text:p text:style-name="P151">MOST USED</text:p>
          </table:table-cell>
          <table:table-cell table:style-name="Tabel14.A1" office:value-type="string">
            <text:p text:style-name="P151">Apps in order of total execution time</text:p>
          </table:table-cell>
        </table:table-row>
        <table:table-row>
          <table:table-cell table:style-name="Tabel14.A1" office:value-type="string">
            <text:p text:style-name="P151">FAVORITES</text:p>
          </table:table-cell>
          <table:table-cell table:style-name="Tabel14.A1" office:value-type="string">
            <text:p text:style-name="P151">Apps marked as favorites, in alphabetic order</text:p>
          </table:table-cell>
        </table:table-row>
        <table:table-row>
          <table:table-cell table:style-name="Tabel14.A1" office:value-type="string">
            <text:p text:style-name="P151">ALPHABETIC</text:p>
          </table:table-cell>
          <table:table-cell table:style-name="Tabel14.A1" office:value-type="string">
            <text:p text:style-name="P151">Apps in alphabetic order</text:p>
          </table:table-cell>
        </table:table-row>
        <table:table-row>
          <table:table-cell table:style-name="Tabel14.A1" office:value-type="string">
            <text:p text:style-name="P151">TAG</text:p>
          </table:table-cell>
          <table:table-cell table:style-name="Tabel14.A1" office:value-type="string">
            <text:p text:style-name="P151">Apps to be selected by a tag, in alphabetic order</text:p>
          </table:table-cell>
        </table:table-row>
        <table:table-row>
          <table:table-cell table:style-name="Tabel14.A1" office:value-type="string">
            <text:p text:style-name="P151">NEW</text:p>
          </table:table-cell>
          <table:table-cell table:style-name="Tabel14.A1" office:value-type="string">
            <text:p text:style-name="P151">New apps, which is a fixed list by the developer.</text:p>
          </table:table-cell>
        </table:table-row>
        <table:table-row>
          <table:table-cell table:style-name="Tabel14.A1" office:value-type="string">
            <text:p text:style-name="P151">RANDOM</text:p>
          </table:table-cell>
          <table:table-cell table:style-name="Tabel14.A1" office:value-type="string">
            <text:p text:style-name="P151">Selects a random game (no further selection is neeeded).</text:p>
          </table:table-cell>
        </table:table-row>
      </table:table>
      <text:p text:style-name="P145">┌────────────────┐</text:p>
      <text:p text:style-name="P152"><text:span text:style-name="T32">│Select </text:span><text:span text:style-name="T35">View Mode</text:span><text:span text:style-name="T32">│<text:line-break/>│ </text:span><text:span text:style-name="T34"><text:s text:c="4"/></text:span><text:span text:style-name="T36">RECENT <text:s text:c="3"/></text:span><text:span text:style-name="T34"><text:s/></text:span><text:span text:style-name="T32">│<text:line-break/>└────────────────┘</text:span></text:p>
      <text:p text:style-name="P145">┌────────────────┐</text:p>
      <text:p text:style-name="P152"><text:span text:style-name="T32">│Select </text:span><text:span text:style-name="T35">View Mode</text:span><text:span text:style-name="T32">│<text:line-break/>│</text:span><text:span text:style-name="T34"> </text:span><text:span text:style-name="T36"><text:s text:c="2"/>MOST USED <text:s text:c="2"/></text:span><text:span text:style-name="T34"><text:s/></text:span><text:span text:style-name="T32">│<text:line-break/>└────────────────┘</text:span></text:p>
      <text:p text:style-name="P145">┌────────────────┐</text:p>
      <text:p text:style-name="P152"><text:span text:style-name="T32">│SELECT </text:span><text:span text:style-name="T35">VIEW MODE</text:span><text:span text:style-name="T32">│<text:line-break/>│</text:span><text:span text:style-name="T34"> </text:span><text:span text:style-name="T36"><text:s text:c="2"/></text:span><text:span text:style-name="T35">FAVORITES</text:span><text:span text:style-name="T36"> <text:s text:c="2"/></text:span><text:span text:style-name="T34"><text:s/></text:span><text:span text:style-name="T32">│<text:line-break/>└────────────────┘</text:span></text:p>
      <text:p text:style-name="P145">┌────────────────┐</text:p>
      <text:p text:style-name="P152"><text:span text:style-name="T32">│Select </text:span><text:span text:style-name="T35">View Mode</text:span><text:span text:style-name="T32">│<text:line-break/>│ </text:span><text:span text:style-name="T34"><text:s/></text:span><text:span text:style-name="T36"><text:s/>ALPHABETIC <text:s/></text:span><text:span text:style-name="T34"><text:s/></text:span><text:span text:style-name="T32">│<text:line-break/>└────────────────┘</text:span></text:p>
      <text:p text:style-name="P145">┌────────────────┐</text:p>
      <text:p text:style-name="P152"><text:span text:style-name="T32">│Select </text:span><text:span text:style-name="T35">View Mode</text:span><text:span text:style-name="T32">│<text:line-break/>│</text:span><text:span text:style-name="T34"> </text:span><text:span text:style-name="T36"><text:s text:c="5"/></text:span><text:span text:style-name="T35">TAG <text:s text:c="2"/></text:span><text:span text:style-name="T36"><text:s text:c="3"/></text:span><text:span text:style-name="T34"><text:s/></text:span><text:span text:style-name="T32">│<text:line-break/>└────────────────┘</text:span></text:p>
      <text:p text:style-name="P145"><text:soft-page-break/>┌────────────────┐</text:p>
      <text:p text:style-name="P152"><text:span text:style-name="T32">│Select </text:span><text:span text:style-name="T35">View Mode</text:span><text:span text:style-name="T32">│<text:line-break/>│</text:span><text:span text:style-name="T34"> </text:span><text:span text:style-name="T36"><text:s text:c="5"/></text:span><text:span text:style-name="T35">NEW <text:s text:c="2"/></text:span><text:span text:style-name="T36"><text:s text:c="3"/></text:span><text:span text:style-name="T34"><text:s/></text:span><text:span text:style-name="T32">│<text:line-break/>└────────────────┘</text:span></text:p>
      <text:p text:style-name="P145">┌────────────────┐</text:p>
      <text:p text:style-name="P152"><text:span text:style-name="T32">│Select </text:span><text:span text:style-name="T35">View Mode</text:span><text:span text:style-name="T32">│<text:line-break/>│</text:span><text:span text:style-name="T34"> </text:span><text:span text:style-name="T36"><text:s text:c="3"/></text:span><text:span text:style-name="T35"><text:s/>RANDOM </text:span><text:span text:style-name="T36"><text:s text:c="3"/></text:span><text:span text:style-name="T34"><text:s/></text:span><text:span text:style-name="T32">│<text:line-break/>└────────────────┘</text:span></text:p>
      <text:p text:style-name="P149">Button/Right: <text:span text:style-name="T37">When TAG is selected, navigation moves to screen S021 to select a tag. When RANDOM is selected, a random game is shown and navigation moves to screen S040. In all other cases, screen S030 is shown to select a game from a list.</text:span></text:p>
      <text:p text:style-name="P153">Screen S021: Select Tag</text:p>
      <text:p text:style-name="P143">This screen shows all existing tags for the selected app type.</text:p>
      <text:p text:style-name="P143">The following list shows all tags per app type:</text:p>
      <table:table table:name="Tabel15" table:style-name="Tabel15">
        <table:table-column table:style-name="Tabel15.A" table:number-columns-repeated="3"/>
        <table:table-column table:style-name="Tabel15.D"/>
        <table:table-row>
          <table:table-cell table:style-name="Tabel15.A1" office:value-type="string">
            <text:p text:style-name="P150">Game Tags</text:p>
          </table:table-cell>
          <table:table-cell table:style-name="Tabel15.A1" office:value-type="string">
            <text:p text:style-name="P150">Demo Tags</text:p>
          </table:table-cell>
          <table:table-cell table:style-name="Tabel15.A1" office:value-type="string">
            <text:p text:style-name="P150">Utility Tags</text:p>
          </table:table-cell>
          <table:table-cell table:style-name="Tabel15.A1" office:value-type="string">
            <text:p text:style-name="P150">Setup App Tags</text:p>
          </table:table-cell>
        </table:table-row>
        <table:table-row>
          <table:table-cell table:style-name="Tabel15.A1" office:value-type="string">
            <text:p text:style-name="P151">Arcade</text:p>
          </table:table-cell>
          <table:table-cell table:style-name="Tabel15.A1" office:value-type="string">
            <text:p text:style-name="P151">Audio</text:p>
          </table:table-cell>
          <table:table-cell table:style-name="Tabel15.A1" office:value-type="string">
            <text:p text:style-name="P151">Audio</text:p>
          </table:table-cell>
          <table:table-cell table:style-name="Tabel15.A1" office:value-type="string">
            <text:p text:style-name="P151">Audio</text:p>
          </table:table-cell>
        </table:table-row>
        <table:table-row>
          <table:table-cell table:style-name="Tabel15.A1" office:value-type="string">
            <text:p text:style-name="P151">Audio</text:p>
          </table:table-cell>
          <table:table-cell table:style-name="Tabel15.A1" office:value-type="string">
            <text:p text:style-name="P151">Interactive</text:p>
          </table:table-cell>
          <table:table-cell table:style-name="Tabel15.A1" office:value-type="string">
            <text:p text:style-name="P151">Clock</text:p>
          </table:table-cell>
          <table:table-cell table:style-name="Tabel15.A1" office:value-type="string">
            <text:p text:style-name="P151">Clock</text:p>
          </table:table-cell>
        </table:table-row>
        <table:table-row>
          <table:table-cell table:style-name="Tabel15.A1" office:value-type="string">
            <text:p text:style-name="P151">Continuous</text:p>
          </table:table-cell>
          <table:table-cell table:style-name="Tabel15.A1" office:value-type="string">
            <text:p text:style-name="P151">Static</text:p>
          </table:table-cell>
          <table:table-cell table:style-name="Tabel15.A1" office:value-type="string">
            <text:p text:style-name="P151">LED Strips</text:p>
          </table:table-cell>
          <table:table-cell table:style-name="Tabel15.A1" office:value-type="string">
            <text:p text:style-name="P151">Diagnostics</text:p>
          </table:table-cell>
        </table:table-row>
        <table:table-row>
          <table:table-cell table:style-name="Tabel15.A1" office:value-type="string">
            <text:p text:style-name="P151">Horizontal</text:p>
          </table:table-cell>
          <table:table-cell table:style-name="Tabel15.A1" office:value-type="string">
            <text:p text:style-name="P38"/>
          </table:table-cell>
          <table:table-cell table:style-name="Tabel15.A1" office:value-type="string">
            <text:p text:style-name="P151">Microphone</text:p>
          </table:table-cell>
          <table:table-cell table:style-name="Tabel15.A1" office:value-type="string">
            <text:p text:style-name="P151">Displays</text:p>
          </table:table-cell>
        </table:table-row>
        <table:table-row>
          <table:table-cell table:style-name="Tabel15.A1" office:value-type="string">
            <text:p text:style-name="P151">Microphone</text:p>
          </table:table-cell>
          <table:table-cell table:style-name="Tabel15.A1" office:value-type="string">
            <text:p text:style-name="P38"/>
          </table:table-cell>
          <table:table-cell table:style-name="Tabel15.A1" office:value-type="string">
            <text:p text:style-name="P151">Speaker</text:p>
          </table:table-cell>
          <table:table-cell table:style-name="Tabel15.A1" office:value-type="string">
            <text:p text:style-name="P151">Hardware Tests</text:p>
          </table:table-cell>
        </table:table-row>
        <table:table-row>
          <table:table-cell table:style-name="Tabel15.A1" office:value-type="string">
            <text:p text:style-name="P151">Puzzle</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Joysticks</text:p>
          </table:table-cell>
        </table:table-row>
        <table:table-row>
          <table:table-cell table:style-name="Tabel15.A1" office:value-type="string">
            <text:p text:style-name="P151">Racing</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LED Strips</text:p>
          </table:table-cell>
        </table:table-row>
        <table:table-row>
          <table:table-cell table:style-name="Tabel15.A1" office:value-type="string">
            <text:p text:style-name="P151">Shooter</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Microphone</text:p>
          </table:table-cell>
        </table:table-row>
        <table:table-row>
          <table:table-cell table:style-name="Tabel15.A1" office:value-type="string">
            <text:p text:style-name="P151">Single Player</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Speaker</text:p>
          </table:table-cell>
        </table:table-row>
        <table:table-row>
          <table:table-cell table:style-name="Tabel15.A1" office:value-type="string">
            <text:p text:style-name="P151">Turn Based</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System Button</text:p>
          </table:table-cell>
        </table:table-row>
        <table:table-row>
          <table:table-cell table:style-name="Tabel15.A1" office:value-type="string">
            <text:p text:style-name="P151">Two Player</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Info</text:p>
          </table:table-cell>
        </table:table-row>
        <table:table-row>
          <table:table-cell table:style-name="Tabel15.A1" office:value-type="string">
            <text:p text:style-name="P151">Vertical</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38"/>
          </table:table-cell>
        </table:table-row>
      </table:table>
      <text:p text:style-name="P143"/>
      <text:p text:style-name="P143">Below are a few examples shown:</text:p>
      <text:p text:style-name="P154">┌────────────────┐</text:p>
      <text:p text:style-name="P155"><text:span text:style-name="T31">│ <text:s text:c="2"/>Select </text:span><text:span text:style-name="T38">Tag </text:span><text:span text:style-name="T39"><text:s text:c="2"/></text:span><text:span text:style-name="T31">│<text:line-break/>│</text:span><text:span text:style-name="T40"> </text:span><text:span text:style-name="T41">SINGLE PLAYER</text:span><text:span text:style-name="T40"> <text:s/></text:span><text:span text:style-name="T31">│<text:line-break/>└────────────────┘</text:span></text:p>
      <text:p text:style-name="P156">┌────────────────┐</text:p>
      <text:p text:style-name="P157"><text:span text:style-name="T31">│ <text:s text:c="2"/>Select </text:span><text:span text:style-name="T38">Tag </text:span><text:span text:style-name="T39"><text:s text:c="2"/></text:span><text:span text:style-name="T31">│<text:line-break/>│</text:span><text:span text:style-name="T40"> </text:span><text:span text:style-name="T41">HARDWARE TESTS</text:span><text:span text:style-name="T40"> </text:span><text:span text:style-name="T31">│<text:line-break/>└────────────────┘</text:span></text:p>
      <text:p text:style-name="P158">After a tag is selected, navigation continues to screen S030.</text:p>
      <text:p text:style-name="P159">Screen S030: Select App</text:p>
      <text:p text:style-name="P158">In this screen the actual app can be selected. Below are a few examples:</text:p>
      <text:p text:style-name="P158"/>
      <text:p text:style-name="P145"><text:soft-page-break/>┌────────────────┐</text:p>
      <text:p text:style-name="P160"><text:span text:style-name="T31">│ <text:s/>Select </text:span><text:span text:style-name="T42">Game <text:s/></text:span><text:span text:style-name="T39"><text:s/></text:span><text:span text:style-name="T31">│<text:line-break/>│ <text:s text:c="4"/></text:span><text:span text:style-name="T42">1D PONG</text:span><text:span text:style-name="T39"> </text:span><text:span text:style-name="T43"><text:s text:c="3"/></text:span><text:span text:style-name="T31">│<text:line-break/>└────────────────┘</text:span></text:p>
      <text:p text:style-name="P161">┌────────────────┐</text:p>
      <text:p text:style-name="P162"><text:span text:style-name="T31">│ <text:s/>Select </text:span><text:span text:style-name="T42">Demo <text:s text:c="2"/></text:span><text:span text:style-name="T31">│<text:line-break/>│ </text:span><text:span text:style-name="T42"><text:s/>KNIGHT RIDER </text:span><text:span text:style-name="T43"><text:s/></text:span><text:span text:style-name="T31">│<text:line-break/>└────────────────┘</text:span></text:p>
      <text:p text:style-name="P161">┌────────────────┐</text:p>
      <text:p text:style-name="P162"><text:span text:style-name="T31">│ Select </text:span><text:span text:style-name="T42">Utility</text:span><text:span text:style-name="T39"> </text:span><text:span text:style-name="T31">│<text:line-break/>│</text:span><text:span text:style-name="T42">COUNTDOWN TIMER</text:span><text:span text:style-name="T43"> </text:span><text:span text:style-name="T31">│<text:line-break/>└────────────────┘</text:span></text:p>
      <text:p text:style-name="P145">┌────────────────┐</text:p>
      <text:p text:style-name="P160"><text:span text:style-name="T31">│Select </text:span><text:span text:style-name="T39">Setup App</text:span><text:span text:style-name="T31">│<text:line-break/>│</text:span><text:span text:style-name="T44">LED STRIPS TEST</text:span><text:span text:style-name="T40"> </text:span><text:span text:style-name="T31">│<text:line-break/>└────────────────┘</text:span></text:p>
      <text:h text:style-name="P132" text:outline-level="3">App Execution</text:h>
      <text:p text:style-name="P163">This paragraph explains the screens related when an application is running. Typically, the app takes over the joystick control, but the System Button can be used to intervene.</text:p>
      <text:p text:style-name="P164">Screen S040: App Start</text:p>
      <text:p text:style-name="P165">This screen starts the application.</text:p>
      <text:p text:style-name="P166">┌────────────────┐</text:p>
      <text:p text:style-name="P167"><text:span text:style-name="T31">│ <text:s text:c="4"/>1D P</text:span><text:span text:style-name="T42">ONG <text:s text:c="2"/></text:span><text:span text:style-name="T39"><text:s/></text:span><text:span text:style-name="T31">│<text:line-break/>│ <text:s text:c="4"/></text:span><text:span text:style-name="T42"><text:s/>START </text:span><text:span text:style-name="T39"><text:s/></text:span><text:span text:style-name="T43"><text:s text:c="3"/></text:span><text:span text:style-name="T31">│<text:line-break/>└────────────────┘</text:span></text:p>
      <text:p text:style-name="P163"/>
      <text:h text:style-name="P132" text:outline-level="3">App Management</text:h>
      <text:p text:style-name="P168">These screens can start app an app, make them favorite etc:</text:p>
      <text:list text:continue-list="list2663744180" text:style-name="L12">
        <text:list-item>
          <text:p text:style-name="P169">S300: Start <text:span text:style-name="T45">(Screen S400)</text:span></text:p>
        </text:list-item>
        <text:list-item>
          <text:p text:style-name="P170">S301: Settings <text:span text:style-name="T45">(S500)</text:span></text:p>
        </text:list-item>
        <text:list-item>
          <text:p text:style-name="P170">S302: Highscores (<text:span text:style-name="T45">S520, </text:span>Games only)</text:p>
        </text:list-item>
        <text:list-item>
          <text:p text:style-name="P170">S303: Reset Highscores (<text:span text:style-name="T45">S530, </text:span>Games only)</text:p>
        </text:list-item>
        <text:list-item>
          <text:p text:style-name="P170">S304: Player Setup (<text:span text:style-name="T45">S540, </text:span>Games only)</text:p>
        </text:list-item>
        <text:list-item>
          <text:p text:style-name="P171"><text:span text:style-name="T46">S</text:span><text:span text:style-name="T47">305: Set as Favorite (</text:span><text:span text:style-name="T48">S550 </text:span><text:span text:style-name="T47">or remove from favorites if already a favorite)</text:span></text:p>
        </text:list-item>
      </text:list>
      <text:p text:style-name="P145">┌────────────────┐</text:p>
      <text:p text:style-name="P160"><text:span text:style-name="T31">│ &lt;</text:span><text:span text:style-name="T49">Selected App&gt;</text:span><text:span text:style-name="T39"> </text:span><text:span text:style-name="T31">│<text:line-break/>│</text:span><text:span text:style-name="T40">▬ <text:s text:c="3"/></text:span><text:span text:style-name="T50">START <text:s/></text:span><text:span text:style-name="T43"><text:s text:c="3"/></text:span><text:span text:style-name="T40">▼</text:span><text:span text:style-name="T31">│<text:line-break/>└────────────────┘</text:span></text:p>
      <text:p text:style-name="P172">This menu assume that Game 1D Pong has been selected.</text:p>
      <text:p text:style-name="P145"><text:soft-page-break/>┌────────────────┐</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text:span><text:span text:style-name="T40"> <text:s text:c="3"/></text:span><text:span text:style-name="T50">START <text:s/></text:span><text:span text:style-name="T43"><text:s text:c="3"/></text:span><text:span text:style-name="T40">▼</text:span><text:span text:style-name="T31">│<text:line-break/>└────────────────┘</text:span></text:p>
      <text:p text:style-name="P145">┌────────────────┐</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text:span><text:span text:style-name="T40"> <text:s text:c="2"/></text:span><text:span text:style-name="T49">SETTINGS</text:span><text:span text:style-name="T43"> <text:s text:c="2"/></text:span><text:span text:style-name="T40">▼</text:span><text:span text:style-name="T31">│<text:line-break/>└────────────────┘</text:span></text:p>
      <text:p text:style-name="P145">┌────────────────┐</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text:span><text:span text:style-name="T40"> </text:span><text:span text:style-name="T49">HIGH SCORES</text:span><text:span text:style-name="T43"> <text:s/></text:span><text:span text:style-name="T40">▼</text:span><text:span text:style-name="T31">│<text:line-break/>└────────────────┘</text:span></text:p>
      <text:p text:style-name="P145">┌────────────────┐</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 </text:span><text:span text:style-name="T52">PLAYER SETUP </text:span><text:span text:style-name="T40">▼</text:span><text:span text:style-name="T31">│<text:line-break/>└────────────────┘</text:span></text:p>
      <text:p text:style-name="P145">┌────────────────┐</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 <text:s/></text:span><text:span text:style-name="T52">SET AS FAV.</text:span><text:span text:style-name="T43"> </text:span><text:span text:style-name="T40">▼</text:span><text:span text:style-name="T31">│<text:line-break/>└────────────────┘</text:span></text:p>
      <text:p text:style-name="P145">┌────────────────┐</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text:span><text:span text:style-name="T52">REMOVE AS FAV.</text:span><text:span text:style-name="T40">▼</text:span><text:span text:style-name="T31">│<text:line-break/>└────────────────┘</text:span></text:p>
      <text:p text:style-name="P173"/>
      <text:p text:style-name="P174"/>
      <text:p text:style-name="P175"/>
      <text:h text:style-name="P15" text:outline-level="1">Games</text:h>
      <text:h text:style-name="P125" text:outline-level="2">Introduction</text:h>
      <text:p text:style-name="P130">In the games some common terms are used:</text:p>
      <text:list text:style-name="L14">
        <text:list-item>
          <text:p text:style-name="P176">Home: the LED closest to the player (both players have their own home).</text:p>
        </text:list-item>
        <text:list-item>
          <text:p text:style-name="P176">Home distance: The distance between some object and the home of the player.</text:p>
        </text:list-item>
        <text:list-item>
          <text:p text:style-name="P176">Center: The central LED, although due there are an even number, it is considered the middle LED closest to one player.</text:p>
        </text:list-item>
        <text:list-item>
          <text:p text:style-name="P176">Player 1: Bottom side player</text:p>
        </text:list-item>
        <text:list-item>
          <text:p text:style-name="P176">Player 2: Top side player</text:p>
        </text:list-item>
        <text:list-item>
          <text:p text:style-name="P176">Central Panel: Central control panel</text:p>
        </text:list-item>
      </text:list>
      <text:h text:style-name="P177" text:outline-level="2">Tags</text:h>
      <text:p text:style-name="P126">Games are categorized by various tags, and a game can be part of multiple categories.</text:p>
      <text:p text:style-name="P126">Below the games are shown including tags.</text:p>
      <text:h text:style-name="Heading_20_2" text:outline-level="2">List of Games</text:h>
      <text:h text:style-name="P178" text:outline-level="3" text:is-list-header="true"/>
      <text:p text:style-name="P179"><text:line-break/></text:p>
      <text:list text:style-name="L15">
        <text:list-item>
          <text:list>
            <text:list-header>
              <text:h text:style-name="P180" text:outline-level="2"/>
            </text:list-header>
          </text:list>
        </text:list-item>
      </text:list>
      <text:p text:style-name="P16"/>
      <text:p text:style-name="P20"/>
      <text:p text:style-name="P16"/>
      <text:p text:style-name="P179"><text:line-break/><text:line-break/></text:p>
      <text:p text:style-name="P181"><text:span text:style-name="T53">Game Player Count</text:span><text:span text:style-name="T54"> </text:span><text:span text:style-name="T53">Genre</text:span><text:span text:style-name="T54"> </text:span><text:span text:style-name="T53">Game Type</text:span></text:p>
      <text:p text:style-name="P16">1D Endless Runner</text:p>
      <text:p text:style-name="P16">1D Pong</text:p>
      <text:p text:style-name="P16">1D Snake</text:p>
      <text:p text:style-name="P16">Dual Line Dodge</text:p>
      <text:p text:style-name="P181"><text:span text:style-name="T55">Lane Shooter</text:span><text:span text:style-name="T54"> </text:span><text:span text:style-name="T55">1 or 2</text:span><text:span text:style-name="T54"> </text:span><text:span text:style-name="T55">Shooter</text:span><text:span text:style-name="T54"> </text:span><text:span text:style-name="T55">4 Rows</text:span></text:p>
      <text:p text:style-name="P16">Quadrows Breakout</text:p>
      <text:p text:style-name="P16"><text:soft-page-break/>Quadrows Endless Runner</text:p>
      <text:p text:style-name="P181"><text:span text:style-name="T55">Quadrows Pong</text:span><text:span text:style-name="T54"> </text:span><text:span text:style-name="T55">2</text:span><text:span text:style-name="T54"> </text:span><text:span text:style-name="T55">Pong</text:span><text:span text:style-name="T54"> </text:span><text:span text:style-name="T55">4 Rows</text:span></text:p>
      <text:p text:style-name="P16">Quadrows Snake</text:p>
      <text:p text:style-name="P16">Reaction Speed</text:p>
      <text:p text:style-name="P16">Simon Memory</text:p>
      <text:p text:style-name="P16">Tug of Light</text:p>
      <text:p text:style-name="P179"><text:line-break/><text:line-break/></text:p>
      <text:p text:style-name="P16">Player Count: One Player / Two Player / One or Two Players</text:p>
      <text:p text:style-name="P16">Genre: Shooter, Pong, Racer, Snake, Reaction, Rhythm, Puzzle, Endless, Platformer,</text:p>
      <text:p text:style-name="P182">Arena, Dodge, Tug Of War, Breakout</text:p>
      <text:p text:style-name="P181"><text:span text:style-name="T55">Game Type:</text:span><text:span text:style-name="T54"> </text:span><text:span text:style-name="T55">1D, 4 Rows</text:span></text:p>
      <text:list text:style-name="L16">
        <text:list-item>
          <text:list>
            <text:list-header>
              <text:h text:style-name="P183" text:outline-level="2"/>
            </text:list-header>
          </text:list>
        </text:list-item>
      </text:list>
      <text:p text:style-name="P16"/>
      <text:h text:style-name="P15" text:outline-level="1">Demos</text:h>
      <text:h text:style-name="P125" text:outline-level="2">Introduction</text:h>
      <text:h text:style-name="P125" text:outline-level="2">Tags</text:h>
      <text:h text:style-name="P125" text:outline-level="2">List of Demos</text:h>
      <text:p text:style-name="P184"/>
      <text:list text:style-name="L17">
        <text:list-item>
          <text:list>
            <text:list-item>
              <text:h text:style-name="P185" text:outline-level="2">LED Wave Demo</text:h>
            </text:list-item>
          </text:list>
        </text:list-item>
      </text:list>
      <text:p text:style-name="P20"/>
      <text:list text:style-name="L18">
        <text:list-item>
          <text:list>
            <text:list-item>
              <text:h text:style-name="P186" text:outline-level="2">Color Patterns</text:h>
              <text:list>
                <text:list-item>
                  <text:h text:style-name="P187" text:outline-level="3">Description</text:h>
                </text:list-item>
              </text:list>
            </text:list-item>
          </text:list>
        </text:list-item>
      </text:list>
      <text:p text:style-name="P16">This is not a game, but a demo of color patterns.</text:p>
      <text:p text:style-name="P20"/>
      <text:p text:style-name="P16">Knight rider</text:p>
      <text:p text:style-name="P16">Galaxy</text:p>
      <text:p text:style-name="P16">Fire</text:p>
      <text:p text:style-name="P16">Stroboscope</text:p>
      <text:p text:style-name="P16">Rainbow</text:p>
      <text:p text:style-name="P20"/>
      <text:p text:style-name="P16">Interaction via joystick</text:p>
      <text:list text:style-name="L19">
        <text:list-item>
          <text:list>
            <text:list-item>
              <text:list>
                <text:list-item>
                  <text:h text:style-name="P188" text:outline-level="3">UI</text:h>
                </text:list-item>
                <text:list-item>
                  <text:h text:style-name="P189" text:outline-level="3">Controls</text:h>
                </text:list-item>
                <text:list-item>
                  <text:h text:style-name="P189" text:outline-level="3">Scoring</text:h>
                </text:list-item>
                <text:list-item>
                  <text:h text:style-name="P190" text:outline-level="3">Settings</text:h>
                </text:list-item>
              </text:list>
            </text:list-item>
          </text:list>
        </text:list-item>
      </text:list>
      <text:list xml:id="list4090533245" text:style-name="L20">
        <text:list-header>
          <text:h text:style-name="P191" text:outline-level="1"/>
        </text:list-header>
      </text:list>
      <text:h text:style-name="P192" text:outline-level="1"/>
      <text:h text:style-name="P15" text:outline-level="1">Utilitie<text:span text:style-name="T56">s</text:span></text:h>
      <text:h text:style-name="P125" text:outline-level="2">Introduction</text:h>
      <text:h text:style-name="P125" text:outline-level="2">List of Utilities</text:h>
      <text:p text:style-name="P184"/>
      <text:list text:continue-numbering="true" text:style-name="L20">
        <text:list-item>
          <text:list>
            <text:list-item>
              <text:h text:style-name="P193" text:outline-level="2">Draw</text:h>
              <text:list>
                <text:list-item>
                  <text:h text:style-name="P194" text:outline-level="3">Description</text:h>
                </text:list-item>
              </text:list>
            </text:list-item>
          </text:list>
        </text:list-item>
      </text:list>
      <text:p text:style-name="P16">This is not a game, but a drawing program. With the pot meter a LED can be selected, and with the up/down keys the color can be changed. The select button switches the LED on or off.</text:p>
      <text:list text:style-name="L21">
        <text:list-item>
          <text:list>
            <text:list-item>
              <text:list>
                <text:list-item>
                  <text:h text:style-name="P195" text:outline-level="3">UI</text:h>
                </text:list-item>
                <text:list-item>
                  <text:h text:style-name="P196" text:outline-level="3">Controls</text:h>
                </text:list-item>
                <text:list-item>
                  <text:h text:style-name="P196" text:outline-level="3">Scoring</text:h>
                </text:list-item>
                <text:list-item>
                  <text:h text:style-name="P197" text:outline-level="3">Settings</text:h>
                </text:list-item>
              </text:list>
            </text:list-item>
          </text:list>
        </text:list-item>
      </text:list>
      <text:p text:style-name="P198"/>
      <text:p text:style-name="P199"/>
      <text:list text:style-name="L22">
        <text:list-item>
          <text:list>
            <text:list-item>
              <text:h text:style-name="P200" text:outline-level="2">CLOCK</text:h>
            </text:list-item>
          </text:list>
        </text:list-item>
      </text:list>
      <text:p text:style-name="P201"/>
      <text:p text:style-name="P16">64 LEDs, e.g 12:34:56</text:p>
      <text:p text:style-name="P20"/>
      <text:p text:style-name="P16">2 LEDs 1: 0-2</text:p>
      <text:p text:style-name="P16">1 LED gap</text:p>
      <text:p text:style-name="P16">5 LEDs 3: 0-5</text:p>
      <text:p text:style-name="P16">1 LED gap</text:p>
      <text:p text:style-name="P16">10 LEDs 4: 0-9</text:p>
      <text:p text:style-name="P16">1 LED gap</text:p>
      <text:p text:style-name="P16">5 LEDs 3: 0-5</text:p>
      <text:p text:style-name="P16">1 LED gap</text:p>
      <text:p text:style-name="P16">10 LEDs 4: 0-9</text:p>
      <text:p text:style-name="P20"/>
      <text:p text:style-name="P16"><text:soft-page-break/>Total 35 LEDs</text:p>
      <text:p text:style-name="P20"/>
      <text:p text:style-name="P16">Even LEDs red. Uneven reds blue. Fifth green to make visibility better.</text:p>
      <text:p text:style-name="P20"/>
      <text:p text:style-name="P16">Possibly keeping hhmmss led positions constant.</text:p>
      <text:p text:style-name="P20"/>
      <text:p text:style-name="P16">Think about date.</text:p>
      <text:p text:style-name="P20"/>
      <text:list text:style-name="L23">
        <text:list-item>
          <text:list>
            <text:list-item>
              <text:h text:style-name="P202" text:outline-level="2">ALARM</text:h>
            </text:list-item>
          </text:list>
        </text:list-item>
      </text:list>
      <text:p text:style-name="P201"/>
      <text:p text:style-name="P16">ime and or date alarm., or countdown</text:p>
      <text:p text:style-name="P20"/>
      <text:p text:style-name="P16">Input via LCD, alarm via led colors and LCD.</text:p>
      <text:list text:style-name="L24">
        <text:list-item>
          <text:list>
            <text:list-item>
              <text:h text:style-name="P203" text:outline-level="2">STop watch</text:h>
            </text:list-item>
          </text:list>
        </text:list-item>
      </text:list>
      <text:p text:style-name="P201"/>
      <text:list text:style-name="L25">
        <text:list-item>
          <text:h text:style-name="P204" text:outline-level="1">System</text:h>
          <text:list>
            <text:list-item>
              <text:h text:style-name="P205" text:outline-level="2">LED Strips Test (+Brightness Control)</text:h>
            </text:list-item>
            <text:list-item>
              <text:h text:style-name="P205" text:outline-level="2">LED Segments Test (+Brightness Control)</text:h>
            </text:list-item>
            <text:list-item>
              <text:h text:style-name="P205" text:outline-level="2">LCD Display Tests (+Brightness Control)</text:h>
            </text:list-item>
            <text:list-item>
              <text:h text:style-name="P205" text:outline-level="2">Joysticks Test (+Calibration)</text:h>
            </text:list-item>
            <text:list-item>
              <text:h text:style-name="P205" text:outline-level="2">Audio Test (+Volume Set)</text:h>
            </text:list-item>
            <text:list-item>
              <text:h text:style-name="P205" text:outline-level="2">OTA Software Update</text:h>
            </text:list-item>
          </text:list>
        </text:list-item>
      </text:list>
      <text:h text:style-name="P15" text:outline-level="1">Setup Applications</text:h>
      <text:h text:style-name="P125" text:outline-level="2">Introduction</text:h>
      <text:h text:style-name="P125" text:outline-level="2">List of Setup Applications</text:h>
      <text:list text:style-name="L26">
        <text:list-header>
          <text:h text:style-name="P206" text:outline-level="1"/>
        </text:list-header>
      </text:list>
      <text:h text:style-name="P15" text:outline-level="1">Software <text:span text:style-name="T56">Architecture</text:span></text:h>
      <text:h text:style-name="P125" text:outline-level="2">Introduction</text:h>
      <text:h text:style-name="Heading_20_2" text:outline-level="2">SRAM Memory Usage</text:h>
      <text:p text:style-name="P207"/>
      <table:table table:name="Tabel2" table:style-name="Tabel2">
        <table:table-column table:style-name="Tabel2.A"/>
        <table:table-column table:style-name="Tabel2.B"/>
        <table:table-row>
          <table:table-cell table:style-name="Tabel2.A1" office:value-type="string">
            <text:p text:style-name="P208">Item</text:p>
          </table:table-cell>
          <table:table-cell table:style-name="Tabel2.A1" office:value-type="string">
            <text:p text:style-name="P209">Bytes</text:p>
          </table:table-cell>
        </table:table-row>
        <table:table-row>
          <table:table-cell table:style-name="Tabel2.A1" office:value-type="string">
            <text:p text:style-name="P210">LED Strips</text:p>
          </table:table-cell>
          <table:table-cell table:style-name="Tabel2.A1" office:value-type="string">
            <text:p text:style-name="P211">64</text:p>
          </table:table-cell>
        </table:table-row>
        <table:table-row>
          <table:table-cell table:style-name="Tabel2.A1" office:value-type="string">
            <text:p text:style-name="P210">Settings</text:p>
          </table:table-cell>
          <table:table-cell table:style-name="Tabel2.A1" office:value-type="string">
            <text:p text:style-name="P211">16</text:p>
          </table:table-cell>
        </table:table-row>
        <table:table-row>
          <table:table-cell table:style-name="Tabel2.A1" office:value-type="string">
            <text:p text:style-name="P210">Generic variables</text:p>
          </table:table-cell>
          <table:table-cell table:style-name="Tabel2.A1" office:value-type="string">
            <text:p text:style-name="P211">64</text:p>
          </table:table-cell>
        </table:table-row>
        <table:table-row>
          <table:table-cell table:style-name="Tabel2.A1" office:value-type="string">
            <text:p text:style-name="P210">Stack space</text:p>
          </table:table-cell>
          <table:table-cell table:style-name="Tabel2.A1" office:value-type="string">
            <text:p text:style-name="P211">80</text:p>
          </table:table-cell>
        </table:table-row>
        <table:table-row>
          <table:table-cell table:style-name="Tabel2.A1" office:value-type="string">
            <text:p text:style-name="P208">Total</text:p>
          </table:table-cell>
          <table:table-cell table:style-name="Tabel2.A1" office:value-type="string">
            <text:p text:style-name="P209">224</text:p>
          </table:table-cell>
        </table:table-row>
        <table:table-row>
          <table:table-cell table:style-name="Tabel2.A1" office:value-type="string">
            <text:p text:style-name="P208">Available</text:p>
          </table:table-cell>
          <table:table-cell table:style-name="Tabel2.A1" office:value-type="string">
            <text:p text:style-name="P209">2,048</text:p>
          </table:table-cell>
        </table:table-row>
        <table:table-row>
          <table:table-cell table:style-name="Tabel2.A1" office:value-type="string">
            <text:p text:style-name="P208">Remaining</text:p>
          </table:table-cell>
          <table:table-cell table:style-name="Tabel2.A1" office:value-type="string">
            <text:p text:style-name="P209">1,824</text:p>
          </table:table-cell>
        </table:table-row>
        <table:table-row>
          <table:table-cell table:style-name="Tabel2.A1" office:value-type="string">
            <text:p text:style-name="P208">Remaining %</text:p>
          </table:table-cell>
          <table:table-cell table:style-name="Tabel2.A1" office:value-type="string">
            <text:p text:style-name="P209">89.06%</text:p>
          </table:table-cell>
        </table:table-row>
      </table:table>
      <text:h text:style-name="Heading_20_2" text:outline-level="2"><text:span text:style-name="T56">Flash</text:span> Memory Usage</text:h>
      <table:table table:name="Tabel3" table:style-name="Tabel3">
        <table:table-column table:style-name="Tabel3.A"/>
        <table:table-column table:style-name="Tabel3.B" table:number-columns-repeated="2"/>
        <table:table-column table:style-name="Tabel3.D"/>
        <table:table-row>
          <table:table-cell table:style-name="Tabel3.A1" office:value-type="string">
            <text:p text:style-name="P208">Item</text:p>
          </table:table-cell>
          <table:table-cell table:style-name="Tabel3.A1" office:value-type="string">
            <text:p text:style-name="P209">Bytes per item</text:p>
          </table:table-cell>
          <table:table-cell table:style-name="Tabel3.A1" office:value-type="string">
            <text:p text:style-name="P209">#Items</text:p>
          </table:table-cell>
          <table:table-cell table:style-name="Tabel3.A1" office:value-type="string">
            <text:p text:style-name="P209">Total</text:p>
          </table:table-cell>
        </table:table-row>
        <table:table-row>
          <table:table-cell table:style-name="Tabel3.A1" office:value-type="string">
            <text:p text:style-name="P210">Settings</text:p>
          </table:table-cell>
          <table:table-cell table:style-name="Tabel3.A1" office:value-type="string">
            <text:p text:style-name="P211">16</text:p>
          </table:table-cell>
          <table:table-cell table:style-name="Tabel3.A1" office:value-type="string">
            <text:p text:style-name="P211">32</text:p>
          </table:table-cell>
          <table:table-cell table:style-name="Tabel3.A1" office:value-type="string">
            <text:p text:style-name="P211">512</text:p>
          </table:table-cell>
        </table:table-row>
        <table:table-row>
          <table:table-cell table:style-name="Tabel3.A1" office:value-type="string">
            <text:p text:style-name="P210">Version</text:p>
          </table:table-cell>
          <table:table-cell table:style-name="Tabel3.A1" office:value-type="string">
            <text:p text:style-name="P211">10</text:p>
          </table:table-cell>
          <table:table-cell table:style-name="Tabel3.A1" office:value-type="string">
            <text:p text:style-name="P211">1</text:p>
          </table:table-cell>
          <table:table-cell table:style-name="Tabel3.A1" office:value-type="string">
            <text:p text:style-name="P211">10</text:p>
          </table:table-cell>
        </table:table-row>
        <table:table-row>
          <table:table-cell table:style-name="Tabel3.A1" office:value-type="string">
            <text:p text:style-name="P208">Total</text:p>
          </table:table-cell>
          <table:table-cell table:style-name="Tabel3.A1" office:value-type="string">
            <text:p text:style-name="P212"/>
          </table:table-cell>
          <table:table-cell table:style-name="Tabel3.A1" office:value-type="string">
            <text:p text:style-name="P212"/>
          </table:table-cell>
          <table:table-cell table:style-name="Tabel3.A1" office:value-type="string">
            <text:p text:style-name="P209">522</text:p>
          </table:table-cell>
        </table:table-row>
        <table:table-row>
          <table:table-cell table:style-name="Tabel3.A1" office:value-type="string">
            <text:p text:style-name="P208">Available</text:p>
          </table:table-cell>
          <table:table-cell table:style-name="Tabel3.A1" office:value-type="string">
            <text:p text:style-name="P212"/>
          </table:table-cell>
          <table:table-cell table:style-name="Tabel3.A1" office:value-type="string">
            <text:p text:style-name="P212"/>
          </table:table-cell>
          <table:table-cell table:style-name="Tabel3.A1" office:value-type="string">
            <text:p text:style-name="P209">1,024</text:p>
          </table:table-cell>
        </table:table-row>
        <table:table-row>
          <table:table-cell table:style-name="Tabel3.A1" office:value-type="string">
            <text:p text:style-name="P208">Remaining</text:p>
          </table:table-cell>
          <table:table-cell table:style-name="Tabel3.A1" office:value-type="string">
            <text:p text:style-name="P212"/>
          </table:table-cell>
          <table:table-cell table:style-name="Tabel3.A1" office:value-type="string">
            <text:p text:style-name="P212"/>
          </table:table-cell>
          <table:table-cell table:style-name="Tabel3.A1" office:value-type="string">
            <text:p text:style-name="P209">502</text:p>
          </table:table-cell>
        </table:table-row>
        <table:table-row>
          <table:table-cell table:style-name="Tabel3.A1" office:value-type="string">
            <text:p text:style-name="P208">Remaining %</text:p>
          </table:table-cell>
          <table:table-cell table:style-name="Tabel3.A1" office:value-type="string">
            <text:p text:style-name="P212"/>
          </table:table-cell>
          <table:table-cell table:style-name="Tabel3.A1" office:value-type="string">
            <text:p text:style-name="P212"/>
          </table:table-cell>
          <table:table-cell table:style-name="Tabel3.A1" office:value-type="string">
            <text:p text:style-name="P209">49.02%</text:p>
          </table:table-cell>
        </table:table-row>
      </table:table>
      <text:list text:style-name="L27">
        <text:list-item>
          <text:list>
            <text:list-item>
              <text:h text:style-name="P213" text:outline-level="2">Flash Memory Usage</text:h>
            </text:list-item>
          </text:list>
        </text:list-item>
      </text:list>
      <text:p text:style-name="P214"/>
      <table:table table:name="Tabel4" table:style-name="Tabel4">
        <table:table-column table:style-name="Tabel4.A"/>
        <table:table-column table:style-name="Tabel4.B" table:number-columns-repeated="2"/>
        <table:table-column table:style-name="Tabel4.D"/>
        <table:table-row>
          <table:table-cell table:style-name="Tabel4.A1" office:value-type="string">
            <text:p text:style-name="P208">Item</text:p>
          </table:table-cell>
          <table:table-cell table:style-name="Tabel4.A1" office:value-type="string">
            <text:p text:style-name="P209">Bytes per item</text:p>
          </table:table-cell>
          <table:table-cell table:style-name="Tabel4.A1" office:value-type="string">
            <text:p text:style-name="P209">#Items</text:p>
          </table:table-cell>
          <table:table-cell table:style-name="Tabel4.A1" office:value-type="string">
            <text:p text:style-name="P209">Total</text:p>
          </table:table-cell>
        </table:table-row>
        <table:table-row>
          <table:table-cell table:style-name="Tabel4.A1" office:value-type="string">
            <text:p text:style-name="P210">I/O Functionality</text:p>
          </table:table-cell>
          <table:table-cell table:style-name="Tabel4.A1" office:value-type="string">
            <text:p text:style-name="P211">1024</text:p>
          </table:table-cell>
          <table:table-cell table:style-name="Tabel4.A1" office:value-type="string">
            <text:p text:style-name="P211">1</text:p>
          </table:table-cell>
          <table:table-cell table:style-name="Tabel4.A1" office:value-type="string">
            <text:p text:style-name="P211">1,024</text:p>
          </table:table-cell>
        </table:table-row>
        <table:table-row>
          <table:table-cell table:style-name="Tabel4.A1" office:value-type="string">
            <text:p text:style-name="P210">UI Functionality</text:p>
          </table:table-cell>
          <table:table-cell table:style-name="Tabel4.A1" office:value-type="string">
            <text:p text:style-name="P211">1536</text:p>
          </table:table-cell>
          <table:table-cell table:style-name="Tabel4.A1" office:value-type="string">
            <text:p text:style-name="P211">1</text:p>
          </table:table-cell>
          <table:table-cell table:style-name="Tabel4.A1" office:value-type="string">
            <text:p text:style-name="P211">1,536.0</text:p>
          </table:table-cell>
        </table:table-row>
        <table:table-row>
          <table:table-cell table:style-name="Tabel4.A1" office:value-type="string">
            <text:p text:style-name="P210">Game Code</text:p>
          </table:table-cell>
          <table:table-cell table:style-name="Tabel4.A1" office:value-type="string">
            <text:p text:style-name="P211">900</text:p>
          </table:table-cell>
          <table:table-cell table:style-name="Tabel4.A1" office:value-type="string">
            <text:p text:style-name="P211">32</text:p>
          </table:table-cell>
          <table:table-cell table:style-name="Tabel4.A1" office:value-type="string">
            <text:p text:style-name="P211">28,800.0</text:p>
          </table:table-cell>
        </table:table-row>
        <table:table-row>
          <table:table-cell table:style-name="Tabel4.A1" office:value-type="string">
            <text:p text:style-name="P208">Total</text:p>
          </table:table-cell>
          <table:table-cell table:style-name="Tabel4.A1" office:value-type="string">
            <text:p text:style-name="P212"/>
          </table:table-cell>
          <table:table-cell table:style-name="Tabel4.A1" office:value-type="string">
            <text:p text:style-name="P212"/>
          </table:table-cell>
          <table:table-cell table:style-name="Tabel4.A1" office:value-type="string">
            <text:p text:style-name="P211">31,360</text:p>
          </table:table-cell>
        </table:table-row>
        <table:table-row>
          <table:table-cell table:style-name="Tabel4.A1" office:value-type="string">
            <text:p text:style-name="P208">Available</text:p>
          </table:table-cell>
          <table:table-cell table:style-name="Tabel4.A1" office:value-type="string">
            <text:p text:style-name="P212"/>
          </table:table-cell>
          <table:table-cell table:style-name="Tabel4.A1" office:value-type="string">
            <text:p text:style-name="P212"/>
          </table:table-cell>
          <table:table-cell table:style-name="Tabel4.A1" office:value-type="string">
            <text:p text:style-name="P209">32,256</text:p>
          </table:table-cell>
        </table:table-row>
        <text:soft-page-break/>
        <table:table-row>
          <table:table-cell table:style-name="Tabel4.A1" office:value-type="string">
            <text:p text:style-name="P208">Remaining</text:p>
          </table:table-cell>
          <table:table-cell table:style-name="Tabel4.A1" office:value-type="string">
            <text:p text:style-name="P212"/>
          </table:table-cell>
          <table:table-cell table:style-name="Tabel4.A1" office:value-type="string">
            <text:p text:style-name="P212"/>
          </table:table-cell>
          <table:table-cell table:style-name="Tabel4.A1" office:value-type="string">
            <text:p text:style-name="P209">896</text:p>
          </table:table-cell>
        </table:table-row>
        <table:table-row>
          <table:table-cell table:style-name="Tabel4.A1" office:value-type="string">
            <text:p text:style-name="P208">Remaining %</text:p>
          </table:table-cell>
          <table:table-cell table:style-name="Tabel4.A1" office:value-type="string">
            <text:p text:style-name="P212"/>
          </table:table-cell>
          <table:table-cell table:style-name="Tabel4.A1" office:value-type="string">
            <text:p text:style-name="P212"/>
          </table:table-cell>
          <table:table-cell table:style-name="Tabel4.A1" office:value-type="string">
            <text:p text:style-name="P209">2.78%</text:p>
          </table:table-cell>
        </table:table-row>
      </table:table>
      <text:p text:style-name="P20"/>
      <text:list text:style-name="L28">
        <text:list-header>
          <text:h text:style-name="P215" text:outline-level="1"/>
        </text:list-header>
      </text:list>
      <text:h text:style-name="P216" text:outline-level="1" text:is-list-header="true">Appendix A: Games</text:h>
      <text:h text:style-name="Heading_20_2" text:outline-level="2" text:is-list-header="true">Endless Runner</text:h>
      <text:p text:style-name="P126">A single‑strip runner where obstacles scroll toward you and you survive by reacting quickly.</text:p>
      <text:p text:style-name="P217"><text:span text:style-name="T19">(Has a richer 4‑row counterpart → </text:span><text:span text:style-name="T57">Quadrows Runner</text:span><text:span text:style-name="T19">)</text:span>1D Mines</text:p>
      <text:p text:style-name="P126">A Minesweeper‑style puzzle on one LED strip where you reveal safe spots and avoid hidden mines.</text:p>
      <text:p text:style-name="P218"><text:span text:style-name="T55">(The 4‑row version becomes a different game → </text:span><text:span text:style-name="T58">Quadrows Mines</text:span><text:span text:style-name="T55">)</text:span></text:p>
      <text:h text:style-name="Heading_20_2" text:outline-level="2" text:is-list-header="true">1D Snake</text:h>
      <text:p text:style-name="P126">Classic Snake on a single LED strip, growing longer as you collect food.</text:p>
      <text:p text:style-name="P218"><text:span text:style-name="T55">(The 4‑row version is a different game → </text:span><text:span text:style-name="T58">Quadrows Snake</text:span><text:span text:style-name="T55">)</text:span></text:p>
      <text:h text:style-name="Heading_20_2" text:outline-level="2" text:is-list-header="true">1D Sprint</text:h>
      <text:p text:style-name="P126">A fast single‑strip reaction game where obstacles appear and you must dodge or jump with precise timing.</text:p>
      <text:p text:style-name="P219">(No meaningful 4‑row version)</text:p>
      <text:h text:style-name="Heading_20_2" text:outline-level="2" text:is-list-header="true">Center Clash</text:h>
      <text:p text:style-name="P126">Two players fire projectiles toward the center; timing determines whether shots collide or pass through.</text:p>
      <text:p text:style-name="P219">(No meaningful 4‑row version)</text:p>
      <text:h text:style-name="Heading_20_2" text:outline-level="2" text:is-list-header="true">Color Catch</text:h>
      <text:p text:style-name="P126">Colored pixels fall down the rows; you must catch only the correct color while avoiding the wrong ones.</text:p>
      <text:p text:style-name="P220">(1D and 4‑row versions feel identical → same game with settings)</text:p>
      <text:h text:style-name="Heading_20_2" text:outline-level="2" text:is-list-header="true">Dual Dash</text:h>
      <text:p text:style-name="P126">A two‑player race from top to bottom, dodging obstacles and trying to reach the finish first.</text:p>
      <text:p text:style-name="P219">(Only makes sense in 4 rows)</text:p>
      <text:h text:style-name="Heading_20_2" text:outline-level="2" text:is-list-header="true"><text:soft-page-break/>Dual Defender</text:h>
      <text:p text:style-name="P126">Each player defends their side from incoming waves of enemies or projectiles.</text:p>
      <text:p text:style-name="P219">(Only makes sense in 4 rows)</text:p>
      <text:h text:style-name="Heading_20_2" text:outline-level="2" text:is-list-header="true">Dual Snake Battle</text:h>
      <text:p text:style-name="P126">Two snakes compete for food and try to force each other into collisions.</text:p>
      <text:p text:style-name="P219">(Only makes sense in 4 rows)</text:p>
      <text:h text:style-name="Heading_20_2" text:outline-level="2" text:is-list-header="true">Lane Racer</text:h>
      <text:p text:style-name="P126">A forward‑scrolling racing game where obstacles appear in lanes and you switch lanes to avoid them.</text:p>
      <text:h text:style-name="Heading_20_2" text:outline-level="2" text:is-list-header="true">Lane Shooter</text:h>
      <text:p text:style-name="P126">Targets or enemies move along the rows while you shoot vertically to clear them.</text:p>
      <text:h text:style-name="Heading_20_2" text:outline-level="2" text:is-list-header="true">Light Harvest</text:h>
      <text:p text:style-name="P126">Collect moving light orbs while avoiding harmful ones as they travel across the rows.</text:p>
      <text:h text:style-name="Heading_20_2" text:outline-level="2" text:is-list-header="true">Light Memory</text:h>
      <text:p text:style-name="P126">A Simon‑style memory game where sequences of lights appear across the rows and must be repeated.</text:p>
      <text:h text:style-name="Heading_20_2" text:outline-level="2" text:is-list-header="true">Light Runner</text:h>
      <text:p text:style-name="P126">A fast lane‑switching endless runner where obstacles appear in random lanes and you must react quickly to survive.</text:p>
      <text:p text:style-name="P218"><text:span text:style-name="T55">(This is the </text:span><text:span text:style-name="T58">Quadrows Runner</text:span><text:span text:style-name="T54"> </text:span><text:span text:style-name="T55">version of 1D Endless Runner)</text:span></text:p>
      <text:h text:style-name="Heading_20_2" text:outline-level="2" text:is-list-header="true">Meteor Sweep</text:h>
      <text:p text:style-name="P126">Meteors fall from the right side; you shoot them before they reach the left.</text:p>
      <text:h text:style-name="Heading_20_2" text:outline-level="2" text:is-list-header="true">Mirror Clash</text:h>
      <text:p text:style-name="P126">Players control reflective paddles that bounce shots back and forth until someone gets hit.</text:p>
      <text:p text:style-name="P219">(Only meaningful in 4 rows)</text:p>
      <text:h text:style-name="Heading_20_2" text:outline-level="2" text:is-list-header="true">Pixel Drift</text:h>
      <text:p text:style-name="P126">A lane‑switching drift game where you avoid walls and collect boosts while sliding between lanes.</text:p>
      <text:h text:style-name="Heading_20_2" text:outline-level="2" text:is-list-header="true"><text:soft-page-break/>Pixel Storm</text:h>
      <text:p text:style-name="P126">A simplified bullet‑hell game with patterns of projectiles moving across the rows.</text:p>
      <text:h text:style-name="Heading_20_2" text:outline-level="2" text:is-list-header="true">Pixel Tennis</text:h>
      <text:p text:style-name="P126">A chaotic Pong‑like game where the ball can jump between lanes, making rallies unpredictable.</text:p>
      <text:p text:style-name="P219">(Only meaningful in 4 rows)</text:p>
      <text:h text:style-name="Heading_20_2" text:outline-level="2" text:is-list-header="true">Pong</text:h>
      <text:p text:style-name="P126">Speed changes when hitting close enough (fast when good, slow when bad)</text:p>
      <text:p text:style-name="P22"/>
      <text:h text:style-name="Heading_20_2" text:outline-level="2" text:is-list-header="true">Pulse Arena</text:h>
      <text:p text:style-name="P126">Waves of light pulses move toward the player; some must be dodged, others blocked depending on color.</text:p>
      <text:p text:style-name="P219">(Only meaningful in 4 rows)</text:p>
      <text:h text:style-name="Heading_20_2" text:outline-level="2" text:is-list-header="true">RGB Chaser</text:h>
      <text:p text:style-name="P126">Colored blocks fall down, by selecting the right row you can shoot the right color block to stop a same color</text:p>
      <text:p text:style-name="P126">e.g. up = Red, button = Green, bottom = Blue</text:p>
      <text:p text:style-name="P126">https://www.youtube.com/shorts/XopU0OKFKks</text:p>
      <text:h text:style-name="Heading_20_2" text:outline-level="2" text:is-list-header="true">Quadrows Breakout</text:h>
      <text:p text:style-name="P126">A Breakout‑style game where a bouncing ball destroys blocks arranged across four LED rows.</text:p>
      <text:p text:style-name="P218"><text:span text:style-name="T55">(The 1D version is a different game → </text:span><text:span text:style-name="T58">1D Breakout</text:span><text:span text:style-name="T54"> </text:span><text:span text:style-name="T55">if you ever add it)</text:span></text:p>
      <text:h text:style-name="Heading_20_2" text:outline-level="2" text:is-list-header="true">Quadrows Labyrinth</text:h>
      <text:p text:style-name="P126">A scrolling maze where you must choose the correct lane to avoid dead ends and survive.</text:p>
      <text:p text:style-name="P218"><text:span text:style-name="T55">(The 1D version is a different game → </text:span><text:span text:style-name="T58">1D Labyrinth</text:span><text:span text:style-name="T55">)</text:span></text:p>
      <text:h text:style-name="Heading_20_2" text:outline-level="2" text:is-list-header="true">Quadrows Mines</text:h>
      <text:p text:style-name="P126">A scrolling minefield across four rows where you must navigate safely.</text:p>
      <text:p text:style-name="P218"><text:span text:style-name="T55">(The 1D version is a different game → </text:span><text:span text:style-name="T58">1D Mines</text:span><text:span text:style-name="T55">)</text:span></text:p>
      <text:h text:style-name="Heading_20_2" text:outline-level="2" text:is-list-header="true"><text:soft-page-break/>Quadrows Pong</text:h>
      <text:p text:style-name="P126">A lane‑switching version of Pong where the ball can travel across all four rows, adding chaos and strategy.</text:p>
      <text:p text:style-name="P219">(The 1D version is classic Pong → different game)</text:p>
      <text:list xml:id="list11091193" text:style-name="L29">
        <text:list-item>
          <text:list>
            <text:list-header>
              <text:h text:style-name="P221" text:outline-level="2"/>
            </text:list-header>
          </text:list>
        </text:list-item>
      </text:list>
      <text:list text:style-name="L30">
        <text:list-item>
          <text:list>
            <text:list-item>
              <text:list>
                <text:list-item>
                  <text:h text:style-name="P222" text:outline-level="3">Description</text:h>
                </text:list-item>
              </text:list>
            </text:list-item>
          </text:list>
        </text:list-item>
      </text:list>
      <text:p text:style-name="P223">Classic Pong but with lane switching. Each player controls a paddle that can move left/right and switch between the 4 rows. </text:p>
      <text:list text:style-name="L31">
        <text:list-item>
          <text:list>
            <text:list-item>
              <text:list>
                <text:list-item>
                  <text:h text:style-name="P224" text:outline-level="3">Game Rules</text:h>
                </text:list-item>
              </text:list>
            </text:list-item>
          </text:list>
        </text:list-item>
      </text:list>
      <text:p text:style-name="P223">The ball starts from the center to a random home. </text:p>
      <text:p text:style-name="P223">The player can press the button to switch the ball around in the direction of the other player.</text:p>
      <text:p text:style-name="P223">The button only responds when the ball is on that player’s side. </text:p>
      <text:p text:style-name="P225"/>
      <text:p text:style-name="P223">A ball moves from the center towards a random home. </text:p>
      <text:p text:style-name="P223">The player from that home has to press a button when the ball is as close as possible to its home position. When the button is not pressed at reaching the home position, points will be subtracted. </text:p>
      <text:p text:style-name="P225"/>
      <text:p text:style-name="P223">The ball switches direction anyway and the speed of the ball is increased.</text:p>
      <text:p text:style-name="P223">Initially the speed is 50 ms per position (thus a full length of the strip takes 144 * 50 ms = 7.2 seconds. Every reversal the speed increases with a percentage, by default 2%</text:p>
      <text:list text:style-name="L32">
        <text:list-item>
          <text:list>
            <text:list-item>
              <text:list>
                <text:list-item>
                  <text:h text:style-name="P226" text:outline-level="3">Scoring</text:h>
                </text:list-item>
              </text:list>
            </text:list-item>
          </text:list>
        </text:list-item>
      </text:list>
      <text:p text:style-name="P223">The player scores points when the ball is reversed close to the player’s home position, by default:</text:p>
      <text:p text:style-name="P223">at home: 100 points</text:p>
      <text:p text:style-name="P227"><text:span text:style-name="T55">1 position away from home: </text:span><text:span text:style-name="T54">  </text:span><text:span text:style-name="T55">50 points</text:span></text:p>
      <text:p text:style-name="P227"><text:span text:style-name="T55">2 positions away from home:</text:span><text:span text:style-name="T54">   </text:span><text:span text:style-name="T55">25 points</text:span></text:p>
      <text:p text:style-name="P228"><text:span text:style-name="T54">           </text:span><text:span text:style-name="T59">3 positions away from home:   10 points</text:span></text:p>
      <text:p text:style-name="P229">            <text:span text:style-name="T60">4 positions away from home:     5 points</text:span></text:p>
      <text:p text:style-name="P228"><text:span text:style-name="T54">         </text:span><text:span text:style-name="T59">5 positions away from home:     3 points</text:span></text:p>
      <text:p text:style-name="P229">            <text:span text:style-name="T60">6 positions away from home:     1 point</text:span></text:p>
      <text:p text:style-name="P225"/>
      <text:p text:style-name="P223"><text:soft-page-break/>When the button is not pressed before the ball reaches the home position and would go one position further, points are subtracted. By default this is 100 points.</text:p>
      <text:p text:style-name="P225"/>
      <text:list text:style-name="L33">
        <text:list-item>
          <text:list>
            <text:list-item>
              <text:list>
                <text:list-item>
                  <text:h text:style-name="P230" text:outline-level="3">UI</text:h>
                </text:list-item>
              </text:list>
            </text:list-item>
          </text:list>
        </text:list-item>
      </text:list>
      <text:p text:style-name="P223">The ball color is red.</text:p>
      <text:p text:style-name="P225"/>
      <text:p text:style-name="P227"><text:span text:style-name="T55">The game time is only used when the </text:span><text:span text:style-name="T58">win condition </text:span><text:span text:style-name="T55">setting is set to</text:span><text:span text:style-name="T54"> </text:span><text:span text:style-name="T58">Time Limit</text:span><text:span text:style-name="T55">.</text:span></text:p>
      <text:p text:style-name="P223">The score displays show the score of each player.</text:p>
      <text:list text:style-name="L34">
        <text:list-item>
          <text:list>
            <text:list-item>
              <text:list>
                <text:list-item>
                  <text:h text:style-name="P231" text:outline-level="3">Controls</text:h>
                </text:list-item>
              </text:list>
            </text:list-item>
          </text:list>
        </text:list-item>
      </text:list>
      <text:p text:style-name="P223">Any button can be used to hit the ball. </text:p>
      <text:p text:style-name="P225"/>
      <text:list text:style-name="L35">
        <text:list-item>
          <text:list>
            <text:list-item>
              <text:list>
                <text:list-item>
                  <text:h text:style-name="P232" text:outline-level="3">Settings</text:h>
                </text:list-item>
              </text:list>
            </text:list-item>
          </text:list>
        </text:list-item>
      </text:list>
      <text:p text:style-name="P233"/>
      <table:table table:name="Tabel1" table:style-name="Tabel1">
        <table:table-column table:style-name="Tabel1.A"/>
        <table:table-column table:style-name="Tabel1.B"/>
        <table:table-column table:style-name="Tabel1.C"/>
        <table:table-column table:style-name="Tabel1.D"/>
        <table:table-column table:style-name="Tabel1.E"/>
        <table:table-header-rows>
          <table:table-row>
            <table:table-cell table:style-name="Tabel1.A1" office:value-type="string">
              <text:p text:style-name="P234">Item</text:p>
            </table:table-cell>
            <table:table-cell table:style-name="Tabel1.A1" office:value-type="string">
              <text:p text:style-name="P235">Unit</text:p>
            </table:table-cell>
            <table:table-cell table:style-name="Tabel1.A1" office:value-type="string">
              <text:p text:style-name="P235">Range</text:p>
            </table:table-cell>
            <table:table-cell table:style-name="Tabel1.A1" office:value-type="string">
              <text:p text:style-name="P235">Step</text:p>
            </table:table-cell>
            <table:table-cell table:style-name="Tabel1.A1" office:value-type="string">
              <text:p text:style-name="P235">Bytes</text:p>
            </table:table-cell>
          </table:table-row>
          <table:table-row>
            <table:table-cell table:style-name="Tabel1.A1" office:value-type="string">
              <text:p text:style-name="P236">Player Mode</text:p>
            </table:table-cell>
            <table:table-cell table:style-name="Tabel1.A1" office:value-type="string">
              <text:p text:style-name="P237">choice</text:p>
            </table:table-cell>
            <table:table-cell table:style-name="Tabel1.A1" office:value-type="string">
              <text:p text:style-name="P237">Single Player,<text:line-break/>Two Players</text:p>
            </table:table-cell>
            <table:table-cell table:style-name="Tabel1.A1" office:value-type="string">
              <text:p text:style-name="P237">1</text:p>
            </table:table-cell>
            <table:table-cell table:style-name="Tabel1.A1" office:value-type="string">
              <text:p text:style-name="P237">1</text:p>
            </table:table-cell>
          </table:table-row>
          <table:table-row>
            <table:table-cell table:style-name="Tabel1.A1" office:value-type="string">
              <text:p text:style-name="P238">Win Condition</text:p>
            </table:table-cell>
            <table:table-cell table:style-name="Tabel1.A1" office:value-type="string">
              <text:p text:style-name="P239">choice</text:p>
            </table:table-cell>
            <table:table-cell table:style-name="Tabel1.A1" office:value-type="string">
              <text:p text:style-name="P239">Misses, Time Limit</text:p>
            </table:table-cell>
            <table:table-cell table:style-name="Tabel1.A1" office:value-type="string">
              <text:p text:style-name="P239">1</text:p>
            </table:table-cell>
            <table:table-cell table:style-name="Tabel1.A1" office:value-type="string">
              <text:p text:style-name="P239">1</text:p>
            </table:table-cell>
          </table:table-row>
          <table:table-row>
            <table:table-cell table:style-name="Tabel1.A1" office:value-type="string">
              <text:p text:style-name="P238">Number of Misses</text:p>
            </table:table-cell>
            <table:table-cell table:style-name="Tabel1.A1" office:value-type="string">
              <text:p text:style-name="P239">amount</text:p>
            </table:table-cell>
            <table:table-cell table:style-name="Tabel1.A1" office:value-type="string">
              <text:p text:style-name="P239">0-16</text:p>
            </table:table-cell>
            <table:table-cell table:style-name="Tabel1.A1" office:value-type="string">
              <text:p text:style-name="P239">1</text:p>
            </table:table-cell>
            <table:table-cell table:style-name="Tabel1.A1" office:value-type="string">
              <text:p text:style-name="P239">1</text:p>
            </table:table-cell>
          </table:table-row>
          <table:table-row>
            <table:table-cell table:style-name="Tabel1.A1" office:value-type="string">
              <text:p text:style-name="P238">Time Limit</text:p>
            </table:table-cell>
            <table:table-cell table:style-name="Tabel1.A1" office:value-type="string">
              <text:p text:style-name="P239">s</text:p>
            </table:table-cell>
            <table:table-cell table:style-name="Tabel1.A1" office:value-type="string">
              <text:p text:style-name="P239">30-300</text:p>
            </table:table-cell>
            <table:table-cell table:style-name="Tabel1.A1" office:value-type="string">
              <text:p text:style-name="P239">10</text:p>
            </table:table-cell>
            <table:table-cell table:style-name="Tabel1.A1" office:value-type="string">
              <text:p text:style-name="P237">1</text:p>
            </table:table-cell>
          </table:table-row>
          <table:table-row>
            <table:table-cell table:style-name="Tabel1.A1" office:value-type="string">
              <text:p text:style-name="P238">Home button press score</text:p>
            </table:table-cell>
            <table:table-cell table:style-name="Tabel1.A1" office:value-type="string">
              <text:p text:style-name="P239">points</text:p>
            </table:table-cell>
            <table:table-cell table:style-name="Tabel1.A1" office:value-type="string">
              <text:p text:style-name="P239">0-100</text:p>
            </table:table-cell>
            <table:table-cell table:style-name="Tabel1.A1" office:value-type="string">
              <text:p text:style-name="P239">10</text:p>
            </table:table-cell>
            <table:table-cell table:style-name="Tabel1.A1" office:value-type="string">
              <text:p text:style-name="P239">1</text:p>
            </table:table-cell>
          </table:table-row>
          <table:table-row>
            <table:table-cell table:style-name="Tabel1.A1" office:value-type="string">
              <text:p text:style-name="P238">Home distance 1 score</text:p>
            </table:table-cell>
            <table:table-cell table:style-name="Tabel1.A1" office:value-type="string">
              <text:p text:style-name="P239">points</text:p>
            </table:table-cell>
            <table:table-cell table:style-name="Tabel1.A1" office:value-type="string">
              <text:p text:style-name="P239">0-100</text:p>
            </table:table-cell>
            <table:table-cell table:style-name="Tabel1.A1" office:value-type="string">
              <text:p text:style-name="P239">10</text:p>
            </table:table-cell>
            <table:table-cell table:style-name="Tabel1.A1" office:value-type="string">
              <text:p text:style-name="P239">1</text:p>
            </table:table-cell>
          </table:table-row>
          <table:table-row>
            <table:table-cell table:style-name="Tabel1.A1" office:value-type="string">
              <text:p text:style-name="P238">Home distance 2 score</text:p>
            </table:table-cell>
            <table:table-cell table:style-name="Tabel1.A1" office:value-type="string">
              <text:p text:style-name="P239">points</text:p>
            </table:table-cell>
            <table:table-cell table:style-name="Tabel1.A1" office:value-type="string">
              <text:p text:style-name="P239">0-100</text:p>
            </table:table-cell>
            <table:table-cell table:style-name="Tabel1.A1" office:value-type="string">
              <text:p text:style-name="P239">10</text:p>
            </table:table-cell>
            <table:table-cell table:style-name="Tabel1.A1" office:value-type="string">
              <text:p text:style-name="P239">1</text:p>
            </table:table-cell>
          </table:table-row>
          <table:table-row>
            <table:table-cell table:style-name="Tabel1.A1" office:value-type="string">
              <text:p text:style-name="P238">Home distance 3 score</text:p>
            </table:table-cell>
            <table:table-cell table:style-name="Tabel1.A1" office:value-type="string">
              <text:p text:style-name="P239">points</text:p>
            </table:table-cell>
            <table:table-cell table:style-name="Tabel1.A1" office:value-type="string">
              <text:p text:style-name="P239">0-100</text:p>
            </table:table-cell>
            <table:table-cell table:style-name="Tabel1.A1" office:value-type="string">
              <text:p text:style-name="P239">10</text:p>
            </table:table-cell>
            <table:table-cell table:style-name="Tabel1.A1" office:value-type="string">
              <text:p text:style-name="P239">1</text:p>
            </table:table-cell>
          </table:table-row>
          <table:table-row>
            <table:table-cell table:style-name="Tabel1.A1" office:value-type="string">
              <text:p text:style-name="P238">Initial speed</text:p>
            </table:table-cell>
            <table:table-cell table:style-name="Tabel1.A1" office:value-type="string">
              <text:p text:style-name="P239">ms</text:p>
            </table:table-cell>
            <table:table-cell table:style-name="Tabel1.A1" office:value-type="string">
              <text:p text:style-name="P239">100-1,700</text:p>
            </table:table-cell>
            <table:table-cell table:style-name="Tabel1.A1" office:value-type="string">
              <text:p text:style-name="P239">100</text:p>
            </table:table-cell>
            <table:table-cell table:style-name="Tabel1.A1" office:value-type="string">
              <text:p text:style-name="P239">1</text:p>
            </table:table-cell>
          </table:table-row>
          <table:table-row>
            <table:table-cell table:style-name="Tabel1.A1" office:value-type="string">
              <text:p text:style-name="P238">Speed increase</text:p>
            </table:table-cell>
            <table:table-cell table:style-name="Tabel1.A1" office:value-type="string">
              <text:p text:style-name="P239">ms</text:p>
            </table:table-cell>
            <table:table-cell table:style-name="Tabel1.A1" office:value-type="string">
              <text:p text:style-name="P239">0-15</text:p>
            </table:table-cell>
            <table:table-cell table:style-name="Tabel1.A1" office:value-type="string">
              <text:p text:style-name="P239">1</text:p>
            </table:table-cell>
            <table:table-cell table:style-name="Tabel1.A1" office:value-type="string">
              <text:p text:style-name="P239">1</text:p>
            </table:table-cell>
          </table:table-row>
        </table:table-header-rows>
        <table:table-row>
          <table:table-cell table:style-name="Tabel1.A1" office:value-type="string">
            <text:p text:style-name="P240">Total (bytes)</text:p>
          </table:table-cell>
          <table:table-cell table:style-name="Tabel1.A1" office:value-type="string">
            <text:p text:style-name="P241"/>
          </table:table-cell>
          <table:table-cell table:style-name="Tabel1.A1" office:value-type="string">
            <text:p text:style-name="P241"/>
          </table:table-cell>
          <table:table-cell table:style-name="Tabel1.A1" office:value-type="string">
            <text:p text:style-name="P241"/>
          </table:table-cell>
          <table:table-cell table:style-name="Tabel1.A1" office:value-type="string">
            <text:p text:style-name="P242">10</text:p>
          </table:table-cell>
        </table:table-row>
      </table:table>
      <text:list text:style-name="L36">
        <text:list-item>
          <text:list>
            <text:list-item>
              <text:h text:style-name="P243" text:outline-level="2"><text:soft-page-break/>Quadrows Snake</text:h>
              <text:list>
                <text:list-item>
                  <text:h text:style-name="P244" text:outline-level="3">Tags</text:h>
                </text:list-item>
              </text:list>
            </text:list-item>
          </text:list>
        </text:list-item>
      </text:list>
      <text:p text:style-name="P223">Player Count: 2, Genre: Pong, Game Type: 4 Rows</text:p>
      <text:list text:style-name="L37">
        <text:list-item>
          <text:list>
            <text:list-item>
              <text:h text:style-name="P245" text:outline-level="2">Description</text:h>
            </text:list-item>
          </text:list>
        </text:list-item>
      </text:list>
      <text:p text:style-name="P223">Snake can move between lanes. Two‑player mode allows competitive or cooperative play. </text:p>
      <text:list text:style-name="L38">
        <text:list-item>
          <text:list>
            <text:list-item>
              <text:h text:style-name="P246" text:outline-level="2">Simon Memory</text:h>
              <text:list>
                <text:list-item>
                  <text:h text:style-name="P247" text:outline-level="3">Description</text:h>
                </text:list-item>
              </text:list>
            </text:list-item>
          </text:list>
        </text:list-item>
      </text:list>
      <text:p text:style-name="P225"/>
      <text:p text:style-name="P223">Remember LEDs. Every successful round one LED more to remember. Use pot to go to approximate location and press ok.</text:p>
      <text:p text:style-name="P225"/>
      <text:p text:style-name="P223">Get more points when closer to LED to remember.</text:p>
      <text:list text:style-name="L39">
        <text:list-item>
          <text:list>
            <text:list-item>
              <text:list>
                <text:list-item>
                  <text:h text:style-name="P248" text:outline-level="3">UI</text:h>
                </text:list-item>
                <text:list-item>
                  <text:h text:style-name="P249" text:outline-level="3">Controls</text:h>
                </text:list-item>
                <text:list-item>
                  <text:h text:style-name="P249" text:outline-level="3">Scoring</text:h>
                </text:list-item>
                <text:list-item>
                  <text:h text:style-name="P249" text:outline-level="3">Settings</text:h>
                </text:list-item>
              </text:list>
            </text:list-item>
          </text:list>
        </text:list-item>
      </text:list>
      <text:h text:style-name="Heading_20_2" text:outline-level="2" text:is-list-header="true">Quadrows Rhythm</text:h>
      <text:p text:style-name="P126">Notes fall down the lanes in sync with sound effects; you hit buttons in rhythm.</text:p>
      <text:p text:style-name="P218"><text:span text:style-name="T55">(The 1D version is a different game → </text:span><text:span text:style-name="T58">1D Rhythm</text:span><text:span text:style-name="T55">)</text:span></text:p>
      <text:h text:style-name="Heading_20_2" text:outline-level="2" text:is-list-header="true">Quadrows Snake</text:h>
      <text:p text:style-name="P126">A multi‑lane Snake variant where the snake can switch between rows and compete or cooperate.</text:p>
      <text:p text:style-name="P219">(The 1D version is classic Snake → different game)</text:p>
      <text:h text:style-name="Heading_20_2" text:outline-level="2" text:is-list-header="true">Tug of Light</text:h>
      <text:p text:style-name="P126">A tug‑of‑war game where both players mash their button to pull a glowing pixel toward their side.</text:p>
      <text:p text:style-name="P219">(Only meaningful in 1D)</text:p>
      <text:h text:style-name="P250" text:outline-level="1" text:is-list-header="true">Appendix B: Demos</text:h>
      <text:p text:style-name="P251"/>
      <text:h text:style-name="P250" text:outline-level="1" text:is-list-header="true">Appendix C: Utilities</text:h>
      <text:p text:style-name="P251"/>
      <text:h text:style-name="P250" text:outline-level="1" text:is-list-header="true">Appendix D: Setup Applications</text:h>
      <text:p text:style-name="P251"/>
      <text:list text:continue-list="list11091193" text:style-name="L29">
        <text:list-item>
          <text:list>
            <text:list-header>
              <text:h text:style-name="P252" text:outline-level="2"/>
            </text:list-header>
          </text:list>
        </text:list-item>
      </text:list>
      <text:list text:style-name="L40">
        <text:list-item>
          <text:list>
            <text:list-header>
              <text:h text:style-name="P253" text:outline-level="2"/>
              <text:list>
                <text:list-header>
                  <text:h text:style-name="P254" text:outline-level="3"/>
                </text:list-header>
              </text:list>
            </text:list-header>
          </text:list>
        </text:list-item>
      </text:list>
      <text:p text:style-name="P2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ascadia Code Light" svg:font-family="'Cascadia Code Light'" style:font-family-generic="modern" style:font-pitch="fixed"/>
    <style:font-face style:name="DS-Digital" svg:font-family="DS-Digit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style:contextual-spacing="false" fo:line-height="0.7cm" style:register-true="false" fo:text-indent="0cm" style:auto-text-indent="false" style:writing-mode="lr-tb"/>
      <style:text-properties fo:font-variant="normal" fo:text-transform="none" fo:color="#000000" loext:opacity="100%" style:text-line-through-style="none" style:text-line-through-type="none" style:font-name="Arial3" fo:font-family="Arial, sans-serif" fo:font-size="11pt" fo:font-style="normal" style:text-underline-style="none" fo:font-weight="normal" officeooo:rsid="001a817f"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loext:graphic-properties draw:fill="none" draw:fill-color="#ffffff"/>
      <style:paragraph-properties fo:margin-left="0cm" fo:margin-right="0cm" fo:margin-top="0.706cm" fo:margin-bottom="0cm" style:contextual-spacing="false" fo:line-height="138%" fo:text-indent="0cm" style:auto-text-indent="false" style:page-number="auto" fo:background-color="transparent" fo:padding="0cm" fo:border="none" fo:keep-with-next="always" text:number-lines="false" text:line-number="0" style:writing-mode="lr-tb">
        <style:tab-stops/>
      </style:paragraph-properties>
      <style:text-properties fo:font-variant="normal" fo:text-transform="none" fo:color="#000000" loext:opacity="100%" style:text-line-through-style="none" style:text-line-through-type="none" style:font-name="Arial3" fo:font-family="Arial, sans-serif" fo:font-size="20pt" fo:font-style="normal" style:text-underline-style="none" fo:font-weight="normal" officeooo:rsid="0011e368" style:text-blinking="false"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loext:graphic-properties draw:fill="none" draw:fill-color="#729fcf"/>
      <style:paragraph-properties fo:margin-left="0cm" fo:margin-right="0cm" fo:margin-top="0cm" fo:margin-bottom="0.247cm" style:contextual-spacing="false" fo:line-height="115%" fo:text-indent="0cm" style:auto-text-indent="false" fo:background-color="transparent"/>
      <style:text-properties fo:font-size="16pt" fo:font-weight="bold" officeooo:rsid="001e7b80"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family="Arial, sans-serif" fo:font-size="13pt" fo:font-style="normal" style:text-underline-style="none" fo:font-weight="bold" officeooo:rsid="0011e368" style:text-blinking="false" fo:background-color="transparent"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9T10:53:24.098930200</meta:creation-date>
    <dc:date>2026-07-07T10:02:54.017003200</dc:date>
    <meta:editing-duration>P3DT2H2M39S</meta:editing-duration>
    <meta:editing-cycles>22</meta:editing-cycles>
    <meta:generator>LibreOffice/26.2.4.2$Windows_X86_64 LibreOffice_project/0229ac93fcf0d7cbc6376066c6f35021cef002dc</meta:generator>
    <meta:document-statistic meta:table-count="15" meta:image-count="24" meta:object-count="0" meta:page-count="55" meta:paragraph-count="1002" meta:word-count="6240" meta:character-count="35074" meta:non-whitespace-character-count="29729"/>
  </office:meta>
</office:document-meta>
</file>